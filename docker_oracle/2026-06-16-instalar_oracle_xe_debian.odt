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monospace" svg:font-family="monospace"/>
  </office:font-face-decls>
  <office:automatic-styles>
    <style:style style:name="P1" style:family="paragraph" style:parent-style-name="Text_20_body" style:list-style-name="L1">
      <style:text-properties officeooo:rsid="001a0523" officeooo:paragraph-rsid="001a0523"/>
    </style:style>
    <style:style style:name="P2" style:family="paragraph" style:parent-style-name="Text_20_body" style:list-style-name="L1">
      <style:text-properties officeooo:rsid="001f8091" officeooo:paragraph-rsid="001f8091"/>
    </style:style>
    <style:style style:name="P3" style:family="paragraph" style:parent-style-name="Text_20_body" style:list-style-name="L1">
      <style:text-properties officeooo:rsid="00245d21" officeooo:paragraph-rsid="00245d21"/>
    </style:style>
    <style:style style:name="P4" style:family="paragraph" style:parent-style-name="Text_20_body" style:list-style-name="L1">
      <style:text-properties officeooo:rsid="00282db1" officeooo:paragraph-rsid="00282db1"/>
    </style:style>
    <style:style style:name="P5" style:family="paragraph" style:parent-style-name="Text_20_body" style:list-style-name="L1">
      <style:text-properties officeooo:rsid="002a0f74" officeooo:paragraph-rsid="002a0f74"/>
    </style:style>
    <style:style style:name="P6" style:family="paragraph" style:parent-style-name="Text_20_body">
      <style:text-properties officeooo:rsid="001a0523" officeooo:paragraph-rsid="001a0523"/>
    </style:style>
    <style:style style:name="P7" style:family="paragraph" style:parent-style-name="Text_20_body">
      <style:text-properties officeooo:rsid="001b3320" officeooo:paragraph-rsid="001b3320"/>
    </style:style>
    <style:style style:name="P8" style:family="paragraph" style:parent-style-name="Text_20_body">
      <style:text-properties officeooo:rsid="001c4b40" officeooo:paragraph-rsid="001c4b40"/>
    </style:style>
    <style:style style:name="P9" style:family="paragraph" style:parent-style-name="Text_20_body" style:list-style-name="List_20_1">
      <style:text-properties officeooo:rsid="001c4b40" officeooo:paragraph-rsid="001c4b40"/>
    </style:style>
    <style:style style:name="P10" style:family="paragraph" style:parent-style-name="Text_20_body" style:list-style-name="L2">
      <style:text-properties officeooo:rsid="002f84ee" officeooo:paragraph-rsid="002f84ee"/>
    </style:style>
    <style:style style:name="P11" style:family="paragraph" style:parent-style-name="Text_20_body" style:list-style-name="L2">
      <style:text-properties officeooo:rsid="00307255" officeooo:paragraph-rsid="00307255"/>
    </style:style>
    <style:style style:name="P12" style:family="paragraph" style:parent-style-name="Text_20_body" style:list-style-name="L2">
      <style:text-properties officeooo:rsid="00345029" officeooo:paragraph-rsid="00345029"/>
    </style:style>
    <style:style style:name="P13" style:family="paragraph" style:parent-style-name="Text_20_body">
      <style:text-properties officeooo:rsid="001dc298" officeooo:paragraph-rsid="001dc298"/>
    </style:style>
    <style:style style:name="P14" style:family="paragraph" style:parent-style-name="Text_20_body">
      <style:text-properties officeooo:rsid="001f8091" officeooo:paragraph-rsid="001f8091"/>
    </style:style>
    <style:style style:name="P15" style:family="paragraph" style:parent-style-name="Text_20_body">
      <style:text-properties style:font-name="monospace" officeooo:rsid="001f8091" officeooo:paragraph-rsid="001f8091"/>
    </style:style>
    <style:style style:name="P16" style:family="paragraph" style:parent-style-name="Text_20_body">
      <style:text-properties officeooo:rsid="0020e0e6" officeooo:paragraph-rsid="0020e0e6"/>
    </style:style>
    <style:style style:name="P17" style:family="paragraph" style:parent-style-name="Text_20_body">
      <style:text-properties officeooo:paragraph-rsid="0020e0e6"/>
    </style:style>
    <style:style style:name="P18" style:family="paragraph" style:parent-style-name="Text_20_body">
      <style:text-properties officeooo:rsid="0021806c" officeooo:paragraph-rsid="0021806c"/>
    </style:style>
    <style:style style:name="P19" style:family="paragraph" style:parent-style-name="Text_20_body">
      <style:text-properties style:font-name="monospace" officeooo:rsid="0021806c" officeooo:paragraph-rsid="0021806c"/>
    </style:style>
    <style:style style:name="P20" style:family="paragraph" style:parent-style-name="Heading_20_1">
      <style:text-properties officeooo:paragraph-rsid="00230646"/>
    </style:style>
    <style:style style:name="P21" style:family="paragraph" style:parent-style-name="Text_20_body">
      <style:text-properties officeooo:rsid="00230646" officeooo:paragraph-rsid="00230646"/>
    </style:style>
    <style:style style:name="P22" style:family="paragraph" style:parent-style-name="Text_20_body">
      <style:text-properties officeooo:rsid="00282db1" officeooo:paragraph-rsid="00282db1"/>
    </style:style>
    <style:style style:name="P23" style:family="paragraph" style:parent-style-name="Text_20_body">
      <style:text-properties officeooo:rsid="002a0f74" officeooo:paragraph-rsid="002a0f74"/>
    </style:style>
    <style:style style:name="P24" style:family="paragraph" style:parent-style-name="Text_20_body">
      <style:text-properties officeooo:rsid="002b477e" officeooo:paragraph-rsid="002b477e"/>
    </style:style>
    <style:style style:name="P25" style:family="paragraph" style:parent-style-name="Text_20_body">
      <style:text-properties officeooo:rsid="002c1cda" officeooo:paragraph-rsid="002c1cda"/>
    </style:style>
    <style:style style:name="P26" style:family="paragraph" style:parent-style-name="Text_20_body">
      <style:text-properties officeooo:rsid="002c2672" officeooo:paragraph-rsid="002c2672"/>
    </style:style>
    <style:style style:name="P27" style:family="paragraph" style:parent-style-name="Text_20_body">
      <style:text-properties officeooo:rsid="002cc902" officeooo:paragraph-rsid="002cc902"/>
    </style:style>
    <style:style style:name="P28" style:family="paragraph" style:parent-style-name="Text_20_body">
      <style:text-properties officeooo:rsid="002dccfd" officeooo:paragraph-rsid="002dccfd"/>
    </style:style>
    <style:style style:name="P29" style:family="paragraph" style:parent-style-name="Text_20_body">
      <style:text-properties officeooo:rsid="0035bc27" officeooo:paragraph-rsid="0035bc27"/>
    </style:style>
    <style:style style:name="P30" style:family="paragraph" style:parent-style-name="Text_20_body">
      <style:text-properties officeooo:rsid="003657c1" officeooo:paragraph-rsid="003657c1"/>
    </style:style>
    <style:style style:name="P31" style:family="paragraph" style:parent-style-name="Text_20_body">
      <style:text-properties style:font-name="monospace" officeooo:rsid="003657c1" officeooo:paragraph-rsid="003657c1"/>
    </style:style>
    <style:style style:name="P32" style:family="paragraph" style:parent-style-name="Text_20_body">
      <style:text-properties officeooo:rsid="00365f87" officeooo:paragraph-rsid="00365f87"/>
    </style:style>
    <style:style style:name="P33" style:family="paragraph" style:parent-style-name="Text_20_body">
      <style:text-properties style:font-name="monospace" officeooo:rsid="00365f87" officeooo:paragraph-rsid="00365f87"/>
    </style:style>
    <style:style style:name="P34" style:family="paragraph" style:parent-style-name="Text_20_body">
      <style:text-properties officeooo:rsid="0036921c" officeooo:paragraph-rsid="0036921c"/>
    </style:style>
    <style:style style:name="P35" style:family="paragraph" style:parent-style-name="Text_20_body">
      <style:text-properties officeooo:rsid="0039f43f" officeooo:paragraph-rsid="0039f43f"/>
    </style:style>
    <style:style style:name="P36" style:family="paragraph" style:parent-style-name="Heading_20_2">
      <style:text-properties officeooo:paragraph-rsid="003a356c"/>
    </style:style>
    <style:style style:name="P37" style:family="paragraph" style:parent-style-name="Text_20_body">
      <style:text-properties officeooo:paragraph-rsid="003a356c"/>
    </style:style>
    <style:style style:name="T1" style:family="text">
      <style:text-properties officeooo:rsid="00263368"/>
    </style:style>
    <style:style style:name="T2" style:family="text">
      <style:text-properties officeooo:rsid="002fcd6f"/>
    </style:style>
    <style:style style:name="T3" style:family="text">
      <style:text-properties officeooo:rsid="00325925"/>
    </style:style>
    <style:style style:name="T4" style:family="text">
      <style:text-properties fo:color="#000000" loext:opacity="100%" fo:background-color="#ffffff" loext:char-shading-value="0"/>
    </style:style>
    <style:style style:name="T5" style:family="text">
      <style:text-properties officeooo:rsid="0020e0e6"/>
    </style:style>
    <style:style style:name="T6" style:family="text">
      <style:text-properties fo:color="#000000" loext:opacity="100%" style:font-name="monospace" fo:background-color="#ffffff" loext:char-shading-value="0"/>
    </style:style>
    <style:style style:name="T7" style:family="text">
      <style:text-properties style:font-name="monospace"/>
    </style:style>
    <style:style style:name="T8" style:family="text">
      <style:text-properties fo:color="#ff5454" loext:opacity="100%" fo:font-weight="bold" fo:background-color="#ffffff" loext:char-shading-value="0"/>
    </style:style>
    <style:style style:name="T9" style:family="text">
      <style:text-properties fo:color="#000000" loext:opacity="100%" fo:font-weight="bold" fo:background-color="#ffffff" loext:char-shading-value="0"/>
    </style:style>
    <style:style style:name="T10" style:family="text">
      <style:text-properties officeooo:rsid="003a356c"/>
    </style:style>
    <style:style style:name="T11" style:family="text">
      <style:text-properties officeooo:rsid="003b557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INSTALAÇÃO DO ORACLE XE NO LINUX DEBIAN 13</text:h>
      <text:h text:style-name="Heading_20_1" text:outline-level="1">LINKS</text:h>
      <text:list text:style-name="L1">
        <text:list-item>
          <text:p text:style-name="P1">Página de downloads: <text:a xlink:type="simple" xlink:href="https://www.oracle.com/br/database/technologies/xe-downloads.html" text:style-name="Internet_20_link" text:visited-style-name="Visited_20_Internet_20_Link">https://www.oracle.com/br/database/technologies/xe-downloads.html</text:a></text:p>
        </text:list-item>
        <text:list-item>
          <text:p text:style-name="P1">Download OL8 Linux 64 bits: <text:a xlink:type="simple" xlink:href="https://download.oracle.com/otn-pub/otn_software/db-express/oracle-database-xe-21c-1.0-1.ol8.x86_64.rpm" text:style-name="Internet_20_link" text:visited-style-name="Visited_20_Internet_20_Link">https://download.oracle.com/otn-pub/otn_software/db-express/oracle-database-xe-21c-1.0-1.ol8.x86_64.rpm</text:a></text:p>
        </text:list-item>
        <text:list-item>
          <text:p text:style-name="P1">Guia de instalação: <text:a xlink:type="simple" xlink:href="https://docs.oracle.com/en/database/oracle/oracle-database/21/xeinl/index.html" text:style-name="Internet_20_link" text:visited-style-name="Visited_20_Internet_20_Link">https://docs.oracle.com/en/database/oracle/oracle-database/21/xeinl/index.html</text:a></text:p>
        </text:list-item>
        <text:list-item>
          <text:p text:style-name="P1">Guia para usar com o Docker: <text:a xlink:type="simple" xlink:href="https://gemini.google.com/share/6171111d8146" text:style-name="Internet_20_link" text:visited-style-name="Visited_20_Internet_20_Link">https://gemini.google.com/share/6171111d8146</text:a></text:p>
        </text:list-item>
        <text:list-item>
          <text:p text:style-name="P2">Guia instalação do Docker no Linux Debian: <text:a xlink:type="simple" xlink:href="https://docs.docker.com/engine/install/debian/" text:style-name="Internet_20_link" text:visited-style-name="Visited_20_Internet_20_Link">https://docs.docker.com/engine/install/debian/</text:a></text:p>
        </text:list-item>
        <text:list-item>
          <text:p text:style-name="P3">Guia instalação do Docker desktop no Linux: <text:a xlink:type="simple" xlink:href="https://docs.docker.com/desktop/setup/install/linux/" text:style-name="Internet_20_link" text:visited-style-name="Visited_20_Internet_20_Link">https://docs.docker.com/desktop/setup/install/linux/</text:a> <text:span text:style-name="T1">e </text:span><text:a xlink:type="simple" xlink:href="https://docs.docker.com/desktop/setup/install/linux/debian/" text:style-name="Internet_20_link" text:visited-style-name="Visited_20_Internet_20_Link"><text:span text:style-name="T1">https://docs.docker.com/desktop/setup/install/linux/debian/</text:span></text:a></text:p>
        </text:list-item>
        <text:list-item>
          <text:p text:style-name="P4">Guia de verificação de pré-requisitos: <text:a xlink:type="simple" xlink:href="https://docs.docker.com/desktop/setup/install/linux/#general-system-requirements" text:style-name="Internet_20_link" text:visited-style-name="Visited_20_Internet_20_Link">https://docs.docker.com/desktop/setup/install/linux/#general-system-requirements</text:a></text:p>
        </text:list-item>
        <text:list-item>
          <text:p text:style-name="P5">Verificando o suporte a virtualização: <text:a xlink:type="simple" xlink:href="https://docs.docker.com/desktop/setup/install/linux/#kvm-virtualization-support" text:style-name="Internet_20_link" text:visited-style-name="Visited_20_Internet_20_Link">https://docs.docker.com/desktop/setup/install/linux/#kvm-virtualization-support</text:a></text:p>
        </text:list-item>
        <text:list-item>
          <text:p text:style-name="P5"><text:a xlink:type="simple" xlink:href="https://docs.docker.com/desktop/troubleshoot-and-support/faqs/linuxfaqs/#how-do-i-use-docker-sdks-with-docker-desktop-for-linux" text:style-name="Internet_20_link" text:visited-style-name="Visited_20_Internet_20_Link">How do I use Docker SDKs with Docker Desktop for Linux?</text:a> <text:a xlink:type="simple" xlink:href="https://docs.docker.com/desktop/troubleshoot-and-support/faqs/linuxfaqs/#how-do-i-use-docker-sdks-with-docker-desktop-for-linux" text:style-name="Internet_20_link" text:visited-style-name="Visited_20_Internet_20_Link">https://docs.docker.com/desktop/troubleshoot-and-support/faqs/linuxfaqs/#how-do-i-use-docker-sdks-with-docker-desktop-for-linux</text:a></text:p>
        </text:list-item>
        <text:list-item>
          <text:p text:style-name="P5">Install Docker Desktop on Debian: <text:a xlink:type="simple" xlink:href="https://docs.docker.com/desktop/setup/install/linux/debian/" text:style-name="Internet_20_link" text:visited-style-name="Visited_20_Internet_20_Link">https://docs.docker.com/desktop/setup/install/linux/debian/</text:a></text:p>
        </text:list-item>
        <text:list-item>
          <text:p text:style-name="P5">Install Docker Engine on Debian: https://docs.docker.com/engine/install/debian/#install-using-the-repository</text:p>
        </text:list-item>
      </text:list>
      <text:h text:style-name="Heading_20_1" text:outline-level="1">PROCEDIMENTOS</text:h>
      <text:p text:style-name="P6">Não existe suporte da Oracle para o uso do Oracle com o Debian.</text:p>
      <text:p text:style-name="P7">A Oracle homologa suas versões de Linux apenas para distribuições baseadas em pacotes RPM (como Red Hat Enterprise Linux, Oracle Linux e CentOS).</text:p>
      <text:p text:style-name="P8">Como contornar:</text:p>
      <text:list text:style-name="List_20_1">
        <text:list-item>
          <text:p text:style-name="P9">Ambiente de Produção/Profissional: Não arrisque. Vá de Oracle Linux ou Red Hat.</text:p>
        </text:list-item>
        <text:list-item>
          <text:p text:style-name="P9">Ambiente de Desenvolvimento no Debian: Use Docker. Poupa dor de cabeça com caminhos de arquivos, links simbólicos quebrados e bibliotecas incompatíveis.</text:p>
        </text:list-item>
      </text:list>
      <text:h text:style-name="Heading_20_2" text:outline-level="2">PASSOS NA INSTALAÇÃO DO DOCKER</text:h>
      <text:list text:style-name="L2">
        <text:list-item>
          <text:p text:style-name="P10">O MAIS IMPORTANTE DE TUDO: siga a documentação oficial do Docker. Não há atalhos e é excelente para entender os pré requisitos.</text:p>
        </text:list-item>
        <text:list-item>
          <text:p text:style-name="P10">Baixe as fontes dos pacotes a serem usados no Docker. Verifique pois há inconsistências nos arquivos que são gerados. Pode ser necessário corrigir editando arquivos manualmente.</text:p>
        </text:list-item>
        <text:list-item>
          <text:p text:style-name="P10">Verificar a instalação do KVM. KVM (Kernel-based Virtual Machine) é uma tecnologia de virtualização open source integrada nativamente ao kernel do Linux, presente desde a versão 2.6.20. <text:s/>Ela transforma o sistema operacional Linux em um hipervisor do tipo 1 (bare-metal), permitindo que um único servidor físico execute múltiplas máquinas virtuais (VMs) isoladas, cada uma com seu próprio sistema operacional convidado. (https://pt.wikipedia.org/wiki/Kernel-based_Virtual_Machine)</text:p>
        </text:list-item>
        <text:list-item>
          <text:p text:style-name="P10">É necessário instalar e configurar a execução do KVM e assegurar que o usuário tenha acesso e permissões. <text:span text:style-name="T2">Em seguida, configurar a execução automática do módulo.</text:span></text:p>
        </text:list-item>
        <text:list-item>
          <text:p text:style-name="P11">Instalar GNOME-TERMINAL para permitir acessar o Docker via terminal. Só funcionará com esse terminal. <text:span text:style-name="T3">Não é necessário instalar manualmente caso já esteja usando o GNOME.</text:span></text:p>
        </text:list-item>
        <text:list-item>
          <text:p text:style-name="P12">Instalar o Docker e realizar testes.</text:p>
        </text:list-item>
      </text:list>
      <text:h text:style-name="Heading_20_1" text:outline-level="1">INSTALANDO DOCKER</text:h>
      <text:h text:style-name="Heading_20_1" text:outline-level="1">16/06/2026</text:h>
      <text:p text:style-name="P13">Seguindo os procedimentos no Guia para usar com o Docker.</text:p>
      <text:p text:style-name="P13"/>
      <text:p text:style-name="P14">Script do guia de instalação do Docker corrigido:</text:p>
      <text:p text:style-name="P14"/>
      <text:p text:style-name="P14">sudo tee /etc/apt/sources.list.d/docker.sources &lt;&lt;EOF</text:p>
      <text:p text:style-name="P14">Types: deb</text:p>
      <text:p text:style-name="P14">URIs: https://download.docker.com/linux/debian</text:p>
      <text:p text:style-name="P14">Suites: $(/etc/os-release &amp;&amp; echo "$VERSION_CODENAME")</text:p>
      <text:p text:style-name="P14">Components: stable</text:p>
      <text:p text:style-name="P14">Architectures: $(dpkg --print-architecture)</text:p>
      <text:p text:style-name="P14">Signed-By: /etc/apt/keyrings/docker.asc</text:p>
      <text:p text:style-name="P14">EOF</text:p>
      <text:p text:style-name="P14"/>
      <text:p text:style-name="P14">Executando o comando acima deu a seguinte mensagem:</text:p>
      <text:p text:style-name="P14"/>
      <text:p text:style-name="P15"><text:span text:style-name="T4">bash: /etc/os-release: Permissão negada</text:span><text:line-break/><text:line-break/></text:p>
      <text:p text:style-name="P14">Esse arquivo é um link para outro ao qual não há permissão: /etc/os-release -&gt; ../usr/lib/os-release</text:p>
      <text:p text:style-name="P16">Para resolver:</text:p>
      <text:p text:style-name="P17"><text:span text:style-name="T5">$ </text:span><text:span text:style-name="T6">sudo chmod 755 /usr/lib/os-release</text:span><text:span text:style-name="T7"><text:line-break/></text:span></text:p>
      <text:p text:style-name="P18">Erros: </text:p>
      <text:p text:style-name="P19"><text:span text:style-name="T4">$ sudo apt update </text:span><text:line-break/><text:span text:style-name="T8">Erro: </text:span><text:span text:style-name="T9">Entrada malformada 1 no arquivo list /etc/apt/sources.list.d/docker.list (Component)</text:span><text:span text:style-name="T4"> </text:span><text:line-break/><text:span text:style-name="T8">Erro: </text:span><text:span text:style-name="T9">Entrada malformada 1 no arquivo sources /etc/apt/sources.list.d/docker.sources (Suite)</text:span><text:span text:style-name="T4"> </text:span><text:line-break/><text:span text:style-name="T8">Erro: </text:span><text:span text:style-name="T9">A lista de fontes não pode ser lida.</text:span><text:line-break/></text:p>
      <text:h text:style-name="P20" text:outline-level="1">17/06/2026</text:h>
      <text:h text:style-name="Heading_20_2" text:outline-level="2">MIGRANDO PARA INSTALAÇÃO DO DESKTOP DO DOCKER</text:h>
      <text:p text:style-name="P21">Dado que os scripts não funcionaram corretamente e que o principal objetivo é rodar o ORACLE, testando a instalação via desktop, promete ser mais fácil.</text:p>
      <text:p text:style-name="P21"/>
      <text:p text:style-name="P22">Necessário verificar os pré-requisitos e suporte a virtualização.</text:p>
      <text:p text:style-name="P23">Verificando se o kvm está instalado:</text:p>
      <text:p text:style-name="P23"><text:tab/>$ lsmod | grep kvm</text:p>
      <text:p text:style-name="P23"/>
      <text:p text:style-name="P23">Para inicializar o kvm – que é requisito – deve usar o comando:</text:p>
      <text:p text:style-name="P23"><text:tab/>$ sudo modprobe kvm</text:p>
      <text:p text:style-name="P23">Não funcionará sem o “sudo”. Se em outros comandos der ‘Comando não encontrado’, como nesse caso, experimentar usar ‘sudo’.</text:p>
      <text:p text:style-name="P23">Na sequência, deve se verificar se o módulo está carregado e executando com</text:p>
      <text:p text:style-name="P23"><text:tab/>$ lsmod | grep kmv</text:p>
      <text:p text:style-name="P23">Deve dar a seguinte saída:</text:p>
      <text:p text:style-name="Preformatted_20_Text">lsmod | grep kvm</text:p>
      <text:p text:style-name="Preformatted_20_Text">kvm_amd <text:s text:c="14"/>167936 <text:s/>0</text:p>
      <text:p text:style-name="Preformatted_20_Text">ccp <text:s text:c="18"/>126976 <text:s/>1 kvm_amd</text:p>
      <text:p text:style-name="Preformatted_20_Text">kvm <text:s text:c="17"/>1089536 <text:s/>1 kvm_amd</text:p>
      <text:p text:style-name="Preformatted_20_Text">irqbypass <text:s text:c="13"/>16384 <text:s/>1 kvm</text:p>
      <text:p text:style-name="Text_20_body"/>
      <text:p text:style-name="P24">Definir permissões nos dispositivos</text:p>
      <text:p text:style-name="P24">ls -al /dev/kvm</text:p>
      <text:p text:style-name="P24"/>
      <text:p text:style-name="P24">É necessário adicionar o usuário atual no grupo do kvm para poder acessar os dispositivos:</text:p>
      <text:p text:style-name="P24">sudo usermod -aG kvm $USER</text:p>
      <text:p text:style-name="P25">Os usuários ficam arquivados em /etc/group</text:p>
      <text:p text:style-name="P25"/>
      <text:h text:style-name="Heading_20_1" text:outline-level="1">18/06/2026</text:h>
      <text:h text:style-name="Heading_20_2" text:outline-level="2">CONFIGURAÇÃO DA VARIÁVEL DOCKER_HOST</text:h>
      <text:p text:style-name="P26">Exportado via comando e gravado no .bashrc:</text:p>
      <text:p text:style-name="P26">export DOCKER_HOST=unix://$HOME/.docker/desktop/docker.sock</text:p>
      <text:p text:style-name="P26"/>
      <text:h text:style-name="Heading_20_2" text:outline-level="2">INSTALL DOCKER DESKTOP ON DEBIAN</text:h>
      <text:p text:style-name="P27">Deve ser instalado o terminal do Gnome pois é necessário para acessar o Docker via terminais:</text:p>
      <text:p text:style-name="P27"/>
      <text:p text:style-name="P27">sudo apt install gnome-terminal</text:p>
      <text:p text:style-name="P27"/>
      <text:p text:style-name="P27">Antes de instalar o desktop, é necessário configurar os repositórios.</text:p>
      <text:p text:style-name="P27">COMANDO PARA INSTALAR O CLIENT:</text:p>
      <text:p text:style-name="P27">sudo apt install docker-ce docker-ce-cli containerd.io docker-buildx-plugin docker-compose-plugin</text:p>
      <text:p text:style-name="P27"/>
      <text:p text:style-name="P28">VERIFICANDO SE DOCKER ESTÁ EXECUTANDO</text:p>
      <text:p text:style-name="P28">sudo apt install docker-ce docker-ce-cli containerd.io docker-buildx-plugin docker-compose-plugin</text:p>
      <text:p text:style-name="P28"/>
      <text:p text:style-name="P28">INICIANDO DOCKER</text:p>
      <text:p text:style-name="P28">sudo systemctl start docker</text:p>
      <text:p text:style-name="P28"/>
      <text:p text:style-name="P28">TESTANDO SUCESSO E EXECUÇÃO CORRETA DA INSTALAÇÃO]</text:p>
      <text:p text:style-name="P28">sudo docker run hello-world</text:p>
      <text:h text:style-name="Heading_20_1" text:outline-level="1">21/06/2026</text:h>
      <text:h text:style-name="Heading_20_2" text:outline-level="2">INSTALAÇÃO DO ORACLE VIA DOCKER NO DEBIAN</text:h>
      <text:p text:style-name="P29">Passo 1 – baixar a imagem oficial:</text:p>
      <text:p text:style-name="P29"><text:tab/>$ docker pull container-registry.oracle.com/database/free:latest</text:p>
      <text:h text:style-name="Heading_20_2" text:outline-level="2">PROBLEMA COM EXECUÇÃO DO DOCKER</text:h>
      <text:p text:style-name="P30">Não existe o docker.sock, recebendo a mensagem abaixo ao tentar baixar imagens ou verificar a execução com docker ps:</text:p>
      <text:p text:style-name="P31"><text:span text:style-name="T4">/home/vlad/.docker/desktop/docker.sock</text:span><text:line-break/></text:p>
      <text:p text:style-name="P32">Mensagem de erro completa:</text:p>
      <text:p text:style-name="P33"><text:span text:style-name="T4">Failed to connect to the docker API at unix:///home/vlad/.docker/desktop/docker.sock; check if the path is correct and if the daemon is runn</text:span><text:line-break/>ing: dial unix /home/vlad/.docker/desktop/docker.sock: connect: no such file or directory<text:line-break/><text:line-break/></text:p>
      <text:h text:style-name="Heading_20_3" text:outline-level="3">CAUSA</text:h>
      <text:p text:style-name="P34">Foi seguida a instalação do Docker Desktop, o que não é o caso. Durante a instalação é adicionado o caminho:</text:p>
      <text:p text:style-name="P34"><text:s text:c="3"/>DOCKER_HOST=unix://$HOME/.docker/desktop/docker.sock</text:p>
      <text:p text:style-name="P34"/>
      <text:p text:style-name="P34">no arquivo ~/.bashrc.</text:p>
      <text:h text:style-name="Heading_20_3" text:outline-level="3">CORREÇÕES APLICADAS</text:h>
      <text:p text:style-name="P34">Comentada a configuração DOCKER_HOST no arquivo ~/.bashrc</text:p>
      <text:p text:style-name="P34">Aplicada novamente permissões do usuário: sudo usermod -aG docker $USER</text:p>
      <text:p text:style-name="P34">Aplicada configuração de grupo: newgrp docker</text:p>
      <text:p text:style-name="P34">Foi necessário reiniciar o Docker.</text:p>
      <text:h text:style-name="Heading_20_1" text:outline-level="1">13/07/2026</text:h>
      <text:h text:style-name="Heading_20_2" text:outline-level="2">INSTALAÇÃO</text:h>
      <text:p text:style-name="P35">Baixada imagem do docker com sucesso.</text:p>
      <text:h text:style-name="Heading_20_2" text:outline-level="2">Passo 3: Criar um Volume para Persistência de Dados <text:span text:style-name="T10">(Sucesso)</text:span></text:h>
      <text:p text:style-name="Text_20_body">docker volume create oracle_data</text:p>
      <text:h text:style-name="Heading_20_2" text:outline-level="2">Passo 4: Executar o Container do Oracle <text:span text:style-name="T10">(Sucesso)</text:span></text:h>
      <text:p text:style-name="Text_20_body">docker run -d --name oracle-db \</text:p>
      <text:p text:style-name="Text_20_body"><text:s text:c="2"/>-p 1521:1521 \</text:p>
      <text:p text:style-name="Text_20_body"><text:s text:c="2"/>-v oracle_data:/opt/oracle/oradata \</text:p>
      <text:p text:style-name="Text_20_body"><text:s text:c="2"/>-e ORACLE_PWD=<text:span text:style-name="T10">DebOrcl-321</text:span> \</text:p>
      <text:p text:style-name="Text_20_body"><text:s text:c="2"/>container-registry.oracle.com/database/free:latest</text:p>
      <text:p text:style-name="Text_20_body"/>
      <text:h text:style-name="P36" text:outline-level="2">Passo 5: Acompanhar a inicialização <text:span text:style-name="T10">(</text:span><text:span text:style-name="T11">Sucesso</text:span><text:span text:style-name="T10">)</text:span></text:h>
      <text:p text:style-name="P37">O banco de dados Oracle leva de 2 a 5 minutos para criar a estrutura interna na primeira inicialização. Você pode acompanhar o progresso com o comando:</text:p>
      <text:p text:style-name="Text_20_body">docker logs -f oracle-db</text:p>
      <text:p text:style-name="Text_20_body">Quando aparecer a mensagem DATABASE IS READY TO USE!, o banco estará totalmente operacional. Pressione Ctrl + C para sair dos logs.</text:p>
      <text:p text:style-name="Text_20_body"/>
      <text:h text:style-name="Heading_20_2" text:outline-level="2">Passo 6: Como se conectar ao banco <text:span text:style-name="T11">(...)</text:span></text:h>
      <text:p text:style-name="Text_20_body">1. Acessando via linha de comando (dentro do próprio container):</text:p>
      <text:p text:style-name="Text_20_body">Se quiser abrir o utilitário SQLcl ou SQL*Plus diretamente de dentro do container para testar, rode: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Vladimir Rech</meta:initial-creator>
    <meta:creation-date>2026-06-16T19:51:16.560922293</meta:creation-date>
    <dc:date>2026-07-13T20:54:14.856741196</dc:date>
    <dc:creator>Vladimir Rech</dc:creator>
    <meta:editing-duration>P3DT23H36M32S</meta:editing-duration>
    <meta:editing-cycles>25</meta:editing-cycles>
    <meta:generator>LibreOffice/25.2.3.2$Linux_X86_64 LibreOffice_project/520$Build-2</meta:generator>
    <meta:document-statistic meta:table-count="0" meta:image-count="0" meta:object-count="0" meta:page-count="1" meta:paragraph-count="119" meta:word-count="981" meta:character-count="7579" meta:non-whitespace-character-count="6642"/>
  </office:meta>
</office:document-meta>
</file>