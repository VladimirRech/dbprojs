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71cm"/>
    </style:style>
    <style:style style:name="co2" style:family="table-column">
      <style:table-column-properties fo:break-before="auto" style:column-width="1.723cm"/>
    </style:style>
    <style:style style:name="co3" style:family="table-column">
      <style:table-column-properties fo:break-before="auto" style:column-width="2.404cm"/>
    </style:style>
    <style:style style:name="co4" style:family="table-column">
      <style:table-column-properties fo:break-before="auto" style:column-width="4.965cm"/>
    </style:style>
    <style:style style:name="co5" style:family="table-column">
      <style:table-column-properties fo:break-before="auto" style:column-width="3.168cm"/>
    </style:style>
    <style:style style:name="co6" style:family="table-column">
      <style:table-column-properties fo:break-before="auto" style:column-width="3.113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enso_2022_paraná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UF</text:p>
          </table:table-cell>
          <table:table-cell office:value-type="string" calcext:value-type="string">
            <text:p>COD_UF</text:p>
          </table:table-cell>
          <table:table-cell office:value-type="string" calcext:value-type="string">
            <text:p>COD_MUNI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OP_COLETADA</text:p>
          </table:table-cell>
          <table:table-cell office:value-type="string" calcext:value-type="string">
            <text:p>POP_IMPUTADA</text:p>
          </table:table-cell>
          <table:table-cell office:value-type="string" calcext:value-type="string">
            <text:p>POP_TOTAL</text:p>
          </table:table-cell>
          <table:table-cell office:value-type="string" calcext:value-type="string">
            <text:p>SQL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Abatiá</text:p>
          </table:table-cell>
          <table:table-cell office:value-type="float" office:value="7202" calcext:value-type="float">
            <text:p>7202</text:p>
          </table:table-cell>
          <table:table-cell office:value-type="float" office:value="39" calcext:value-type="float">
            <text:p>39</text:p>
          </table:table-cell>
          <table:table-cell office:value-type="float" office:value="7241" calcext:value-type="float">
            <text:p>7241</text:p>
          </table:table-cell>
          <table:table-cell table:formula="of:=CONCATENATE(&quot;insert into IBGE_MUNICIPIOS (UF, COD_UF, CODIGO_MUNICIPIO, NOME_MUNICIPIO, POP_COLETADA, POP_IMPUTADA, POP_TOTAL) values ('&quot;; [.A2]; &quot;', '&quot;; [.B2]; &quot;', '&quot;; [.C2]; &quot;', '&quot;; [.D2]; &quot;',&quot;; [.E2]; &quot;, &quot;; [.F2]; &quot;, &quot;; [.G2]; &quot;);&quot;)" office:value-type="string" office:string-value="insert into IBGE_MUNICIPIOS (UF, COD_UF, CODIGO_MUNICIPIO, NOME_MUNICIPIO, POP_COLETADA, POP_IMPUTADA, POP_TOTAL) values ('PR', '41', '103', 'Abatiá',7202, 39, 7241);" calcext:value-type="string">
            <text:p>insert into IBGE_MUNICIPIOS (UF, COD_UF, CODIGO_MUNICIPIO, NOME_MUNICIPIO, POP_COLETADA, POP_IMPUTADA, POP_TOTAL) values ('PR', '41', '103', 'Abatiá',7202, 39, 7241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Adrianópolis</text:p>
          </table:table-cell>
          <table:table-cell office:value-type="float" office:value="6192" calcext:value-type="float">
            <text:p>6192</text:p>
          </table:table-cell>
          <table:table-cell office:value-type="float" office:value="64" calcext:value-type="float">
            <text:p>64</text:p>
          </table:table-cell>
          <table:table-cell office:value-type="float" office:value="6256" calcext:value-type="float">
            <text:p>6256</text:p>
          </table:table-cell>
          <table:table-cell table:formula="of:=CONCATENATE(&quot;insert into IBGE_MUNICIPIOS (UF, COD_UF, CODIGO_MUNICIPIO, NOME_MUNICIPIO, POP_COLETADA, POP_IMPUTADA, POP_TOTAL) values ('&quot;; [.A3]; &quot;', '&quot;; [.B3]; &quot;', '&quot;; [.C3]; &quot;', '&quot;; [.D3]; &quot;',&quot;; [.E3]; &quot;, &quot;; [.F3]; &quot;, &quot;; [.G3]; &quot;);&quot;)" office:value-type="string" office:string-value="insert into IBGE_MUNICIPIOS (UF, COD_UF, CODIGO_MUNICIPIO, NOME_MUNICIPIO, POP_COLETADA, POP_IMPUTADA, POP_TOTAL) values ('PR', '41', '202', 'Adrianópolis',6192, 64, 6256);" calcext:value-type="string">
            <text:p>insert into IBGE_MUNICIPIOS (UF, COD_UF, CODIGO_MUNICIPIO, NOME_MUNICIPIO, POP_COLETADA, POP_IMPUTADA, POP_TOTAL) values ('PR', '41', '202', 'Adrianópolis',6192, 64, 6256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Agudos do Sul</text:p>
          </table:table-cell>
          <table:table-cell office:value-type="float" office:value="10215" calcext:value-type="float">
            <text:p>10215</text:p>
          </table:table-cell>
          <table:table-cell office:value-type="float" office:value="18" calcext:value-type="float">
            <text:p>18</text:p>
          </table:table-cell>
          <table:table-cell office:value-type="float" office:value="10233" calcext:value-type="float">
            <text:p>10233</text:p>
          </table:table-cell>
          <table:table-cell table:formula="of:=CONCATENATE(&quot;insert into IBGE_MUNICIPIOS (UF, COD_UF, CODIGO_MUNICIPIO, NOME_MUNICIPIO, POP_COLETADA, POP_IMPUTADA, POP_TOTAL) values ('&quot;; [.A4]; &quot;', '&quot;; [.B4]; &quot;', '&quot;; [.C4]; &quot;', '&quot;; [.D4]; &quot;',&quot;; [.E4]; &quot;, &quot;; [.F4]; &quot;, &quot;; [.G4]; &quot;);&quot;)" office:value-type="string" office:string-value="insert into IBGE_MUNICIPIOS (UF, COD_UF, CODIGO_MUNICIPIO, NOME_MUNICIPIO, POP_COLETADA, POP_IMPUTADA, POP_TOTAL) values ('PR', '41', '301', 'Agudos do Sul',10215, 18, 10233);" calcext:value-type="string">
            <text:p>insert into IBGE_MUNICIPIOS (UF, COD_UF, CODIGO_MUNICIPIO, NOME_MUNICIPIO, POP_COLETADA, POP_IMPUTADA, POP_TOTAL) values ('PR', '41', '301', 'Agudos do Sul',10215, 18, 10233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Almirante Tamandaré</text:p>
          </table:table-cell>
          <table:table-cell office:value-type="float" office:value="112683" calcext:value-type="float">
            <text:p>112683</text:p>
          </table:table-cell>
          <table:table-cell office:value-type="float" office:value="7142" calcext:value-type="float">
            <text:p>7142</text:p>
          </table:table-cell>
          <table:table-cell office:value-type="float" office:value="119825" calcext:value-type="float">
            <text:p>119825</text:p>
          </table:table-cell>
          <table:table-cell table:formula="of:=CONCATENATE(&quot;insert into IBGE_MUNICIPIOS (UF, COD_UF, CODIGO_MUNICIPIO, NOME_MUNICIPIO, POP_COLETADA, POP_IMPUTADA, POP_TOTAL) values ('&quot;; [.A5]; &quot;', '&quot;; [.B5]; &quot;', '&quot;; [.C5]; &quot;', '&quot;; [.D5]; &quot;',&quot;; [.E5]; &quot;, &quot;; [.F5]; &quot;, &quot;; [.G5]; &quot;);&quot;)" office:value-type="string" office:string-value="insert into IBGE_MUNICIPIOS (UF, COD_UF, CODIGO_MUNICIPIO, NOME_MUNICIPIO, POP_COLETADA, POP_IMPUTADA, POP_TOTAL) values ('PR', '41', '400', 'Almirante Tamandaré',112683, 7142, 119825);" calcext:value-type="string">
            <text:p>insert into IBGE_MUNICIPIOS (UF, COD_UF, CODIGO_MUNICIPIO, NOME_MUNICIPIO, POP_COLETADA, POP_IMPUTADA, POP_TOTAL) values ('PR', '41', '400', 'Almirante Tamandaré',112683, 7142, 119825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Altamira do Paraná</text:p>
          </table:table-cell>
          <table:table-cell office:value-type="float" office:value="3510" calcext:value-type="float">
            <text:p>3510</text:p>
          </table:table-cell>
          <table:table-cell office:value-type="float" office:value="80" calcext:value-type="float">
            <text:p>80</text:p>
          </table:table-cell>
          <table:table-cell office:value-type="float" office:value="3590" calcext:value-type="float">
            <text:p>3590</text:p>
          </table:table-cell>
          <table:table-cell table:formula="of:=CONCATENATE(&quot;insert into IBGE_MUNICIPIOS (UF, COD_UF, CODIGO_MUNICIPIO, NOME_MUNICIPIO, POP_COLETADA, POP_IMPUTADA, POP_TOTAL) values ('&quot;; [.A6]; &quot;', '&quot;; [.B6]; &quot;', '&quot;; [.C6]; &quot;', '&quot;; [.D6]; &quot;',&quot;; [.E6]; &quot;, &quot;; [.F6]; &quot;, &quot;; [.G6]; &quot;);&quot;)" office:value-type="string" office:string-value="insert into IBGE_MUNICIPIOS (UF, COD_UF, CODIGO_MUNICIPIO, NOME_MUNICIPIO, POP_COLETADA, POP_IMPUTADA, POP_TOTAL) values ('PR', '41', '459', 'Altamira do Paraná',3510, 80, 3590);" calcext:value-type="string">
            <text:p>insert into IBGE_MUNICIPIOS (UF, COD_UF, CODIGO_MUNICIPIO, NOME_MUNICIPIO, POP_COLETADA, POP_IMPUTADA, POP_TOTAL) values ('PR', '41', '459', 'Altamira do Paraná',3510, 80, 3590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Altônia</text:p>
          </table:table-cell>
          <table:table-cell office:value-type="float" office:value="18656" calcext:value-type="float">
            <text:p>18656</text:p>
          </table:table-cell>
          <table:table-cell office:value-type="float" office:value="86" calcext:value-type="float">
            <text:p>86</text:p>
          </table:table-cell>
          <table:table-cell office:value-type="float" office:value="18742" calcext:value-type="float">
            <text:p>18742</text:p>
          </table:table-cell>
          <table:table-cell table:formula="of:=CONCATENATE(&quot;insert into IBGE_MUNICIPIOS (UF, COD_UF, CODIGO_MUNICIPIO, NOME_MUNICIPIO, POP_COLETADA, POP_IMPUTADA, POP_TOTAL) values ('&quot;; [.A7]; &quot;', '&quot;; [.B7]; &quot;', '&quot;; [.C7]; &quot;', '&quot;; [.D7]; &quot;',&quot;; [.E7]; &quot;, &quot;; [.F7]; &quot;, &quot;; [.G7]; &quot;);&quot;)" office:value-type="string" office:string-value="insert into IBGE_MUNICIPIOS (UF, COD_UF, CODIGO_MUNICIPIO, NOME_MUNICIPIO, POP_COLETADA, POP_IMPUTADA, POP_TOTAL) values ('PR', '41', '509', 'Altônia',18656, 86, 18742);" calcext:value-type="string">
            <text:p>insert into IBGE_MUNICIPIOS (UF, COD_UF, CODIGO_MUNICIPIO, NOME_MUNICIPIO, POP_COLETADA, POP_IMPUTADA, POP_TOTAL) values ('PR', '41', '509', 'Altônia',18656, 86, 18742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Alto Paraná</text:p>
          </table:table-cell>
          <table:table-cell office:value-type="float" office:value="13483" calcext:value-type="float">
            <text:p>13483</text:p>
          </table:table-cell>
          <table:table-cell office:value-type="float" office:value="426" calcext:value-type="float">
            <text:p>426</text:p>
          </table:table-cell>
          <table:table-cell office:value-type="float" office:value="13909" calcext:value-type="float">
            <text:p>13909</text:p>
          </table:table-cell>
          <table:table-cell table:formula="of:=CONCATENATE(&quot;insert into IBGE_MUNICIPIOS (UF, COD_UF, CODIGO_MUNICIPIO, NOME_MUNICIPIO, POP_COLETADA, POP_IMPUTADA, POP_TOTAL) values ('&quot;; [.A8]; &quot;', '&quot;; [.B8]; &quot;', '&quot;; [.C8]; &quot;', '&quot;; [.D8]; &quot;',&quot;; [.E8]; &quot;, &quot;; [.F8]; &quot;, &quot;; [.G8]; &quot;);&quot;)" office:value-type="string" office:string-value="insert into IBGE_MUNICIPIOS (UF, COD_UF, CODIGO_MUNICIPIO, NOME_MUNICIPIO, POP_COLETADA, POP_IMPUTADA, POP_TOTAL) values ('PR', '41', '608', 'Alto Paraná',13483, 426, 13909);" calcext:value-type="string">
            <text:p>insert into IBGE_MUNICIPIOS (UF, COD_UF, CODIGO_MUNICIPIO, NOME_MUNICIPIO, POP_COLETADA, POP_IMPUTADA, POP_TOTAL) values ('PR', '41', '608', 'Alto Paraná',13483, 426, 13909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707" calcext:value-type="float">
            <text:p>707</text:p>
          </table:table-cell>
          <table:table-cell office:value-type="string" calcext:value-type="string">
            <text:p>Alto Piquiri</text:p>
          </table:table-cell>
          <table:table-cell office:value-type="float" office:value="9656" calcext:value-type="float">
            <text:p>9656</text:p>
          </table:table-cell>
          <table:table-cell office:value-type="float" office:value="71" calcext:value-type="float">
            <text:p>71</text:p>
          </table:table-cell>
          <table:table-cell office:value-type="float" office:value="9727" calcext:value-type="float">
            <text:p>9727</text:p>
          </table:table-cell>
          <table:table-cell table:formula="of:=CONCATENATE(&quot;insert into IBGE_MUNICIPIOS (UF, COD_UF, CODIGO_MUNICIPIO, NOME_MUNICIPIO, POP_COLETADA, POP_IMPUTADA, POP_TOTAL) values ('&quot;; [.A9]; &quot;', '&quot;; [.B9]; &quot;', '&quot;; [.C9]; &quot;', '&quot;; [.D9]; &quot;',&quot;; [.E9]; &quot;, &quot;; [.F9]; &quot;, &quot;; [.G9]; &quot;);&quot;)" office:value-type="string" office:string-value="insert into IBGE_MUNICIPIOS (UF, COD_UF, CODIGO_MUNICIPIO, NOME_MUNICIPIO, POP_COLETADA, POP_IMPUTADA, POP_TOTAL) values ('PR', '41', '707', 'Alto Piquiri',9656, 71, 9727);" calcext:value-type="string">
            <text:p>insert into IBGE_MUNICIPIOS (UF, COD_UF, CODIGO_MUNICIPIO, NOME_MUNICIPIO, POP_COLETADA, POP_IMPUTADA, POP_TOTAL) values ('PR', '41', '707', 'Alto Piquiri',9656, 71, 9727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806" calcext:value-type="float">
            <text:p>806</text:p>
          </table:table-cell>
          <table:table-cell office:value-type="string" calcext:value-type="string">
            <text:p>Alvorada do Sul</text:p>
          </table:table-cell>
          <table:table-cell office:value-type="float" office:value="10315" calcext:value-type="float">
            <text:p>10315</text:p>
          </table:table-cell>
          <table:table-cell office:value-type="float" office:value="11" calcext:value-type="float">
            <text:p>11</text:p>
          </table:table-cell>
          <table:table-cell office:value-type="float" office:value="10326" calcext:value-type="float">
            <text:p>10326</text:p>
          </table:table-cell>
          <table:table-cell table:formula="of:=CONCATENATE(&quot;insert into IBGE_MUNICIPIOS (UF, COD_UF, CODIGO_MUNICIPIO, NOME_MUNICIPIO, POP_COLETADA, POP_IMPUTADA, POP_TOTAL) values ('&quot;; [.A10]; &quot;', '&quot;; [.B10]; &quot;', '&quot;; [.C10]; &quot;', '&quot;; [.D10]; &quot;',&quot;; [.E10]; &quot;, &quot;; [.F10]; &quot;, &quot;; [.G10]; &quot;);&quot;)" office:value-type="string" office:string-value="insert into IBGE_MUNICIPIOS (UF, COD_UF, CODIGO_MUNICIPIO, NOME_MUNICIPIO, POP_COLETADA, POP_IMPUTADA, POP_TOTAL) values ('PR', '41', '806', 'Alvorada do Sul',10315, 11, 10326);" calcext:value-type="string">
            <text:p>insert into IBGE_MUNICIPIOS (UF, COD_UF, CODIGO_MUNICIPIO, NOME_MUNICIPIO, POP_COLETADA, POP_IMPUTADA, POP_TOTAL) values ('PR', '41', '806', 'Alvorada do Sul',10315, 11, 10326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905" calcext:value-type="float">
            <text:p>905</text:p>
          </table:table-cell>
          <table:table-cell office:value-type="string" calcext:value-type="string">
            <text:p>Amaporã</text:p>
          </table:table-cell>
          <table:table-cell office:value-type="float" office:value="4740" calcext:value-type="float">
            <text:p>4740</text:p>
          </table:table-cell>
          <table:table-cell office:value-type="float" office:value="22" calcext:value-type="float">
            <text:p>22</text:p>
          </table:table-cell>
          <table:table-cell office:value-type="float" office:value="4762" calcext:value-type="float">
            <text:p>4762</text:p>
          </table:table-cell>
          <table:table-cell table:formula="of:=CONCATENATE(&quot;insert into IBGE_MUNICIPIOS (UF, COD_UF, CODIGO_MUNICIPIO, NOME_MUNICIPIO, POP_COLETADA, POP_IMPUTADA, POP_TOTAL) values ('&quot;; [.A11]; &quot;', '&quot;; [.B11]; &quot;', '&quot;; [.C11]; &quot;', '&quot;; [.D11]; &quot;',&quot;; [.E11]; &quot;, &quot;; [.F11]; &quot;, &quot;; [.G11]; &quot;);&quot;)" office:value-type="string" office:string-value="insert into IBGE_MUNICIPIOS (UF, COD_UF, CODIGO_MUNICIPIO, NOME_MUNICIPIO, POP_COLETADA, POP_IMPUTADA, POP_TOTAL) values ('PR', '41', '905', 'Amaporã',4740, 22, 4762);" calcext:value-type="string">
            <text:p>insert into IBGE_MUNICIPIOS (UF, COD_UF, CODIGO_MUNICIPIO, NOME_MUNICIPIO, POP_COLETADA, POP_IMPUTADA, POP_TOTAL) values ('PR', '41', '905', 'Amaporã',4740, 22, 4762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Ampére</text:p>
          </table:table-cell>
          <table:table-cell office:value-type="float" office:value="19594" calcext:value-type="float">
            <text:p>19594</text:p>
          </table:table-cell>
          <table:table-cell office:value-type="float" office:value="26" calcext:value-type="float">
            <text:p>26</text:p>
          </table:table-cell>
          <table:table-cell office:value-type="float" office:value="19620" calcext:value-type="float">
            <text:p>19620</text:p>
          </table:table-cell>
          <table:table-cell table:formula="of:=CONCATENATE(&quot;insert into IBGE_MUNICIPIOS (UF, COD_UF, CODIGO_MUNICIPIO, NOME_MUNICIPIO, POP_COLETADA, POP_IMPUTADA, POP_TOTAL) values ('&quot;; [.A12]; &quot;', '&quot;; [.B12]; &quot;', '&quot;; [.C12]; &quot;', '&quot;; [.D12]; &quot;',&quot;; [.E12]; &quot;, &quot;; [.F12]; &quot;, &quot;; [.G12]; &quot;);&quot;)" office:value-type="string" office:string-value="insert into IBGE_MUNICIPIOS (UF, COD_UF, CODIGO_MUNICIPIO, NOME_MUNICIPIO, POP_COLETADA, POP_IMPUTADA, POP_TOTAL) values ('PR', '41', '1002', 'Ampére',19594, 26, 19620);" calcext:value-type="string">
            <text:p>insert into IBGE_MUNICIPIOS (UF, COD_UF, CODIGO_MUNICIPIO, NOME_MUNICIPIO, POP_COLETADA, POP_IMPUTADA, POP_TOTAL) values ('PR', '41', '1002', 'Ampére',19594, 26, 19620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1051" calcext:value-type="float">
            <text:p>1051</text:p>
          </table:table-cell>
          <table:table-cell office:value-type="string" calcext:value-type="string">
            <text:p>Anahy</text:p>
          </table:table-cell>
          <table:table-cell office:value-type="float" office:value="2894" calcext:value-type="float">
            <text:p>2894</text:p>
          </table:table-cell>
          <table:table-cell office:value-type="float" office:value="24" calcext:value-type="float">
            <text:p>24</text:p>
          </table:table-cell>
          <table:table-cell office:value-type="float" office:value="2918" calcext:value-type="float">
            <text:p>2918</text:p>
          </table:table-cell>
          <table:table-cell table:formula="of:=CONCATENATE(&quot;insert into IBGE_MUNICIPIOS (UF, COD_UF, CODIGO_MUNICIPIO, NOME_MUNICIPIO, POP_COLETADA, POP_IMPUTADA, POP_TOTAL) values ('&quot;; [.A13]; &quot;', '&quot;; [.B13]; &quot;', '&quot;; [.C13]; &quot;', '&quot;; [.D13]; &quot;',&quot;; [.E13]; &quot;, &quot;; [.F13]; &quot;, &quot;; [.G13]; &quot;);&quot;)" office:value-type="string" office:string-value="insert into IBGE_MUNICIPIOS (UF, COD_UF, CODIGO_MUNICIPIO, NOME_MUNICIPIO, POP_COLETADA, POP_IMPUTADA, POP_TOTAL) values ('PR', '41', '1051', 'Anahy',2894, 24, 2918);" calcext:value-type="string">
            <text:p>insert into IBGE_MUNICIPIOS (UF, COD_UF, CODIGO_MUNICIPIO, NOME_MUNICIPIO, POP_COLETADA, POP_IMPUTADA, POP_TOTAL) values ('PR', '41', '1051', 'Anahy',2894, 24, 2918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1101" calcext:value-type="float">
            <text:p>1101</text:p>
          </table:table-cell>
          <table:table-cell office:value-type="string" calcext:value-type="string">
            <text:p>Andirá</text:p>
          </table:table-cell>
          <table:table-cell office:value-type="float" office:value="19831" calcext:value-type="float">
            <text:p>19831</text:p>
          </table:table-cell>
          <table:table-cell office:value-type="float" office:value="47" calcext:value-type="float">
            <text:p>47</text:p>
          </table:table-cell>
          <table:table-cell office:value-type="float" office:value="19878" calcext:value-type="float">
            <text:p>19878</text:p>
          </table:table-cell>
          <table:table-cell table:formula="of:=CONCATENATE(&quot;insert into IBGE_MUNICIPIOS (UF, COD_UF, CODIGO_MUNICIPIO, NOME_MUNICIPIO, POP_COLETADA, POP_IMPUTADA, POP_TOTAL) values ('&quot;; [.A14]; &quot;', '&quot;; [.B14]; &quot;', '&quot;; [.C14]; &quot;', '&quot;; [.D14]; &quot;',&quot;; [.E14]; &quot;, &quot;; [.F14]; &quot;, &quot;; [.G14]; &quot;);&quot;)" office:value-type="string" office:string-value="insert into IBGE_MUNICIPIOS (UF, COD_UF, CODIGO_MUNICIPIO, NOME_MUNICIPIO, POP_COLETADA, POP_IMPUTADA, POP_TOTAL) values ('PR', '41', '1101', 'Andirá',19831, 47, 19878);" calcext:value-type="string">
            <text:p>insert into IBGE_MUNICIPIOS (UF, COD_UF, CODIGO_MUNICIPIO, NOME_MUNICIPIO, POP_COLETADA, POP_IMPUTADA, POP_TOTAL) values ('PR', '41', '1101', 'Andirá',19831, 47, 19878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1150" calcext:value-type="float">
            <text:p>1150</text:p>
          </table:table-cell>
          <table:table-cell office:value-type="string" calcext:value-type="string">
            <text:p>Ângulo</text:p>
          </table:table-cell>
          <table:table-cell office:value-type="float" office:value="3002" calcext:value-type="float">
            <text:p>3002</text:p>
          </table:table-cell>
          <table:table-cell office:value-type="float" office:value="233" calcext:value-type="float">
            <text:p>233</text:p>
          </table:table-cell>
          <table:table-cell office:value-type="float" office:value="3235" calcext:value-type="float">
            <text:p>3235</text:p>
          </table:table-cell>
          <table:table-cell table:formula="of:=CONCATENATE(&quot;insert into IBGE_MUNICIPIOS (UF, COD_UF, CODIGO_MUNICIPIO, NOME_MUNICIPIO, POP_COLETADA, POP_IMPUTADA, POP_TOTAL) values ('&quot;; [.A15]; &quot;', '&quot;; [.B15]; &quot;', '&quot;; [.C15]; &quot;', '&quot;; [.D15]; &quot;',&quot;; [.E15]; &quot;, &quot;; [.F15]; &quot;, &quot;; [.G15]; &quot;);&quot;)" office:value-type="string" office:string-value="insert into IBGE_MUNICIPIOS (UF, COD_UF, CODIGO_MUNICIPIO, NOME_MUNICIPIO, POP_COLETADA, POP_IMPUTADA, POP_TOTAL) values ('PR', '41', '1150', 'Ângulo',3002, 233, 3235);" calcext:value-type="string">
            <text:p>insert into IBGE_MUNICIPIOS (UF, COD_UF, CODIGO_MUNICIPIO, NOME_MUNICIPIO, POP_COLETADA, POP_IMPUTADA, POP_TOTAL) values ('PR', '41', '1150', 'Ângulo',3002, 233, 3235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Antonina</text:p>
          </table:table-cell>
          <table:table-cell office:value-type="float" office:value="17566" calcext:value-type="float">
            <text:p>17566</text:p>
          </table:table-cell>
          <table:table-cell office:value-type="float" office:value="525" calcext:value-type="float">
            <text:p>525</text:p>
          </table:table-cell>
          <table:table-cell office:value-type="float" office:value="18091" calcext:value-type="float">
            <text:p>18091</text:p>
          </table:table-cell>
          <table:table-cell table:formula="of:=CONCATENATE(&quot;insert into IBGE_MUNICIPIOS (UF, COD_UF, CODIGO_MUNICIPIO, NOME_MUNICIPIO, POP_COLETADA, POP_IMPUTADA, POP_TOTAL) values ('&quot;; [.A16]; &quot;', '&quot;; [.B16]; &quot;', '&quot;; [.C16]; &quot;', '&quot;; [.D16]; &quot;',&quot;; [.E16]; &quot;, &quot;; [.F16]; &quot;, &quot;; [.G16]; &quot;);&quot;)" office:value-type="string" office:string-value="insert into IBGE_MUNICIPIOS (UF, COD_UF, CODIGO_MUNICIPIO, NOME_MUNICIPIO, POP_COLETADA, POP_IMPUTADA, POP_TOTAL) values ('PR', '41', '1200', 'Antonina',17566, 525, 18091);" calcext:value-type="string">
            <text:p>insert into IBGE_MUNICIPIOS (UF, COD_UF, CODIGO_MUNICIPIO, NOME_MUNICIPIO, POP_COLETADA, POP_IMPUTADA, POP_TOTAL) values ('PR', '41', '1200', 'Antonina',17566, 525, 18091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1309" calcext:value-type="float">
            <text:p>1309</text:p>
          </table:table-cell>
          <table:table-cell office:value-type="string" calcext:value-type="string">
            <text:p>Antônio Olinto</text:p>
          </table:table-cell>
          <table:table-cell office:value-type="float" office:value="6860" calcext:value-type="float">
            <text:p>6860</text:p>
          </table:table-cell>
          <table:table-cell office:value-type="float" office:value="158" calcext:value-type="float">
            <text:p>158</text:p>
          </table:table-cell>
          <table:table-cell office:value-type="float" office:value="7018" calcext:value-type="float">
            <text:p>7018</text:p>
          </table:table-cell>
          <table:table-cell table:formula="of:=CONCATENATE(&quot;insert into IBGE_MUNICIPIOS (UF, COD_UF, CODIGO_MUNICIPIO, NOME_MUNICIPIO, POP_COLETADA, POP_IMPUTADA, POP_TOTAL) values ('&quot;; [.A17]; &quot;', '&quot;; [.B17]; &quot;', '&quot;; [.C17]; &quot;', '&quot;; [.D17]; &quot;',&quot;; [.E17]; &quot;, &quot;; [.F17]; &quot;, &quot;; [.G17]; &quot;);&quot;)" office:value-type="string" office:string-value="insert into IBGE_MUNICIPIOS (UF, COD_UF, CODIGO_MUNICIPIO, NOME_MUNICIPIO, POP_COLETADA, POP_IMPUTADA, POP_TOTAL) values ('PR', '41', '1309', 'Antônio Olinto',6860, 158, 7018);" calcext:value-type="string">
            <text:p>insert into IBGE_MUNICIPIOS (UF, COD_UF, CODIGO_MUNICIPIO, NOME_MUNICIPIO, POP_COLETADA, POP_IMPUTADA, POP_TOTAL) values ('PR', '41', '1309', 'Antônio Olinto',6860, 158, 7018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1408" calcext:value-type="float">
            <text:p>1408</text:p>
          </table:table-cell>
          <table:table-cell office:value-type="string" calcext:value-type="string">
            <text:p>Apucarana</text:p>
          </table:table-cell>
          <table:table-cell office:value-type="float" office:value="126578" calcext:value-type="float">
            <text:p>126578</text:p>
          </table:table-cell>
          <table:table-cell office:value-type="float" office:value="3556" calcext:value-type="float">
            <text:p>3556</text:p>
          </table:table-cell>
          <table:table-cell office:value-type="float" office:value="130134" calcext:value-type="float">
            <text:p>130134</text:p>
          </table:table-cell>
          <table:table-cell table:formula="of:=CONCATENATE(&quot;insert into IBGE_MUNICIPIOS (UF, COD_UF, CODIGO_MUNICIPIO, NOME_MUNICIPIO, POP_COLETADA, POP_IMPUTADA, POP_TOTAL) values ('&quot;; [.A18]; &quot;', '&quot;; [.B18]; &quot;', '&quot;; [.C18]; &quot;', '&quot;; [.D18]; &quot;',&quot;; [.E18]; &quot;, &quot;; [.F18]; &quot;, &quot;; [.G18]; &quot;);&quot;)" office:value-type="string" office:string-value="insert into IBGE_MUNICIPIOS (UF, COD_UF, CODIGO_MUNICIPIO, NOME_MUNICIPIO, POP_COLETADA, POP_IMPUTADA, POP_TOTAL) values ('PR', '41', '1408', 'Apucarana',126578, 3556, 130134);" calcext:value-type="string">
            <text:p>insert into IBGE_MUNICIPIOS (UF, COD_UF, CODIGO_MUNICIPIO, NOME_MUNICIPIO, POP_COLETADA, POP_IMPUTADA, POP_TOTAL) values ('PR', '41', '1408', 'Apucarana',126578, 3556, 130134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1507" calcext:value-type="float">
            <text:p>1507</text:p>
          </table:table-cell>
          <table:table-cell office:value-type="string" calcext:value-type="string">
            <text:p>Arapongas</text:p>
          </table:table-cell>
          <table:table-cell office:value-type="float" office:value="117565" calcext:value-type="float">
            <text:p>117565</text:p>
          </table:table-cell>
          <table:table-cell office:value-type="float" office:value="1573" calcext:value-type="float">
            <text:p>1573</text:p>
          </table:table-cell>
          <table:table-cell office:value-type="float" office:value="119138" calcext:value-type="float">
            <text:p>119138</text:p>
          </table:table-cell>
          <table:table-cell table:formula="of:=CONCATENATE(&quot;insert into IBGE_MUNICIPIOS (UF, COD_UF, CODIGO_MUNICIPIO, NOME_MUNICIPIO, POP_COLETADA, POP_IMPUTADA, POP_TOTAL) values ('&quot;; [.A19]; &quot;', '&quot;; [.B19]; &quot;', '&quot;; [.C19]; &quot;', '&quot;; [.D19]; &quot;',&quot;; [.E19]; &quot;, &quot;; [.F19]; &quot;, &quot;; [.G19]; &quot;);&quot;)" office:value-type="string" office:string-value="insert into IBGE_MUNICIPIOS (UF, COD_UF, CODIGO_MUNICIPIO, NOME_MUNICIPIO, POP_COLETADA, POP_IMPUTADA, POP_TOTAL) values ('PR', '41', '1507', 'Arapongas',117565, 1573, 119138);" calcext:value-type="string">
            <text:p>insert into IBGE_MUNICIPIOS (UF, COD_UF, CODIGO_MUNICIPIO, NOME_MUNICIPIO, POP_COLETADA, POP_IMPUTADA, POP_TOTAL) values ('PR', '41', '1507', 'Arapongas',117565, 1573, 119138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1606" calcext:value-type="float">
            <text:p>1606</text:p>
          </table:table-cell>
          <table:table-cell office:value-type="string" calcext:value-type="string">
            <text:p>Arapoti</text:p>
          </table:table-cell>
          <table:table-cell office:value-type="float" office:value="25589" calcext:value-type="float">
            <text:p>25589</text:p>
          </table:table-cell>
          <table:table-cell office:value-type="float" office:value="188" calcext:value-type="float">
            <text:p>188</text:p>
          </table:table-cell>
          <table:table-cell office:value-type="float" office:value="25777" calcext:value-type="float">
            <text:p>25777</text:p>
          </table:table-cell>
          <table:table-cell table:formula="of:=CONCATENATE(&quot;insert into IBGE_MUNICIPIOS (UF, COD_UF, CODIGO_MUNICIPIO, NOME_MUNICIPIO, POP_COLETADA, POP_IMPUTADA, POP_TOTAL) values ('&quot;; [.A20]; &quot;', '&quot;; [.B20]; &quot;', '&quot;; [.C20]; &quot;', '&quot;; [.D20]; &quot;',&quot;; [.E20]; &quot;, &quot;; [.F20]; &quot;, &quot;; [.G20]; &quot;);&quot;)" office:value-type="string" office:string-value="insert into IBGE_MUNICIPIOS (UF, COD_UF, CODIGO_MUNICIPIO, NOME_MUNICIPIO, POP_COLETADA, POP_IMPUTADA, POP_TOTAL) values ('PR', '41', '1606', 'Arapoti',25589, 188, 25777);" calcext:value-type="string">
            <text:p>insert into IBGE_MUNICIPIOS (UF, COD_UF, CODIGO_MUNICIPIO, NOME_MUNICIPIO, POP_COLETADA, POP_IMPUTADA, POP_TOTAL) values ('PR', '41', '1606', 'Arapoti',25589, 188, 25777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1655" calcext:value-type="float">
            <text:p>1655</text:p>
          </table:table-cell>
          <table:table-cell office:value-type="string" calcext:value-type="string">
            <text:p>Arapuã</text:p>
          </table:table-cell>
          <table:table-cell office:value-type="float" office:value="3515" calcext:value-type="float">
            <text:p>3515</text:p>
          </table:table-cell>
          <table:table-cell office:value-type="float" office:value="12" calcext:value-type="float">
            <text:p>12</text:p>
          </table:table-cell>
          <table:table-cell office:value-type="float" office:value="3527" calcext:value-type="float">
            <text:p>3527</text:p>
          </table:table-cell>
          <table:table-cell table:formula="of:=CONCATENATE(&quot;insert into IBGE_MUNICIPIOS (UF, COD_UF, CODIGO_MUNICIPIO, NOME_MUNICIPIO, POP_COLETADA, POP_IMPUTADA, POP_TOTAL) values ('&quot;; [.A21]; &quot;', '&quot;; [.B21]; &quot;', '&quot;; [.C21]; &quot;', '&quot;; [.D21]; &quot;',&quot;; [.E21]; &quot;, &quot;; [.F21]; &quot;, &quot;; [.G21]; &quot;);&quot;)" office:value-type="string" office:string-value="insert into IBGE_MUNICIPIOS (UF, COD_UF, CODIGO_MUNICIPIO, NOME_MUNICIPIO, POP_COLETADA, POP_IMPUTADA, POP_TOTAL) values ('PR', '41', '1655', 'Arapuã',3515, 12, 3527);" calcext:value-type="string">
            <text:p>insert into IBGE_MUNICIPIOS (UF, COD_UF, CODIGO_MUNICIPIO, NOME_MUNICIPIO, POP_COLETADA, POP_IMPUTADA, POP_TOTAL) values ('PR', '41', '1655', 'Arapuã',3515, 12, 3527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1705" calcext:value-type="float">
            <text:p>1705</text:p>
          </table:table-cell>
          <table:table-cell office:value-type="string" calcext:value-type="string">
            <text:p>Araruna</text:p>
          </table:table-cell>
          <table:table-cell office:value-type="float" office:value="13767" calcext:value-type="float">
            <text:p>13767</text:p>
          </table:table-cell>
          <table:table-cell office:value-type="float" office:value="718" calcext:value-type="float">
            <text:p>718</text:p>
          </table:table-cell>
          <table:table-cell office:value-type="float" office:value="14485" calcext:value-type="float">
            <text:p>14485</text:p>
          </table:table-cell>
          <table:table-cell table:formula="of:=CONCATENATE(&quot;insert into IBGE_MUNICIPIOS (UF, COD_UF, CODIGO_MUNICIPIO, NOME_MUNICIPIO, POP_COLETADA, POP_IMPUTADA, POP_TOTAL) values ('&quot;; [.A22]; &quot;', '&quot;; [.B22]; &quot;', '&quot;; [.C22]; &quot;', '&quot;; [.D22]; &quot;',&quot;; [.E22]; &quot;, &quot;; [.F22]; &quot;, &quot;; [.G22]; &quot;);&quot;)" office:value-type="string" office:string-value="insert into IBGE_MUNICIPIOS (UF, COD_UF, CODIGO_MUNICIPIO, NOME_MUNICIPIO, POP_COLETADA, POP_IMPUTADA, POP_TOTAL) values ('PR', '41', '1705', 'Araruna',13767, 718, 14485);" calcext:value-type="string">
            <text:p>insert into IBGE_MUNICIPIOS (UF, COD_UF, CODIGO_MUNICIPIO, NOME_MUNICIPIO, POP_COLETADA, POP_IMPUTADA, POP_TOTAL) values ('PR', '41', '1705', 'Araruna',13767, 718, 14485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1804" calcext:value-type="float">
            <text:p>1804</text:p>
          </table:table-cell>
          <table:table-cell office:value-type="string" calcext:value-type="string">
            <text:p>Araucária</text:p>
          </table:table-cell>
          <table:table-cell office:value-type="float" office:value="145610" calcext:value-type="float">
            <text:p>145610</text:p>
          </table:table-cell>
          <table:table-cell office:value-type="float" office:value="6056" calcext:value-type="float">
            <text:p>6056</text:p>
          </table:table-cell>
          <table:table-cell office:value-type="float" office:value="151666" calcext:value-type="float">
            <text:p>151666</text:p>
          </table:table-cell>
          <table:table-cell table:formula="of:=CONCATENATE(&quot;insert into IBGE_MUNICIPIOS (UF, COD_UF, CODIGO_MUNICIPIO, NOME_MUNICIPIO, POP_COLETADA, POP_IMPUTADA, POP_TOTAL) values ('&quot;; [.A23]; &quot;', '&quot;; [.B23]; &quot;', '&quot;; [.C23]; &quot;', '&quot;; [.D23]; &quot;',&quot;; [.E23]; &quot;, &quot;; [.F23]; &quot;, &quot;; [.G23]; &quot;);&quot;)" office:value-type="string" office:string-value="insert into IBGE_MUNICIPIOS (UF, COD_UF, CODIGO_MUNICIPIO, NOME_MUNICIPIO, POP_COLETADA, POP_IMPUTADA, POP_TOTAL) values ('PR', '41', '1804', 'Araucária',145610, 6056, 151666);" calcext:value-type="string">
            <text:p>insert into IBGE_MUNICIPIOS (UF, COD_UF, CODIGO_MUNICIPIO, NOME_MUNICIPIO, POP_COLETADA, POP_IMPUTADA, POP_TOTAL) values ('PR', '41', '1804', 'Araucária',145610, 6056, 151666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1853" calcext:value-type="float">
            <text:p>1853</text:p>
          </table:table-cell>
          <table:table-cell office:value-type="string" calcext:value-type="string">
            <text:p>Ariranha do Ivaí</text:p>
          </table:table-cell>
          <table:table-cell office:value-type="float" office:value="2329" calcext:value-type="float">
            <text:p>2329</text:p>
          </table:table-cell>
          <table:table-cell office:value-type="float" office:value="0" calcext:value-type="float">
            <text:p>0</text:p>
          </table:table-cell>
          <table:table-cell office:value-type="float" office:value="2329" calcext:value-type="float">
            <text:p>2329</text:p>
          </table:table-cell>
          <table:table-cell table:formula="of:=CONCATENATE(&quot;insert into IBGE_MUNICIPIOS (UF, COD_UF, CODIGO_MUNICIPIO, NOME_MUNICIPIO, POP_COLETADA, POP_IMPUTADA, POP_TOTAL) values ('&quot;; [.A24]; &quot;', '&quot;; [.B24]; &quot;', '&quot;; [.C24]; &quot;', '&quot;; [.D24]; &quot;',&quot;; [.E24]; &quot;, &quot;; [.F24]; &quot;, &quot;; [.G24]; &quot;);&quot;)" office:value-type="string" office:string-value="insert into IBGE_MUNICIPIOS (UF, COD_UF, CODIGO_MUNICIPIO, NOME_MUNICIPIO, POP_COLETADA, POP_IMPUTADA, POP_TOTAL) values ('PR', '41', '1853', 'Ariranha do Ivaí',2329, 0, 2329);" calcext:value-type="string">
            <text:p>insert into IBGE_MUNICIPIOS (UF, COD_UF, CODIGO_MUNICIPIO, NOME_MUNICIPIO, POP_COLETADA, POP_IMPUTADA, POP_TOTAL) values ('PR', '41', '1853', 'Ariranha do Ivaí',2329, 0, 2329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1903" calcext:value-type="float">
            <text:p>1903</text:p>
          </table:table-cell>
          <table:table-cell office:value-type="string" calcext:value-type="string">
            <text:p>Assaí</text:p>
          </table:table-cell>
          <table:table-cell office:value-type="float" office:value="13304" calcext:value-type="float">
            <text:p>13304</text:p>
          </table:table-cell>
          <table:table-cell office:value-type="float" office:value="493" calcext:value-type="float">
            <text:p>493</text:p>
          </table:table-cell>
          <table:table-cell office:value-type="float" office:value="13797" calcext:value-type="float">
            <text:p>13797</text:p>
          </table:table-cell>
          <table:table-cell table:formula="of:=CONCATENATE(&quot;insert into IBGE_MUNICIPIOS (UF, COD_UF, CODIGO_MUNICIPIO, NOME_MUNICIPIO, POP_COLETADA, POP_IMPUTADA, POP_TOTAL) values ('&quot;; [.A25]; &quot;', '&quot;; [.B25]; &quot;', '&quot;; [.C25]; &quot;', '&quot;; [.D25]; &quot;',&quot;; [.E25]; &quot;, &quot;; [.F25]; &quot;, &quot;; [.G25]; &quot;);&quot;)" office:value-type="string" office:string-value="insert into IBGE_MUNICIPIOS (UF, COD_UF, CODIGO_MUNICIPIO, NOME_MUNICIPIO, POP_COLETADA, POP_IMPUTADA, POP_TOTAL) values ('PR', '41', '1903', 'Assaí',13304, 493, 13797);" calcext:value-type="string">
            <text:p>insert into IBGE_MUNICIPIOS (UF, COD_UF, CODIGO_MUNICIPIO, NOME_MUNICIPIO, POP_COLETADA, POP_IMPUTADA, POP_TOTAL) values ('PR', '41', '1903', 'Assaí',13304, 493, 13797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Assis Chateaubriand</text:p>
          </table:table-cell>
          <table:table-cell office:value-type="float" office:value="35999" calcext:value-type="float">
            <text:p>35999</text:p>
          </table:table-cell>
          <table:table-cell office:value-type="float" office:value="809" calcext:value-type="float">
            <text:p>809</text:p>
          </table:table-cell>
          <table:table-cell office:value-type="float" office:value="36808" calcext:value-type="float">
            <text:p>36808</text:p>
          </table:table-cell>
          <table:table-cell table:formula="of:=CONCATENATE(&quot;insert into IBGE_MUNICIPIOS (UF, COD_UF, CODIGO_MUNICIPIO, NOME_MUNICIPIO, POP_COLETADA, POP_IMPUTADA, POP_TOTAL) values ('&quot;; [.A26]; &quot;', '&quot;; [.B26]; &quot;', '&quot;; [.C26]; &quot;', '&quot;; [.D26]; &quot;',&quot;; [.E26]; &quot;, &quot;; [.F26]; &quot;, &quot;; [.G26]; &quot;);&quot;)" office:value-type="string" office:string-value="insert into IBGE_MUNICIPIOS (UF, COD_UF, CODIGO_MUNICIPIO, NOME_MUNICIPIO, POP_COLETADA, POP_IMPUTADA, POP_TOTAL) values ('PR', '41', '2000', 'Assis Chateaubriand',35999, 809, 36808);" calcext:value-type="string">
            <text:p>insert into IBGE_MUNICIPIOS (UF, COD_UF, CODIGO_MUNICIPIO, NOME_MUNICIPIO, POP_COLETADA, POP_IMPUTADA, POP_TOTAL) values ('PR', '41', '2000', 'Assis Chateaubriand',35999, 809, 36808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2109" calcext:value-type="float">
            <text:p>2109</text:p>
          </table:table-cell>
          <table:table-cell office:value-type="string" calcext:value-type="string">
            <text:p>Astorga</text:p>
          </table:table-cell>
          <table:table-cell office:value-type="float" office:value="25010" calcext:value-type="float">
            <text:p>25010</text:p>
          </table:table-cell>
          <table:table-cell office:value-type="float" office:value="465" calcext:value-type="float">
            <text:p>465</text:p>
          </table:table-cell>
          <table:table-cell office:value-type="float" office:value="25475" calcext:value-type="float">
            <text:p>25475</text:p>
          </table:table-cell>
          <table:table-cell table:formula="of:=CONCATENATE(&quot;insert into IBGE_MUNICIPIOS (UF, COD_UF, CODIGO_MUNICIPIO, NOME_MUNICIPIO, POP_COLETADA, POP_IMPUTADA, POP_TOTAL) values ('&quot;; [.A27]; &quot;', '&quot;; [.B27]; &quot;', '&quot;; [.C27]; &quot;', '&quot;; [.D27]; &quot;',&quot;; [.E27]; &quot;, &quot;; [.F27]; &quot;, &quot;; [.G27]; &quot;);&quot;)" office:value-type="string" office:string-value="insert into IBGE_MUNICIPIOS (UF, COD_UF, CODIGO_MUNICIPIO, NOME_MUNICIPIO, POP_COLETADA, POP_IMPUTADA, POP_TOTAL) values ('PR', '41', '2109', 'Astorga',25010, 465, 25475);" calcext:value-type="string">
            <text:p>insert into IBGE_MUNICIPIOS (UF, COD_UF, CODIGO_MUNICIPIO, NOME_MUNICIPIO, POP_COLETADA, POP_IMPUTADA, POP_TOTAL) values ('PR', '41', '2109', 'Astorga',25010, 465, 25475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2208" calcext:value-type="float">
            <text:p>2208</text:p>
          </table:table-cell>
          <table:table-cell office:value-type="string" calcext:value-type="string">
            <text:p>Atalaia</text:p>
          </table:table-cell>
          <table:table-cell office:value-type="float" office:value="3972" calcext:value-type="float">
            <text:p>3972</text:p>
          </table:table-cell>
          <table:table-cell office:value-type="float" office:value="8" calcext:value-type="float">
            <text:p>8</text:p>
          </table:table-cell>
          <table:table-cell office:value-type="float" office:value="3980" calcext:value-type="float">
            <text:p>3980</text:p>
          </table:table-cell>
          <table:table-cell table:formula="of:=CONCATENATE(&quot;insert into IBGE_MUNICIPIOS (UF, COD_UF, CODIGO_MUNICIPIO, NOME_MUNICIPIO, POP_COLETADA, POP_IMPUTADA, POP_TOTAL) values ('&quot;; [.A28]; &quot;', '&quot;; [.B28]; &quot;', '&quot;; [.C28]; &quot;', '&quot;; [.D28]; &quot;',&quot;; [.E28]; &quot;, &quot;; [.F28]; &quot;, &quot;; [.G28]; &quot;);&quot;)" office:value-type="string" office:string-value="insert into IBGE_MUNICIPIOS (UF, COD_UF, CODIGO_MUNICIPIO, NOME_MUNICIPIO, POP_COLETADA, POP_IMPUTADA, POP_TOTAL) values ('PR', '41', '2208', 'Atalaia',3972, 8, 3980);" calcext:value-type="string">
            <text:p>insert into IBGE_MUNICIPIOS (UF, COD_UF, CODIGO_MUNICIPIO, NOME_MUNICIPIO, POP_COLETADA, POP_IMPUTADA, POP_TOTAL) values ('PR', '41', '2208', 'Atalaia',3972, 8, 3980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2307" calcext:value-type="float">
            <text:p>2307</text:p>
          </table:table-cell>
          <table:table-cell office:value-type="string" calcext:value-type="string">
            <text:p>Balsa Nova</text:p>
          </table:table-cell>
          <table:table-cell office:value-type="float" office:value="12813" calcext:value-type="float">
            <text:p>12813</text:p>
          </table:table-cell>
          <table:table-cell office:value-type="float" office:value="582" calcext:value-type="float">
            <text:p>582</text:p>
          </table:table-cell>
          <table:table-cell office:value-type="float" office:value="13395" calcext:value-type="float">
            <text:p>13395</text:p>
          </table:table-cell>
          <table:table-cell table:formula="of:=CONCATENATE(&quot;insert into IBGE_MUNICIPIOS (UF, COD_UF, CODIGO_MUNICIPIO, NOME_MUNICIPIO, POP_COLETADA, POP_IMPUTADA, POP_TOTAL) values ('&quot;; [.A29]; &quot;', '&quot;; [.B29]; &quot;', '&quot;; [.C29]; &quot;', '&quot;; [.D29]; &quot;',&quot;; [.E29]; &quot;, &quot;; [.F29]; &quot;, &quot;; [.G29]; &quot;);&quot;)" office:value-type="string" office:string-value="insert into IBGE_MUNICIPIOS (UF, COD_UF, CODIGO_MUNICIPIO, NOME_MUNICIPIO, POP_COLETADA, POP_IMPUTADA, POP_TOTAL) values ('PR', '41', '2307', 'Balsa Nova',12813, 582, 13395);" calcext:value-type="string">
            <text:p>insert into IBGE_MUNICIPIOS (UF, COD_UF, CODIGO_MUNICIPIO, NOME_MUNICIPIO, POP_COLETADA, POP_IMPUTADA, POP_TOTAL) values ('PR', '41', '2307', 'Balsa Nova',12813, 582, 13395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2406" calcext:value-type="float">
            <text:p>2406</text:p>
          </table:table-cell>
          <table:table-cell office:value-type="string" calcext:value-type="string">
            <text:p>Bandeirantes</text:p>
          </table:table-cell>
          <table:table-cell office:value-type="float" office:value="31102" calcext:value-type="float">
            <text:p>31102</text:p>
          </table:table-cell>
          <table:table-cell office:value-type="float" office:value="171" calcext:value-type="float">
            <text:p>171</text:p>
          </table:table-cell>
          <table:table-cell office:value-type="float" office:value="31273" calcext:value-type="float">
            <text:p>31273</text:p>
          </table:table-cell>
          <table:table-cell table:formula="of:=CONCATENATE(&quot;insert into IBGE_MUNICIPIOS (UF, COD_UF, CODIGO_MUNICIPIO, NOME_MUNICIPIO, POP_COLETADA, POP_IMPUTADA, POP_TOTAL) values ('&quot;; [.A30]; &quot;', '&quot;; [.B30]; &quot;', '&quot;; [.C30]; &quot;', '&quot;; [.D30]; &quot;',&quot;; [.E30]; &quot;, &quot;; [.F30]; &quot;, &quot;; [.G30]; &quot;);&quot;)" office:value-type="string" office:string-value="insert into IBGE_MUNICIPIOS (UF, COD_UF, CODIGO_MUNICIPIO, NOME_MUNICIPIO, POP_COLETADA, POP_IMPUTADA, POP_TOTAL) values ('PR', '41', '2406', 'Bandeirantes',31102, 171, 31273);" calcext:value-type="string">
            <text:p>insert into IBGE_MUNICIPIOS (UF, COD_UF, CODIGO_MUNICIPIO, NOME_MUNICIPIO, POP_COLETADA, POP_IMPUTADA, POP_TOTAL) values ('PR', '41', '2406', 'Bandeirantes',31102, 171, 31273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2505" calcext:value-type="float">
            <text:p>2505</text:p>
          </table:table-cell>
          <table:table-cell office:value-type="string" calcext:value-type="string">
            <text:p>Barbosa Ferraz</text:p>
          </table:table-cell>
          <table:table-cell office:value-type="float" office:value="10647" calcext:value-type="float">
            <text:p>10647</text:p>
          </table:table-cell>
          <table:table-cell office:value-type="float" office:value="148" calcext:value-type="float">
            <text:p>148</text:p>
          </table:table-cell>
          <table:table-cell office:value-type="float" office:value="10795" calcext:value-type="float">
            <text:p>10795</text:p>
          </table:table-cell>
          <table:table-cell table:formula="of:=CONCATENATE(&quot;insert into IBGE_MUNICIPIOS (UF, COD_UF, CODIGO_MUNICIPIO, NOME_MUNICIPIO, POP_COLETADA, POP_IMPUTADA, POP_TOTAL) values ('&quot;; [.A31]; &quot;', '&quot;; [.B31]; &quot;', '&quot;; [.C31]; &quot;', '&quot;; [.D31]; &quot;',&quot;; [.E31]; &quot;, &quot;; [.F31]; &quot;, &quot;; [.G31]; &quot;);&quot;)" office:value-type="string" office:string-value="insert into IBGE_MUNICIPIOS (UF, COD_UF, CODIGO_MUNICIPIO, NOME_MUNICIPIO, POP_COLETADA, POP_IMPUTADA, POP_TOTAL) values ('PR', '41', '2505', 'Barbosa Ferraz',10647, 148, 10795);" calcext:value-type="string">
            <text:p>insert into IBGE_MUNICIPIOS (UF, COD_UF, CODIGO_MUNICIPIO, NOME_MUNICIPIO, POP_COLETADA, POP_IMPUTADA, POP_TOTAL) values ('PR', '41', '2505', 'Barbosa Ferraz',10647, 148, 10795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2604" calcext:value-type="float">
            <text:p>2604</text:p>
          </table:table-cell>
          <table:table-cell office:value-type="string" calcext:value-type="string">
            <text:p>Barracão</text:p>
          </table:table-cell>
          <table:table-cell office:value-type="float" office:value="9635" calcext:value-type="float">
            <text:p>9635</text:p>
          </table:table-cell>
          <table:table-cell office:value-type="float" office:value="124" calcext:value-type="float">
            <text:p>124</text:p>
          </table:table-cell>
          <table:table-cell office:value-type="float" office:value="9759" calcext:value-type="float">
            <text:p>9759</text:p>
          </table:table-cell>
          <table:table-cell table:formula="of:=CONCATENATE(&quot;insert into IBGE_MUNICIPIOS (UF, COD_UF, CODIGO_MUNICIPIO, NOME_MUNICIPIO, POP_COLETADA, POP_IMPUTADA, POP_TOTAL) values ('&quot;; [.A32]; &quot;', '&quot;; [.B32]; &quot;', '&quot;; [.C32]; &quot;', '&quot;; [.D32]; &quot;',&quot;; [.E32]; &quot;, &quot;; [.F32]; &quot;, &quot;; [.G32]; &quot;);&quot;)" office:value-type="string" office:string-value="insert into IBGE_MUNICIPIOS (UF, COD_UF, CODIGO_MUNICIPIO, NOME_MUNICIPIO, POP_COLETADA, POP_IMPUTADA, POP_TOTAL) values ('PR', '41', '2604', 'Barracão',9635, 124, 9759);" calcext:value-type="string">
            <text:p>insert into IBGE_MUNICIPIOS (UF, COD_UF, CODIGO_MUNICIPIO, NOME_MUNICIPIO, POP_COLETADA, POP_IMPUTADA, POP_TOTAL) values ('PR', '41', '2604', 'Barracão',9635, 124, 9759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2703" calcext:value-type="float">
            <text:p>2703</text:p>
          </table:table-cell>
          <table:table-cell office:value-type="string" calcext:value-type="string">
            <text:p>Barra do Jacaré</text:p>
          </table:table-cell>
          <table:table-cell office:value-type="float" office:value="2781" calcext:value-type="float">
            <text:p>2781</text:p>
          </table:table-cell>
          <table:table-cell office:value-type="float" office:value="33" calcext:value-type="float">
            <text:p>33</text:p>
          </table:table-cell>
          <table:table-cell office:value-type="float" office:value="2814" calcext:value-type="float">
            <text:p>2814</text:p>
          </table:table-cell>
          <table:table-cell table:formula="of:=CONCATENATE(&quot;insert into IBGE_MUNICIPIOS (UF, COD_UF, CODIGO_MUNICIPIO, NOME_MUNICIPIO, POP_COLETADA, POP_IMPUTADA, POP_TOTAL) values ('&quot;; [.A33]; &quot;', '&quot;; [.B33]; &quot;', '&quot;; [.C33]; &quot;', '&quot;; [.D33]; &quot;',&quot;; [.E33]; &quot;, &quot;; [.F33]; &quot;, &quot;; [.G33]; &quot;);&quot;)" office:value-type="string" office:string-value="insert into IBGE_MUNICIPIOS (UF, COD_UF, CODIGO_MUNICIPIO, NOME_MUNICIPIO, POP_COLETADA, POP_IMPUTADA, POP_TOTAL) values ('PR', '41', '2703', 'Barra do Jacaré',2781, 33, 2814);" calcext:value-type="string">
            <text:p>insert into IBGE_MUNICIPIOS (UF, COD_UF, CODIGO_MUNICIPIO, NOME_MUNICIPIO, POP_COLETADA, POP_IMPUTADA, POP_TOTAL) values ('PR', '41', '2703', 'Barra do Jacaré',2781, 33, 2814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2752" calcext:value-type="float">
            <text:p>2752</text:p>
          </table:table-cell>
          <table:table-cell office:value-type="string" calcext:value-type="string">
            <text:p>Bela Vista da Caroba</text:p>
          </table:table-cell>
          <table:table-cell office:value-type="float" office:value="4031" calcext:value-type="float">
            <text:p>4031</text:p>
          </table:table-cell>
          <table:table-cell office:value-type="float" office:value="0" calcext:value-type="float">
            <text:p>0</text:p>
          </table:table-cell>
          <table:table-cell office:value-type="float" office:value="4031" calcext:value-type="float">
            <text:p>4031</text:p>
          </table:table-cell>
          <table:table-cell table:formula="of:=CONCATENATE(&quot;insert into IBGE_MUNICIPIOS (UF, COD_UF, CODIGO_MUNICIPIO, NOME_MUNICIPIO, POP_COLETADA, POP_IMPUTADA, POP_TOTAL) values ('&quot;; [.A34]; &quot;', '&quot;; [.B34]; &quot;', '&quot;; [.C34]; &quot;', '&quot;; [.D34]; &quot;',&quot;; [.E34]; &quot;, &quot;; [.F34]; &quot;, &quot;; [.G34]; &quot;);&quot;)" office:value-type="string" office:string-value="insert into IBGE_MUNICIPIOS (UF, COD_UF, CODIGO_MUNICIPIO, NOME_MUNICIPIO, POP_COLETADA, POP_IMPUTADA, POP_TOTAL) values ('PR', '41', '2752', 'Bela Vista da Caroba',4031, 0, 4031);" calcext:value-type="string">
            <text:p>insert into IBGE_MUNICIPIOS (UF, COD_UF, CODIGO_MUNICIPIO, NOME_MUNICIPIO, POP_COLETADA, POP_IMPUTADA, POP_TOTAL) values ('PR', '41', '2752', 'Bela Vista da Caroba',4031, 0, 4031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2802" calcext:value-type="float">
            <text:p>2802</text:p>
          </table:table-cell>
          <table:table-cell office:value-type="string" calcext:value-type="string">
            <text:p>Bela Vista do Paraíso</text:p>
          </table:table-cell>
          <table:table-cell office:value-type="float" office:value="14509" calcext:value-type="float">
            <text:p>14509</text:p>
          </table:table-cell>
          <table:table-cell office:value-type="float" office:value="324" calcext:value-type="float">
            <text:p>324</text:p>
          </table:table-cell>
          <table:table-cell office:value-type="float" office:value="14833" calcext:value-type="float">
            <text:p>14833</text:p>
          </table:table-cell>
          <table:table-cell table:formula="of:=CONCATENATE(&quot;insert into IBGE_MUNICIPIOS (UF, COD_UF, CODIGO_MUNICIPIO, NOME_MUNICIPIO, POP_COLETADA, POP_IMPUTADA, POP_TOTAL) values ('&quot;; [.A35]; &quot;', '&quot;; [.B35]; &quot;', '&quot;; [.C35]; &quot;', '&quot;; [.D35]; &quot;',&quot;; [.E35]; &quot;, &quot;; [.F35]; &quot;, &quot;; [.G35]; &quot;);&quot;)" office:value-type="string" office:string-value="insert into IBGE_MUNICIPIOS (UF, COD_UF, CODIGO_MUNICIPIO, NOME_MUNICIPIO, POP_COLETADA, POP_IMPUTADA, POP_TOTAL) values ('PR', '41', '2802', 'Bela Vista do Paraíso',14509, 324, 14833);" calcext:value-type="string">
            <text:p>insert into IBGE_MUNICIPIOS (UF, COD_UF, CODIGO_MUNICIPIO, NOME_MUNICIPIO, POP_COLETADA, POP_IMPUTADA, POP_TOTAL) values ('PR', '41', '2802', 'Bela Vista do Paraíso',14509, 324, 14833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2901" calcext:value-type="float">
            <text:p>2901</text:p>
          </table:table-cell>
          <table:table-cell office:value-type="string" calcext:value-type="string">
            <text:p>Bituruna</text:p>
          </table:table-cell>
          <table:table-cell office:value-type="float" office:value="15504" calcext:value-type="float">
            <text:p>15504</text:p>
          </table:table-cell>
          <table:table-cell office:value-type="float" office:value="29" calcext:value-type="float">
            <text:p>29</text:p>
          </table:table-cell>
          <table:table-cell office:value-type="float" office:value="15533" calcext:value-type="float">
            <text:p>15533</text:p>
          </table:table-cell>
          <table:table-cell table:formula="of:=CONCATENATE(&quot;insert into IBGE_MUNICIPIOS (UF, COD_UF, CODIGO_MUNICIPIO, NOME_MUNICIPIO, POP_COLETADA, POP_IMPUTADA, POP_TOTAL) values ('&quot;; [.A36]; &quot;', '&quot;; [.B36]; &quot;', '&quot;; [.C36]; &quot;', '&quot;; [.D36]; &quot;',&quot;; [.E36]; &quot;, &quot;; [.F36]; &quot;, &quot;; [.G36]; &quot;);&quot;)" office:value-type="string" office:string-value="insert into IBGE_MUNICIPIOS (UF, COD_UF, CODIGO_MUNICIPIO, NOME_MUNICIPIO, POP_COLETADA, POP_IMPUTADA, POP_TOTAL) values ('PR', '41', '2901', 'Bituruna',15504, 29, 15533);" calcext:value-type="string">
            <text:p>insert into IBGE_MUNICIPIOS (UF, COD_UF, CODIGO_MUNICIPIO, NOME_MUNICIPIO, POP_COLETADA, POP_IMPUTADA, POP_TOTAL) values ('PR', '41', '2901', 'Bituruna',15504, 29, 15533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3008" calcext:value-type="float">
            <text:p>3008</text:p>
          </table:table-cell>
          <table:table-cell office:value-type="string" calcext:value-type="string">
            <text:p>Boa Esperança</text:p>
          </table:table-cell>
          <table:table-cell office:value-type="float" office:value="4469" calcext:value-type="float">
            <text:p>4469</text:p>
          </table:table-cell>
          <table:table-cell office:value-type="float" office:value="89" calcext:value-type="float">
            <text:p>89</text:p>
          </table:table-cell>
          <table:table-cell office:value-type="float" office:value="4558" calcext:value-type="float">
            <text:p>4558</text:p>
          </table:table-cell>
          <table:table-cell table:formula="of:=CONCATENATE(&quot;insert into IBGE_MUNICIPIOS (UF, COD_UF, CODIGO_MUNICIPIO, NOME_MUNICIPIO, POP_COLETADA, POP_IMPUTADA, POP_TOTAL) values ('&quot;; [.A37]; &quot;', '&quot;; [.B37]; &quot;', '&quot;; [.C37]; &quot;', '&quot;; [.D37]; &quot;',&quot;; [.E37]; &quot;, &quot;; [.F37]; &quot;, &quot;; [.G37]; &quot;);&quot;)" office:value-type="string" office:string-value="insert into IBGE_MUNICIPIOS (UF, COD_UF, CODIGO_MUNICIPIO, NOME_MUNICIPIO, POP_COLETADA, POP_IMPUTADA, POP_TOTAL) values ('PR', '41', '3008', 'Boa Esperança',4469, 89, 4558);" calcext:value-type="string">
            <text:p>insert into IBGE_MUNICIPIOS (UF, COD_UF, CODIGO_MUNICIPIO, NOME_MUNICIPIO, POP_COLETADA, POP_IMPUTADA, POP_TOTAL) values ('PR', '41', '3008', 'Boa Esperança',4469, 89, 4558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3024" calcext:value-type="float">
            <text:p>3024</text:p>
          </table:table-cell>
          <table:table-cell office:value-type="string" calcext:value-type="string">
            <text:p>Boa Esperança do Iguaçu</text:p>
          </table:table-cell>
          <table:table-cell office:value-type="float" office:value="2455" calcext:value-type="float">
            <text:p>2455</text:p>
          </table:table-cell>
          <table:table-cell office:value-type="float" office:value="0" calcext:value-type="float">
            <text:p>0</text:p>
          </table:table-cell>
          <table:table-cell office:value-type="float" office:value="2455" calcext:value-type="float">
            <text:p>2455</text:p>
          </table:table-cell>
          <table:table-cell table:formula="of:=CONCATENATE(&quot;insert into IBGE_MUNICIPIOS (UF, COD_UF, CODIGO_MUNICIPIO, NOME_MUNICIPIO, POP_COLETADA, POP_IMPUTADA, POP_TOTAL) values ('&quot;; [.A38]; &quot;', '&quot;; [.B38]; &quot;', '&quot;; [.C38]; &quot;', '&quot;; [.D38]; &quot;',&quot;; [.E38]; &quot;, &quot;; [.F38]; &quot;, &quot;; [.G38]; &quot;);&quot;)" office:value-type="string" office:string-value="insert into IBGE_MUNICIPIOS (UF, COD_UF, CODIGO_MUNICIPIO, NOME_MUNICIPIO, POP_COLETADA, POP_IMPUTADA, POP_TOTAL) values ('PR', '41', '3024', 'Boa Esperança do Iguaçu',2455, 0, 2455);" calcext:value-type="string">
            <text:p>insert into IBGE_MUNICIPIOS (UF, COD_UF, CODIGO_MUNICIPIO, NOME_MUNICIPIO, POP_COLETADA, POP_IMPUTADA, POP_TOTAL) values ('PR', '41', '3024', 'Boa Esperança do Iguaçu',2455, 0, 2455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3040" calcext:value-type="float">
            <text:p>3040</text:p>
          </table:table-cell>
          <table:table-cell office:value-type="string" calcext:value-type="string">
            <text:p>Boa Ventura de São Roque</text:p>
          </table:table-cell>
          <table:table-cell office:value-type="float" office:value="6042" calcext:value-type="float">
            <text:p>6042</text:p>
          </table:table-cell>
          <table:table-cell office:value-type="float" office:value="336" calcext:value-type="float">
            <text:p>336</text:p>
          </table:table-cell>
          <table:table-cell office:value-type="float" office:value="6378" calcext:value-type="float">
            <text:p>6378</text:p>
          </table:table-cell>
          <table:table-cell table:formula="of:=CONCATENATE(&quot;insert into IBGE_MUNICIPIOS (UF, COD_UF, CODIGO_MUNICIPIO, NOME_MUNICIPIO, POP_COLETADA, POP_IMPUTADA, POP_TOTAL) values ('&quot;; [.A39]; &quot;', '&quot;; [.B39]; &quot;', '&quot;; [.C39]; &quot;', '&quot;; [.D39]; &quot;',&quot;; [.E39]; &quot;, &quot;; [.F39]; &quot;, &quot;; [.G39]; &quot;);&quot;)" office:value-type="string" office:string-value="insert into IBGE_MUNICIPIOS (UF, COD_UF, CODIGO_MUNICIPIO, NOME_MUNICIPIO, POP_COLETADA, POP_IMPUTADA, POP_TOTAL) values ('PR', '41', '3040', 'Boa Ventura de São Roque',6042, 336, 6378);" calcext:value-type="string">
            <text:p>insert into IBGE_MUNICIPIOS (UF, COD_UF, CODIGO_MUNICIPIO, NOME_MUNICIPIO, POP_COLETADA, POP_IMPUTADA, POP_TOTAL) values ('PR', '41', '3040', 'Boa Ventura de São Roque',6042, 336, 6378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3057" calcext:value-type="float">
            <text:p>3057</text:p>
          </table:table-cell>
          <table:table-cell office:value-type="string" calcext:value-type="string">
            <text:p>Boa Vista da Aparecida</text:p>
          </table:table-cell>
          <table:table-cell office:value-type="float" office:value="7861" calcext:value-type="float">
            <text:p>7861</text:p>
          </table:table-cell>
          <table:table-cell office:value-type="float" office:value="63" calcext:value-type="float">
            <text:p>63</text:p>
          </table:table-cell>
          <table:table-cell office:value-type="float" office:value="7924" calcext:value-type="float">
            <text:p>7924</text:p>
          </table:table-cell>
          <table:table-cell table:formula="of:=CONCATENATE(&quot;insert into IBGE_MUNICIPIOS (UF, COD_UF, CODIGO_MUNICIPIO, NOME_MUNICIPIO, POP_COLETADA, POP_IMPUTADA, POP_TOTAL) values ('&quot;; [.A40]; &quot;', '&quot;; [.B40]; &quot;', '&quot;; [.C40]; &quot;', '&quot;; [.D40]; &quot;',&quot;; [.E40]; &quot;, &quot;; [.F40]; &quot;, &quot;; [.G40]; &quot;);&quot;)" office:value-type="string" office:string-value="insert into IBGE_MUNICIPIOS (UF, COD_UF, CODIGO_MUNICIPIO, NOME_MUNICIPIO, POP_COLETADA, POP_IMPUTADA, POP_TOTAL) values ('PR', '41', '3057', 'Boa Vista da Aparecida',7861, 63, 7924);" calcext:value-type="string">
            <text:p>insert into IBGE_MUNICIPIOS (UF, COD_UF, CODIGO_MUNICIPIO, NOME_MUNICIPIO, POP_COLETADA, POP_IMPUTADA, POP_TOTAL) values ('PR', '41', '3057', 'Boa Vista da Aparecida',7861, 63, 7924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3107" calcext:value-type="float">
            <text:p>3107</text:p>
          </table:table-cell>
          <table:table-cell office:value-type="string" calcext:value-type="string">
            <text:p>Bocaiúva do Sul</text:p>
          </table:table-cell>
          <table:table-cell office:value-type="float" office:value="12853" calcext:value-type="float">
            <text:p>12853</text:p>
          </table:table-cell>
          <table:table-cell office:value-type="float" office:value="446" calcext:value-type="float">
            <text:p>446</text:p>
          </table:table-cell>
          <table:table-cell office:value-type="float" office:value="13299" calcext:value-type="float">
            <text:p>13299</text:p>
          </table:table-cell>
          <table:table-cell table:formula="of:=CONCATENATE(&quot;insert into IBGE_MUNICIPIOS (UF, COD_UF, CODIGO_MUNICIPIO, NOME_MUNICIPIO, POP_COLETADA, POP_IMPUTADA, POP_TOTAL) values ('&quot;; [.A41]; &quot;', '&quot;; [.B41]; &quot;', '&quot;; [.C41]; &quot;', '&quot;; [.D41]; &quot;',&quot;; [.E41]; &quot;, &quot;; [.F41]; &quot;, &quot;; [.G41]; &quot;);&quot;)" office:value-type="string" office:string-value="insert into IBGE_MUNICIPIOS (UF, COD_UF, CODIGO_MUNICIPIO, NOME_MUNICIPIO, POP_COLETADA, POP_IMPUTADA, POP_TOTAL) values ('PR', '41', '3107', 'Bocaiúva do Sul',12853, 446, 13299);" calcext:value-type="string">
            <text:p>insert into IBGE_MUNICIPIOS (UF, COD_UF, CODIGO_MUNICIPIO, NOME_MUNICIPIO, POP_COLETADA, POP_IMPUTADA, POP_TOTAL) values ('PR', '41', '3107', 'Bocaiúva do Sul',12853, 446, 13299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3156" calcext:value-type="float">
            <text:p>3156</text:p>
          </table:table-cell>
          <table:table-cell office:value-type="string" calcext:value-type="string">
            <text:p>Bom Jesus do Sul</text:p>
          </table:table-cell>
          <table:table-cell office:value-type="float" office:value="3976" calcext:value-type="float">
            <text:p>3976</text:p>
          </table:table-cell>
          <table:table-cell office:value-type="float" office:value="4" calcext:value-type="float">
            <text:p>4</text:p>
          </table:table-cell>
          <table:table-cell office:value-type="float" office:value="3980" calcext:value-type="float">
            <text:p>3980</text:p>
          </table:table-cell>
          <table:table-cell table:formula="of:=CONCATENATE(&quot;insert into IBGE_MUNICIPIOS (UF, COD_UF, CODIGO_MUNICIPIO, NOME_MUNICIPIO, POP_COLETADA, POP_IMPUTADA, POP_TOTAL) values ('&quot;; [.A42]; &quot;', '&quot;; [.B42]; &quot;', '&quot;; [.C42]; &quot;', '&quot;; [.D42]; &quot;',&quot;; [.E42]; &quot;, &quot;; [.F42]; &quot;, &quot;; [.G42]; &quot;);&quot;)" office:value-type="string" office:string-value="insert into IBGE_MUNICIPIOS (UF, COD_UF, CODIGO_MUNICIPIO, NOME_MUNICIPIO, POP_COLETADA, POP_IMPUTADA, POP_TOTAL) values ('PR', '41', '3156', 'Bom Jesus do Sul',3976, 4, 3980);" calcext:value-type="string">
            <text:p>insert into IBGE_MUNICIPIOS (UF, COD_UF, CODIGO_MUNICIPIO, NOME_MUNICIPIO, POP_COLETADA, POP_IMPUTADA, POP_TOTAL) values ('PR', '41', '3156', 'Bom Jesus do Sul',3976, 4, 3980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3206" calcext:value-type="float">
            <text:p>3206</text:p>
          </table:table-cell>
          <table:table-cell office:value-type="string" calcext:value-type="string">
            <text:p>Bom Sucesso</text:p>
          </table:table-cell>
          <table:table-cell office:value-type="float" office:value="6482" calcext:value-type="float">
            <text:p>6482</text:p>
          </table:table-cell>
          <table:table-cell office:value-type="float" office:value="99" calcext:value-type="float">
            <text:p>99</text:p>
          </table:table-cell>
          <table:table-cell office:value-type="float" office:value="6581" calcext:value-type="float">
            <text:p>6581</text:p>
          </table:table-cell>
          <table:table-cell table:formula="of:=CONCATENATE(&quot;insert into IBGE_MUNICIPIOS (UF, COD_UF, CODIGO_MUNICIPIO, NOME_MUNICIPIO, POP_COLETADA, POP_IMPUTADA, POP_TOTAL) values ('&quot;; [.A43]; &quot;', '&quot;; [.B43]; &quot;', '&quot;; [.C43]; &quot;', '&quot;; [.D43]; &quot;',&quot;; [.E43]; &quot;, &quot;; [.F43]; &quot;, &quot;; [.G43]; &quot;);&quot;)" office:value-type="string" office:string-value="insert into IBGE_MUNICIPIOS (UF, COD_UF, CODIGO_MUNICIPIO, NOME_MUNICIPIO, POP_COLETADA, POP_IMPUTADA, POP_TOTAL) values ('PR', '41', '3206', 'Bom Sucesso',6482, 99, 6581);" calcext:value-type="string">
            <text:p>insert into IBGE_MUNICIPIOS (UF, COD_UF, CODIGO_MUNICIPIO, NOME_MUNICIPIO, POP_COLETADA, POP_IMPUTADA, POP_TOTAL) values ('PR', '41', '3206', 'Bom Sucesso',6482, 99, 6581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3222" calcext:value-type="float">
            <text:p>3222</text:p>
          </table:table-cell>
          <table:table-cell office:value-type="string" calcext:value-type="string">
            <text:p>Bom Sucesso do Sul</text:p>
          </table:table-cell>
          <table:table-cell office:value-type="float" office:value="3134" calcext:value-type="float">
            <text:p>3134</text:p>
          </table:table-cell>
          <table:table-cell office:value-type="float" office:value="68" calcext:value-type="float">
            <text:p>68</text:p>
          </table:table-cell>
          <table:table-cell office:value-type="float" office:value="3202" calcext:value-type="float">
            <text:p>3202</text:p>
          </table:table-cell>
          <table:table-cell table:formula="of:=CONCATENATE(&quot;insert into IBGE_MUNICIPIOS (UF, COD_UF, CODIGO_MUNICIPIO, NOME_MUNICIPIO, POP_COLETADA, POP_IMPUTADA, POP_TOTAL) values ('&quot;; [.A44]; &quot;', '&quot;; [.B44]; &quot;', '&quot;; [.C44]; &quot;', '&quot;; [.D44]; &quot;',&quot;; [.E44]; &quot;, &quot;; [.F44]; &quot;, &quot;; [.G44]; &quot;);&quot;)" office:value-type="string" office:string-value="insert into IBGE_MUNICIPIOS (UF, COD_UF, CODIGO_MUNICIPIO, NOME_MUNICIPIO, POP_COLETADA, POP_IMPUTADA, POP_TOTAL) values ('PR', '41', '3222', 'Bom Sucesso do Sul',3134, 68, 3202);" calcext:value-type="string">
            <text:p>insert into IBGE_MUNICIPIOS (UF, COD_UF, CODIGO_MUNICIPIO, NOME_MUNICIPIO, POP_COLETADA, POP_IMPUTADA, POP_TOTAL) values ('PR', '41', '3222', 'Bom Sucesso do Sul',3134, 68, 3202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3305" calcext:value-type="float">
            <text:p>3305</text:p>
          </table:table-cell>
          <table:table-cell office:value-type="string" calcext:value-type="string">
            <text:p>Borrazópolis</text:p>
          </table:table-cell>
          <table:table-cell office:value-type="float" office:value="7713" calcext:value-type="float">
            <text:p>7713</text:p>
          </table:table-cell>
          <table:table-cell office:value-type="float" office:value="22" calcext:value-type="float">
            <text:p>22</text:p>
          </table:table-cell>
          <table:table-cell office:value-type="float" office:value="7735" calcext:value-type="float">
            <text:p>7735</text:p>
          </table:table-cell>
          <table:table-cell table:formula="of:=CONCATENATE(&quot;insert into IBGE_MUNICIPIOS (UF, COD_UF, CODIGO_MUNICIPIO, NOME_MUNICIPIO, POP_COLETADA, POP_IMPUTADA, POP_TOTAL) values ('&quot;; [.A45]; &quot;', '&quot;; [.B45]; &quot;', '&quot;; [.C45]; &quot;', '&quot;; [.D45]; &quot;',&quot;; [.E45]; &quot;, &quot;; [.F45]; &quot;, &quot;; [.G45]; &quot;);&quot;)" office:value-type="string" office:string-value="insert into IBGE_MUNICIPIOS (UF, COD_UF, CODIGO_MUNICIPIO, NOME_MUNICIPIO, POP_COLETADA, POP_IMPUTADA, POP_TOTAL) values ('PR', '41', '3305', 'Borrazópolis',7713, 22, 7735);" calcext:value-type="string">
            <text:p>insert into IBGE_MUNICIPIOS (UF, COD_UF, CODIGO_MUNICIPIO, NOME_MUNICIPIO, POP_COLETADA, POP_IMPUTADA, POP_TOTAL) values ('PR', '41', '3305', 'Borrazópolis',7713, 22, 7735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3354" calcext:value-type="float">
            <text:p>3354</text:p>
          </table:table-cell>
          <table:table-cell office:value-type="string" calcext:value-type="string">
            <text:p>Braganey</text:p>
          </table:table-cell>
          <table:table-cell office:value-type="float" office:value="4833" calcext:value-type="float">
            <text:p>4833</text:p>
          </table:table-cell>
          <table:table-cell office:value-type="float" office:value="21" calcext:value-type="float">
            <text:p>21</text:p>
          </table:table-cell>
          <table:table-cell office:value-type="float" office:value="4854" calcext:value-type="float">
            <text:p>4854</text:p>
          </table:table-cell>
          <table:table-cell table:formula="of:=CONCATENATE(&quot;insert into IBGE_MUNICIPIOS (UF, COD_UF, CODIGO_MUNICIPIO, NOME_MUNICIPIO, POP_COLETADA, POP_IMPUTADA, POP_TOTAL) values ('&quot;; [.A46]; &quot;', '&quot;; [.B46]; &quot;', '&quot;; [.C46]; &quot;', '&quot;; [.D46]; &quot;',&quot;; [.E46]; &quot;, &quot;; [.F46]; &quot;, &quot;; [.G46]; &quot;);&quot;)" office:value-type="string" office:string-value="insert into IBGE_MUNICIPIOS (UF, COD_UF, CODIGO_MUNICIPIO, NOME_MUNICIPIO, POP_COLETADA, POP_IMPUTADA, POP_TOTAL) values ('PR', '41', '3354', 'Braganey',4833, 21, 4854);" calcext:value-type="string">
            <text:p>insert into IBGE_MUNICIPIOS (UF, COD_UF, CODIGO_MUNICIPIO, NOME_MUNICIPIO, POP_COLETADA, POP_IMPUTADA, POP_TOTAL) values ('PR', '41', '3354', 'Braganey',4833, 21, 4854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3370" calcext:value-type="float">
            <text:p>3370</text:p>
          </table:table-cell>
          <table:table-cell office:value-type="string" calcext:value-type="string">
            <text:p>Brasilândia do Sul</text:p>
          </table:table-cell>
          <table:table-cell office:value-type="float" office:value="3664" calcext:value-type="float">
            <text:p>3664</text:p>
          </table:table-cell>
          <table:table-cell office:value-type="float" office:value="44" calcext:value-type="float">
            <text:p>44</text:p>
          </table:table-cell>
          <table:table-cell office:value-type="float" office:value="3708" calcext:value-type="float">
            <text:p>3708</text:p>
          </table:table-cell>
          <table:table-cell table:formula="of:=CONCATENATE(&quot;insert into IBGE_MUNICIPIOS (UF, COD_UF, CODIGO_MUNICIPIO, NOME_MUNICIPIO, POP_COLETADA, POP_IMPUTADA, POP_TOTAL) values ('&quot;; [.A47]; &quot;', '&quot;; [.B47]; &quot;', '&quot;; [.C47]; &quot;', '&quot;; [.D47]; &quot;',&quot;; [.E47]; &quot;, &quot;; [.F47]; &quot;, &quot;; [.G47]; &quot;);&quot;)" office:value-type="string" office:string-value="insert into IBGE_MUNICIPIOS (UF, COD_UF, CODIGO_MUNICIPIO, NOME_MUNICIPIO, POP_COLETADA, POP_IMPUTADA, POP_TOTAL) values ('PR', '41', '3370', 'Brasilândia do Sul',3664, 44, 3708);" calcext:value-type="string">
            <text:p>insert into IBGE_MUNICIPIOS (UF, COD_UF, CODIGO_MUNICIPIO, NOME_MUNICIPIO, POP_COLETADA, POP_IMPUTADA, POP_TOTAL) values ('PR', '41', '3370', 'Brasilândia do Sul',3664, 44, 3708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3404" calcext:value-type="float">
            <text:p>3404</text:p>
          </table:table-cell>
          <table:table-cell office:value-type="string" calcext:value-type="string">
            <text:p>Cafeara</text:p>
          </table:table-cell>
          <table:table-cell office:value-type="float" office:value="2627" calcext:value-type="float">
            <text:p>2627</text:p>
          </table:table-cell>
          <table:table-cell office:value-type="float" office:value="0" calcext:value-type="float">
            <text:p>0</text:p>
          </table:table-cell>
          <table:table-cell office:value-type="float" office:value="2627" calcext:value-type="float">
            <text:p>2627</text:p>
          </table:table-cell>
          <table:table-cell table:formula="of:=CONCATENATE(&quot;insert into IBGE_MUNICIPIOS (UF, COD_UF, CODIGO_MUNICIPIO, NOME_MUNICIPIO, POP_COLETADA, POP_IMPUTADA, POP_TOTAL) values ('&quot;; [.A48]; &quot;', '&quot;; [.B48]; &quot;', '&quot;; [.C48]; &quot;', '&quot;; [.D48]; &quot;',&quot;; [.E48]; &quot;, &quot;; [.F48]; &quot;, &quot;; [.G48]; &quot;);&quot;)" office:value-type="string" office:string-value="insert into IBGE_MUNICIPIOS (UF, COD_UF, CODIGO_MUNICIPIO, NOME_MUNICIPIO, POP_COLETADA, POP_IMPUTADA, POP_TOTAL) values ('PR', '41', '3404', 'Cafeara',2627, 0, 2627);" calcext:value-type="string">
            <text:p>insert into IBGE_MUNICIPIOS (UF, COD_UF, CODIGO_MUNICIPIO, NOME_MUNICIPIO, POP_COLETADA, POP_IMPUTADA, POP_TOTAL) values ('PR', '41', '3404', 'Cafeara',2627, 0, 2627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3453" calcext:value-type="float">
            <text:p>3453</text:p>
          </table:table-cell>
          <table:table-cell office:value-type="string" calcext:value-type="string">
            <text:p>Cafelândia</text:p>
          </table:table-cell>
          <table:table-cell office:value-type="float" office:value="18215" calcext:value-type="float">
            <text:p>18215</text:p>
          </table:table-cell>
          <table:table-cell office:value-type="float" office:value="782" calcext:value-type="float">
            <text:p>782</text:p>
          </table:table-cell>
          <table:table-cell office:value-type="float" office:value="18997" calcext:value-type="float">
            <text:p>18997</text:p>
          </table:table-cell>
          <table:table-cell table:formula="of:=CONCATENATE(&quot;insert into IBGE_MUNICIPIOS (UF, COD_UF, CODIGO_MUNICIPIO, NOME_MUNICIPIO, POP_COLETADA, POP_IMPUTADA, POP_TOTAL) values ('&quot;; [.A49]; &quot;', '&quot;; [.B49]; &quot;', '&quot;; [.C49]; &quot;', '&quot;; [.D49]; &quot;',&quot;; [.E49]; &quot;, &quot;; [.F49]; &quot;, &quot;; [.G49]; &quot;);&quot;)" office:value-type="string" office:string-value="insert into IBGE_MUNICIPIOS (UF, COD_UF, CODIGO_MUNICIPIO, NOME_MUNICIPIO, POP_COLETADA, POP_IMPUTADA, POP_TOTAL) values ('PR', '41', '3453', 'Cafelândia',18215, 782, 18997);" calcext:value-type="string">
            <text:p>insert into IBGE_MUNICIPIOS (UF, COD_UF, CODIGO_MUNICIPIO, NOME_MUNICIPIO, POP_COLETADA, POP_IMPUTADA, POP_TOTAL) values ('PR', '41', '3453', 'Cafelândia',18215, 782, 18997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3479" calcext:value-type="float">
            <text:p>3479</text:p>
          </table:table-cell>
          <table:table-cell office:value-type="string" calcext:value-type="string">
            <text:p>Cafezal do Sul</text:p>
          </table:table-cell>
          <table:table-cell office:value-type="float" office:value="4455" calcext:value-type="float">
            <text:p>4455</text:p>
          </table:table-cell>
          <table:table-cell office:value-type="float" office:value="18" calcext:value-type="float">
            <text:p>18</text:p>
          </table:table-cell>
          <table:table-cell office:value-type="float" office:value="4473" calcext:value-type="float">
            <text:p>4473</text:p>
          </table:table-cell>
          <table:table-cell table:formula="of:=CONCATENATE(&quot;insert into IBGE_MUNICIPIOS (UF, COD_UF, CODIGO_MUNICIPIO, NOME_MUNICIPIO, POP_COLETADA, POP_IMPUTADA, POP_TOTAL) values ('&quot;; [.A50]; &quot;', '&quot;; [.B50]; &quot;', '&quot;; [.C50]; &quot;', '&quot;; [.D50]; &quot;',&quot;; [.E50]; &quot;, &quot;; [.F50]; &quot;, &quot;; [.G50]; &quot;);&quot;)" office:value-type="string" office:string-value="insert into IBGE_MUNICIPIOS (UF, COD_UF, CODIGO_MUNICIPIO, NOME_MUNICIPIO, POP_COLETADA, POP_IMPUTADA, POP_TOTAL) values ('PR', '41', '3479', 'Cafezal do Sul',4455, 18, 4473);" calcext:value-type="string">
            <text:p>insert into IBGE_MUNICIPIOS (UF, COD_UF, CODIGO_MUNICIPIO, NOME_MUNICIPIO, POP_COLETADA, POP_IMPUTADA, POP_TOTAL) values ('PR', '41', '3479', 'Cafezal do Sul',4455, 18, 4473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3503" calcext:value-type="float">
            <text:p>3503</text:p>
          </table:table-cell>
          <table:table-cell office:value-type="string" calcext:value-type="string">
            <text:p>Califórnia</text:p>
          </table:table-cell>
          <table:table-cell office:value-type="float" office:value="8705" calcext:value-type="float">
            <text:p>8705</text:p>
          </table:table-cell>
          <table:table-cell office:value-type="float" office:value="5" calcext:value-type="float">
            <text:p>5</text:p>
          </table:table-cell>
          <table:table-cell office:value-type="float" office:value="8710" calcext:value-type="float">
            <text:p>8710</text:p>
          </table:table-cell>
          <table:table-cell table:formula="of:=CONCATENATE(&quot;insert into IBGE_MUNICIPIOS (UF, COD_UF, CODIGO_MUNICIPIO, NOME_MUNICIPIO, POP_COLETADA, POP_IMPUTADA, POP_TOTAL) values ('&quot;; [.A51]; &quot;', '&quot;; [.B51]; &quot;', '&quot;; [.C51]; &quot;', '&quot;; [.D51]; &quot;',&quot;; [.E51]; &quot;, &quot;; [.F51]; &quot;, &quot;; [.G51]; &quot;);&quot;)" office:value-type="string" office:string-value="insert into IBGE_MUNICIPIOS (UF, COD_UF, CODIGO_MUNICIPIO, NOME_MUNICIPIO, POP_COLETADA, POP_IMPUTADA, POP_TOTAL) values ('PR', '41', '3503', 'Califórnia',8705, 5, 8710);" calcext:value-type="string">
            <text:p>insert into IBGE_MUNICIPIOS (UF, COD_UF, CODIGO_MUNICIPIO, NOME_MUNICIPIO, POP_COLETADA, POP_IMPUTADA, POP_TOTAL) values ('PR', '41', '3503', 'Califórnia',8705, 5, 8710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3602" calcext:value-type="float">
            <text:p>3602</text:p>
          </table:table-cell>
          <table:table-cell office:value-type="string" calcext:value-type="string">
            <text:p>Cambará</text:p>
          </table:table-cell>
          <table:table-cell office:value-type="float" office:value="23112" calcext:value-type="float">
            <text:p>23112</text:p>
          </table:table-cell>
          <table:table-cell office:value-type="float" office:value="100" calcext:value-type="float">
            <text:p>100</text:p>
          </table:table-cell>
          <table:table-cell office:value-type="float" office:value="23212" calcext:value-type="float">
            <text:p>23212</text:p>
          </table:table-cell>
          <table:table-cell table:formula="of:=CONCATENATE(&quot;insert into IBGE_MUNICIPIOS (UF, COD_UF, CODIGO_MUNICIPIO, NOME_MUNICIPIO, POP_COLETADA, POP_IMPUTADA, POP_TOTAL) values ('&quot;; [.A52]; &quot;', '&quot;; [.B52]; &quot;', '&quot;; [.C52]; &quot;', '&quot;; [.D52]; &quot;',&quot;; [.E52]; &quot;, &quot;; [.F52]; &quot;, &quot;; [.G52]; &quot;);&quot;)" office:value-type="string" office:string-value="insert into IBGE_MUNICIPIOS (UF, COD_UF, CODIGO_MUNICIPIO, NOME_MUNICIPIO, POP_COLETADA, POP_IMPUTADA, POP_TOTAL) values ('PR', '41', '3602', 'Cambará',23112, 100, 23212);" calcext:value-type="string">
            <text:p>insert into IBGE_MUNICIPIOS (UF, COD_UF, CODIGO_MUNICIPIO, NOME_MUNICIPIO, POP_COLETADA, POP_IMPUTADA, POP_TOTAL) values ('PR', '41', '3602', 'Cambará',23112, 100, 23212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3701" calcext:value-type="float">
            <text:p>3701</text:p>
          </table:table-cell>
          <table:table-cell office:value-type="string" calcext:value-type="string">
            <text:p>Cambé</text:p>
          </table:table-cell>
          <table:table-cell office:value-type="float" office:value="104768" calcext:value-type="float">
            <text:p>104768</text:p>
          </table:table-cell>
          <table:table-cell office:value-type="float" office:value="2440" calcext:value-type="float">
            <text:p>2440</text:p>
          </table:table-cell>
          <table:table-cell office:value-type="float" office:value="107208" calcext:value-type="float">
            <text:p>107208</text:p>
          </table:table-cell>
          <table:table-cell table:formula="of:=CONCATENATE(&quot;insert into IBGE_MUNICIPIOS (UF, COD_UF, CODIGO_MUNICIPIO, NOME_MUNICIPIO, POP_COLETADA, POP_IMPUTADA, POP_TOTAL) values ('&quot;; [.A53]; &quot;', '&quot;; [.B53]; &quot;', '&quot;; [.C53]; &quot;', '&quot;; [.D53]; &quot;',&quot;; [.E53]; &quot;, &quot;; [.F53]; &quot;, &quot;; [.G53]; &quot;);&quot;)" office:value-type="string" office:string-value="insert into IBGE_MUNICIPIOS (UF, COD_UF, CODIGO_MUNICIPIO, NOME_MUNICIPIO, POP_COLETADA, POP_IMPUTADA, POP_TOTAL) values ('PR', '41', '3701', 'Cambé',104768, 2440, 107208);" calcext:value-type="string">
            <text:p>insert into IBGE_MUNICIPIOS (UF, COD_UF, CODIGO_MUNICIPIO, NOME_MUNICIPIO, POP_COLETADA, POP_IMPUTADA, POP_TOTAL) values ('PR', '41', '3701', 'Cambé',104768, 2440, 107208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3800" calcext:value-type="float">
            <text:p>3800</text:p>
          </table:table-cell>
          <table:table-cell office:value-type="string" calcext:value-type="string">
            <text:p>Cambira</text:p>
          </table:table-cell>
          <table:table-cell office:value-type="float" office:value="9390" calcext:value-type="float">
            <text:p>9390</text:p>
          </table:table-cell>
          <table:table-cell office:value-type="float" office:value="70" calcext:value-type="float">
            <text:p>70</text:p>
          </table:table-cell>
          <table:table-cell office:value-type="float" office:value="9460" calcext:value-type="float">
            <text:p>9460</text:p>
          </table:table-cell>
          <table:table-cell table:formula="of:=CONCATENATE(&quot;insert into IBGE_MUNICIPIOS (UF, COD_UF, CODIGO_MUNICIPIO, NOME_MUNICIPIO, POP_COLETADA, POP_IMPUTADA, POP_TOTAL) values ('&quot;; [.A54]; &quot;', '&quot;; [.B54]; &quot;', '&quot;; [.C54]; &quot;', '&quot;; [.D54]; &quot;',&quot;; [.E54]; &quot;, &quot;; [.F54]; &quot;, &quot;; [.G54]; &quot;);&quot;)" office:value-type="string" office:string-value="insert into IBGE_MUNICIPIOS (UF, COD_UF, CODIGO_MUNICIPIO, NOME_MUNICIPIO, POP_COLETADA, POP_IMPUTADA, POP_TOTAL) values ('PR', '41', '3800', 'Cambira',9390, 70, 9460);" calcext:value-type="string">
            <text:p>insert into IBGE_MUNICIPIOS (UF, COD_UF, CODIGO_MUNICIPIO, NOME_MUNICIPIO, POP_COLETADA, POP_IMPUTADA, POP_TOTAL) values ('PR', '41', '3800', 'Cambira',9390, 70, 9460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3909" calcext:value-type="float">
            <text:p>3909</text:p>
          </table:table-cell>
          <table:table-cell office:value-type="string" calcext:value-type="string">
            <text:p>Campina da Lagoa</text:p>
          </table:table-cell>
          <table:table-cell office:value-type="float" office:value="15526" calcext:value-type="float">
            <text:p>15526</text:p>
          </table:table-cell>
          <table:table-cell office:value-type="float" office:value="197" calcext:value-type="float">
            <text:p>197</text:p>
          </table:table-cell>
          <table:table-cell office:value-type="float" office:value="15723" calcext:value-type="float">
            <text:p>15723</text:p>
          </table:table-cell>
          <table:table-cell table:formula="of:=CONCATENATE(&quot;insert into IBGE_MUNICIPIOS (UF, COD_UF, CODIGO_MUNICIPIO, NOME_MUNICIPIO, POP_COLETADA, POP_IMPUTADA, POP_TOTAL) values ('&quot;; [.A55]; &quot;', '&quot;; [.B55]; &quot;', '&quot;; [.C55]; &quot;', '&quot;; [.D55]; &quot;',&quot;; [.E55]; &quot;, &quot;; [.F55]; &quot;, &quot;; [.G55]; &quot;);&quot;)" office:value-type="string" office:string-value="insert into IBGE_MUNICIPIOS (UF, COD_UF, CODIGO_MUNICIPIO, NOME_MUNICIPIO, POP_COLETADA, POP_IMPUTADA, POP_TOTAL) values ('PR', '41', '3909', 'Campina da Lagoa',15526, 197, 15723);" calcext:value-type="string">
            <text:p>insert into IBGE_MUNICIPIOS (UF, COD_UF, CODIGO_MUNICIPIO, NOME_MUNICIPIO, POP_COLETADA, POP_IMPUTADA, POP_TOTAL) values ('PR', '41', '3909', 'Campina da Lagoa',15526, 197, 15723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3958" calcext:value-type="float">
            <text:p>3958</text:p>
          </table:table-cell>
          <table:table-cell office:value-type="string" calcext:value-type="string">
            <text:p>Campina do Simão</text:p>
          </table:table-cell>
          <table:table-cell office:value-type="float" office:value="3931" calcext:value-type="float">
            <text:p>3931</text:p>
          </table:table-cell>
          <table:table-cell office:value-type="float" office:value="5" calcext:value-type="float">
            <text:p>5</text:p>
          </table:table-cell>
          <table:table-cell office:value-type="float" office:value="3936" calcext:value-type="float">
            <text:p>3936</text:p>
          </table:table-cell>
          <table:table-cell table:formula="of:=CONCATENATE(&quot;insert into IBGE_MUNICIPIOS (UF, COD_UF, CODIGO_MUNICIPIO, NOME_MUNICIPIO, POP_COLETADA, POP_IMPUTADA, POP_TOTAL) values ('&quot;; [.A56]; &quot;', '&quot;; [.B56]; &quot;', '&quot;; [.C56]; &quot;', '&quot;; [.D56]; &quot;',&quot;; [.E56]; &quot;, &quot;; [.F56]; &quot;, &quot;; [.G56]; &quot;);&quot;)" office:value-type="string" office:string-value="insert into IBGE_MUNICIPIOS (UF, COD_UF, CODIGO_MUNICIPIO, NOME_MUNICIPIO, POP_COLETADA, POP_IMPUTADA, POP_TOTAL) values ('PR', '41', '3958', 'Campina do Simão',3931, 5, 3936);" calcext:value-type="string">
            <text:p>insert into IBGE_MUNICIPIOS (UF, COD_UF, CODIGO_MUNICIPIO, NOME_MUNICIPIO, POP_COLETADA, POP_IMPUTADA, POP_TOTAL) values ('PR', '41', '3958', 'Campina do Simão',3931, 5, 3936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4006" calcext:value-type="float">
            <text:p>4006</text:p>
          </table:table-cell>
          <table:table-cell office:value-type="string" calcext:value-type="string">
            <text:p>Campina Grande do Sul</text:p>
          </table:table-cell>
          <table:table-cell office:value-type="float" office:value="45827" calcext:value-type="float">
            <text:p>45827</text:p>
          </table:table-cell>
          <table:table-cell office:value-type="float" office:value="1998" calcext:value-type="float">
            <text:p>1998</text:p>
          </table:table-cell>
          <table:table-cell office:value-type="float" office:value="47825" calcext:value-type="float">
            <text:p>47825</text:p>
          </table:table-cell>
          <table:table-cell table:formula="of:=CONCATENATE(&quot;insert into IBGE_MUNICIPIOS (UF, COD_UF, CODIGO_MUNICIPIO, NOME_MUNICIPIO, POP_COLETADA, POP_IMPUTADA, POP_TOTAL) values ('&quot;; [.A57]; &quot;', '&quot;; [.B57]; &quot;', '&quot;; [.C57]; &quot;', '&quot;; [.D57]; &quot;',&quot;; [.E57]; &quot;, &quot;; [.F57]; &quot;, &quot;; [.G57]; &quot;);&quot;)" office:value-type="string" office:string-value="insert into IBGE_MUNICIPIOS (UF, COD_UF, CODIGO_MUNICIPIO, NOME_MUNICIPIO, POP_COLETADA, POP_IMPUTADA, POP_TOTAL) values ('PR', '41', '4006', 'Campina Grande do Sul',45827, 1998, 47825);" calcext:value-type="string">
            <text:p>insert into IBGE_MUNICIPIOS (UF, COD_UF, CODIGO_MUNICIPIO, NOME_MUNICIPIO, POP_COLETADA, POP_IMPUTADA, POP_TOTAL) values ('PR', '41', '4006', 'Campina Grande do Sul',45827, 1998, 47825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4055" calcext:value-type="float">
            <text:p>4055</text:p>
          </table:table-cell>
          <table:table-cell office:value-type="string" calcext:value-type="string">
            <text:p>Campo Bonito</text:p>
          </table:table-cell>
          <table:table-cell office:value-type="float" office:value="4021" calcext:value-type="float">
            <text:p>4021</text:p>
          </table:table-cell>
          <table:table-cell office:value-type="float" office:value="6" calcext:value-type="float">
            <text:p>6</text:p>
          </table:table-cell>
          <table:table-cell office:value-type="float" office:value="4027" calcext:value-type="float">
            <text:p>4027</text:p>
          </table:table-cell>
          <table:table-cell table:formula="of:=CONCATENATE(&quot;insert into IBGE_MUNICIPIOS (UF, COD_UF, CODIGO_MUNICIPIO, NOME_MUNICIPIO, POP_COLETADA, POP_IMPUTADA, POP_TOTAL) values ('&quot;; [.A58]; &quot;', '&quot;; [.B58]; &quot;', '&quot;; [.C58]; &quot;', '&quot;; [.D58]; &quot;',&quot;; [.E58]; &quot;, &quot;; [.F58]; &quot;, &quot;; [.G58]; &quot;);&quot;)" office:value-type="string" office:string-value="insert into IBGE_MUNICIPIOS (UF, COD_UF, CODIGO_MUNICIPIO, NOME_MUNICIPIO, POP_COLETADA, POP_IMPUTADA, POP_TOTAL) values ('PR', '41', '4055', 'Campo Bonito',4021, 6, 4027);" calcext:value-type="string">
            <text:p>insert into IBGE_MUNICIPIOS (UF, COD_UF, CODIGO_MUNICIPIO, NOME_MUNICIPIO, POP_COLETADA, POP_IMPUTADA, POP_TOTAL) values ('PR', '41', '4055', 'Campo Bonito',4021, 6, 4027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4105" calcext:value-type="float">
            <text:p>4105</text:p>
          </table:table-cell>
          <table:table-cell office:value-type="string" calcext:value-type="string">
            <text:p>Campo do Tenente</text:p>
          </table:table-cell>
          <table:table-cell office:value-type="float" office:value="7433" calcext:value-type="float">
            <text:p>7433</text:p>
          </table:table-cell>
          <table:table-cell office:value-type="float" office:value="75" calcext:value-type="float">
            <text:p>75</text:p>
          </table:table-cell>
          <table:table-cell office:value-type="float" office:value="7508" calcext:value-type="float">
            <text:p>7508</text:p>
          </table:table-cell>
          <table:table-cell table:formula="of:=CONCATENATE(&quot;insert into IBGE_MUNICIPIOS (UF, COD_UF, CODIGO_MUNICIPIO, NOME_MUNICIPIO, POP_COLETADA, POP_IMPUTADA, POP_TOTAL) values ('&quot;; [.A59]; &quot;', '&quot;; [.B59]; &quot;', '&quot;; [.C59]; &quot;', '&quot;; [.D59]; &quot;',&quot;; [.E59]; &quot;, &quot;; [.F59]; &quot;, &quot;; [.G59]; &quot;);&quot;)" office:value-type="string" office:string-value="insert into IBGE_MUNICIPIOS (UF, COD_UF, CODIGO_MUNICIPIO, NOME_MUNICIPIO, POP_COLETADA, POP_IMPUTADA, POP_TOTAL) values ('PR', '41', '4105', 'Campo do Tenente',7433, 75, 7508);" calcext:value-type="string">
            <text:p>insert into IBGE_MUNICIPIOS (UF, COD_UF, CODIGO_MUNICIPIO, NOME_MUNICIPIO, POP_COLETADA, POP_IMPUTADA, POP_TOTAL) values ('PR', '41', '4105', 'Campo do Tenente',7433, 75, 7508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4204" calcext:value-type="float">
            <text:p>4204</text:p>
          </table:table-cell>
          <table:table-cell office:value-type="string" calcext:value-type="string">
            <text:p>Campo Largo</text:p>
          </table:table-cell>
          <table:table-cell office:value-type="float" office:value="130741" calcext:value-type="float">
            <text:p>130741</text:p>
          </table:table-cell>
          <table:table-cell office:value-type="float" office:value="5586" calcext:value-type="float">
            <text:p>5586</text:p>
          </table:table-cell>
          <table:table-cell office:value-type="float" office:value="136327" calcext:value-type="float">
            <text:p>136327</text:p>
          </table:table-cell>
          <table:table-cell table:formula="of:=CONCATENATE(&quot;insert into IBGE_MUNICIPIOS (UF, COD_UF, CODIGO_MUNICIPIO, NOME_MUNICIPIO, POP_COLETADA, POP_IMPUTADA, POP_TOTAL) values ('&quot;; [.A60]; &quot;', '&quot;; [.B60]; &quot;', '&quot;; [.C60]; &quot;', '&quot;; [.D60]; &quot;',&quot;; [.E60]; &quot;, &quot;; [.F60]; &quot;, &quot;; [.G60]; &quot;);&quot;)" office:value-type="string" office:string-value="insert into IBGE_MUNICIPIOS (UF, COD_UF, CODIGO_MUNICIPIO, NOME_MUNICIPIO, POP_COLETADA, POP_IMPUTADA, POP_TOTAL) values ('PR', '41', '4204', 'Campo Largo',130741, 5586, 136327);" calcext:value-type="string">
            <text:p>insert into IBGE_MUNICIPIOS (UF, COD_UF, CODIGO_MUNICIPIO, NOME_MUNICIPIO, POP_COLETADA, POP_IMPUTADA, POP_TOTAL) values ('PR', '41', '4204', 'Campo Largo',130741, 5586, 136327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4253" calcext:value-type="float">
            <text:p>4253</text:p>
          </table:table-cell>
          <table:table-cell office:value-type="string" calcext:value-type="string">
            <text:p>Campo Magro</text:p>
          </table:table-cell>
          <table:table-cell office:value-type="float" office:value="29878" calcext:value-type="float">
            <text:p>29878</text:p>
          </table:table-cell>
          <table:table-cell office:value-type="float" office:value="282" calcext:value-type="float">
            <text:p>282</text:p>
          </table:table-cell>
          <table:table-cell office:value-type="float" office:value="30160" calcext:value-type="float">
            <text:p>30160</text:p>
          </table:table-cell>
          <table:table-cell table:formula="of:=CONCATENATE(&quot;insert into IBGE_MUNICIPIOS (UF, COD_UF, CODIGO_MUNICIPIO, NOME_MUNICIPIO, POP_COLETADA, POP_IMPUTADA, POP_TOTAL) values ('&quot;; [.A61]; &quot;', '&quot;; [.B61]; &quot;', '&quot;; [.C61]; &quot;', '&quot;; [.D61]; &quot;',&quot;; [.E61]; &quot;, &quot;; [.F61]; &quot;, &quot;; [.G61]; &quot;);&quot;)" office:value-type="string" office:string-value="insert into IBGE_MUNICIPIOS (UF, COD_UF, CODIGO_MUNICIPIO, NOME_MUNICIPIO, POP_COLETADA, POP_IMPUTADA, POP_TOTAL) values ('PR', '41', '4253', 'Campo Magro',29878, 282, 30160);" calcext:value-type="string">
            <text:p>insert into IBGE_MUNICIPIOS (UF, COD_UF, CODIGO_MUNICIPIO, NOME_MUNICIPIO, POP_COLETADA, POP_IMPUTADA, POP_TOTAL) values ('PR', '41', '4253', 'Campo Magro',29878, 282, 30160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4303" calcext:value-type="float">
            <text:p>4303</text:p>
          </table:table-cell>
          <table:table-cell office:value-type="string" calcext:value-type="string">
            <text:p>Campo Mourão</text:p>
          </table:table-cell>
          <table:table-cell office:value-type="float" office:value="94358" calcext:value-type="float">
            <text:p>94358</text:p>
          </table:table-cell>
          <table:table-cell office:value-type="float" office:value="5074" calcext:value-type="float">
            <text:p>5074</text:p>
          </table:table-cell>
          <table:table-cell office:value-type="float" office:value="99432" calcext:value-type="float">
            <text:p>99432</text:p>
          </table:table-cell>
          <table:table-cell table:formula="of:=CONCATENATE(&quot;insert into IBGE_MUNICIPIOS (UF, COD_UF, CODIGO_MUNICIPIO, NOME_MUNICIPIO, POP_COLETADA, POP_IMPUTADA, POP_TOTAL) values ('&quot;; [.A62]; &quot;', '&quot;; [.B62]; &quot;', '&quot;; [.C62]; &quot;', '&quot;; [.D62]; &quot;',&quot;; [.E62]; &quot;, &quot;; [.F62]; &quot;, &quot;; [.G62]; &quot;);&quot;)" office:value-type="string" office:string-value="insert into IBGE_MUNICIPIOS (UF, COD_UF, CODIGO_MUNICIPIO, NOME_MUNICIPIO, POP_COLETADA, POP_IMPUTADA, POP_TOTAL) values ('PR', '41', '4303', 'Campo Mourão',94358, 5074, 99432);" calcext:value-type="string">
            <text:p>insert into IBGE_MUNICIPIOS (UF, COD_UF, CODIGO_MUNICIPIO, NOME_MUNICIPIO, POP_COLETADA, POP_IMPUTADA, POP_TOTAL) values ('PR', '41', '4303', 'Campo Mourão',94358, 5074, 99432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4402" calcext:value-type="float">
            <text:p>4402</text:p>
          </table:table-cell>
          <table:table-cell office:value-type="string" calcext:value-type="string">
            <text:p>Cândido de Abreu</text:p>
          </table:table-cell>
          <table:table-cell office:value-type="float" office:value="15167" calcext:value-type="float">
            <text:p>15167</text:p>
          </table:table-cell>
          <table:table-cell office:value-type="float" office:value="77" calcext:value-type="float">
            <text:p>77</text:p>
          </table:table-cell>
          <table:table-cell office:value-type="float" office:value="15244" calcext:value-type="float">
            <text:p>15244</text:p>
          </table:table-cell>
          <table:table-cell table:formula="of:=CONCATENATE(&quot;insert into IBGE_MUNICIPIOS (UF, COD_UF, CODIGO_MUNICIPIO, NOME_MUNICIPIO, POP_COLETADA, POP_IMPUTADA, POP_TOTAL) values ('&quot;; [.A63]; &quot;', '&quot;; [.B63]; &quot;', '&quot;; [.C63]; &quot;', '&quot;; [.D63]; &quot;',&quot;; [.E63]; &quot;, &quot;; [.F63]; &quot;, &quot;; [.G63]; &quot;);&quot;)" office:value-type="string" office:string-value="insert into IBGE_MUNICIPIOS (UF, COD_UF, CODIGO_MUNICIPIO, NOME_MUNICIPIO, POP_COLETADA, POP_IMPUTADA, POP_TOTAL) values ('PR', '41', '4402', 'Cândido de Abreu',15167, 77, 15244);" calcext:value-type="string">
            <text:p>insert into IBGE_MUNICIPIOS (UF, COD_UF, CODIGO_MUNICIPIO, NOME_MUNICIPIO, POP_COLETADA, POP_IMPUTADA, POP_TOTAL) values ('PR', '41', '4402', 'Cândido de Abreu',15167, 77, 15244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4428" calcext:value-type="float">
            <text:p>4428</text:p>
          </table:table-cell>
          <table:table-cell office:value-type="string" calcext:value-type="string">
            <text:p>Candói</text:p>
          </table:table-cell>
          <table:table-cell office:value-type="float" office:value="14943" calcext:value-type="float">
            <text:p>14943</text:p>
          </table:table-cell>
          <table:table-cell office:value-type="float" office:value="30" calcext:value-type="float">
            <text:p>30</text:p>
          </table:table-cell>
          <table:table-cell office:value-type="float" office:value="14973" calcext:value-type="float">
            <text:p>14973</text:p>
          </table:table-cell>
          <table:table-cell table:formula="of:=CONCATENATE(&quot;insert into IBGE_MUNICIPIOS (UF, COD_UF, CODIGO_MUNICIPIO, NOME_MUNICIPIO, POP_COLETADA, POP_IMPUTADA, POP_TOTAL) values ('&quot;; [.A64]; &quot;', '&quot;; [.B64]; &quot;', '&quot;; [.C64]; &quot;', '&quot;; [.D64]; &quot;',&quot;; [.E64]; &quot;, &quot;; [.F64]; &quot;, &quot;; [.G64]; &quot;);&quot;)" office:value-type="string" office:string-value="insert into IBGE_MUNICIPIOS (UF, COD_UF, CODIGO_MUNICIPIO, NOME_MUNICIPIO, POP_COLETADA, POP_IMPUTADA, POP_TOTAL) values ('PR', '41', '4428', 'Candói',14943, 30, 14973);" calcext:value-type="string">
            <text:p>insert into IBGE_MUNICIPIOS (UF, COD_UF, CODIGO_MUNICIPIO, NOME_MUNICIPIO, POP_COLETADA, POP_IMPUTADA, POP_TOTAL) values ('PR', '41', '4428', 'Candói',14943, 30, 14973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4451" calcext:value-type="float">
            <text:p>4451</text:p>
          </table:table-cell>
          <table:table-cell office:value-type="string" calcext:value-type="string">
            <text:p>Cantagalo</text:p>
          </table:table-cell>
          <table:table-cell office:value-type="float" office:value="10596" calcext:value-type="float">
            <text:p>10596</text:p>
          </table:table-cell>
          <table:table-cell office:value-type="float" office:value="337" calcext:value-type="float">
            <text:p>337</text:p>
          </table:table-cell>
          <table:table-cell office:value-type="float" office:value="10933" calcext:value-type="float">
            <text:p>10933</text:p>
          </table:table-cell>
          <table:table-cell table:formula="of:=CONCATENATE(&quot;insert into IBGE_MUNICIPIOS (UF, COD_UF, CODIGO_MUNICIPIO, NOME_MUNICIPIO, POP_COLETADA, POP_IMPUTADA, POP_TOTAL) values ('&quot;; [.A65]; &quot;', '&quot;; [.B65]; &quot;', '&quot;; [.C65]; &quot;', '&quot;; [.D65]; &quot;',&quot;; [.E65]; &quot;, &quot;; [.F65]; &quot;, &quot;; [.G65]; &quot;);&quot;)" office:value-type="string" office:string-value="insert into IBGE_MUNICIPIOS (UF, COD_UF, CODIGO_MUNICIPIO, NOME_MUNICIPIO, POP_COLETADA, POP_IMPUTADA, POP_TOTAL) values ('PR', '41', '4451', 'Cantagalo',10596, 337, 10933);" calcext:value-type="string">
            <text:p>insert into IBGE_MUNICIPIOS (UF, COD_UF, CODIGO_MUNICIPIO, NOME_MUNICIPIO, POP_COLETADA, POP_IMPUTADA, POP_TOTAL) values ('PR', '41', '4451', 'Cantagalo',10596, 337, 10933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4501" calcext:value-type="float">
            <text:p>4501</text:p>
          </table:table-cell>
          <table:table-cell office:value-type="string" calcext:value-type="string">
            <text:p>Capanema</text:p>
          </table:table-cell>
          <table:table-cell office:value-type="float" office:value="20210" calcext:value-type="float">
            <text:p>20210</text:p>
          </table:table-cell>
          <table:table-cell office:value-type="float" office:value="271" calcext:value-type="float">
            <text:p>271</text:p>
          </table:table-cell>
          <table:table-cell office:value-type="float" office:value="20481" calcext:value-type="float">
            <text:p>20481</text:p>
          </table:table-cell>
          <table:table-cell table:formula="of:=CONCATENATE(&quot;insert into IBGE_MUNICIPIOS (UF, COD_UF, CODIGO_MUNICIPIO, NOME_MUNICIPIO, POP_COLETADA, POP_IMPUTADA, POP_TOTAL) values ('&quot;; [.A66]; &quot;', '&quot;; [.B66]; &quot;', '&quot;; [.C66]; &quot;', '&quot;; [.D66]; &quot;',&quot;; [.E66]; &quot;, &quot;; [.F66]; &quot;, &quot;; [.G66]; &quot;);&quot;)" office:value-type="string" office:string-value="insert into IBGE_MUNICIPIOS (UF, COD_UF, CODIGO_MUNICIPIO, NOME_MUNICIPIO, POP_COLETADA, POP_IMPUTADA, POP_TOTAL) values ('PR', '41', '4501', 'Capanema',20210, 271, 20481);" calcext:value-type="string">
            <text:p>insert into IBGE_MUNICIPIOS (UF, COD_UF, CODIGO_MUNICIPIO, NOME_MUNICIPIO, POP_COLETADA, POP_IMPUTADA, POP_TOTAL) values ('PR', '41', '4501', 'Capanema',20210, 271, 20481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4600" calcext:value-type="float">
            <text:p>4600</text:p>
          </table:table-cell>
          <table:table-cell office:value-type="string" calcext:value-type="string">
            <text:p>Capitão Leônidas Marques</text:p>
          </table:table-cell>
          <table:table-cell office:value-type="float" office:value="13960" calcext:value-type="float">
            <text:p>13960</text:p>
          </table:table-cell>
          <table:table-cell office:value-type="float" office:value="688" calcext:value-type="float">
            <text:p>688</text:p>
          </table:table-cell>
          <table:table-cell office:value-type="float" office:value="14648" calcext:value-type="float">
            <text:p>14648</text:p>
          </table:table-cell>
          <table:table-cell table:formula="of:=CONCATENATE(&quot;insert into IBGE_MUNICIPIOS (UF, COD_UF, CODIGO_MUNICIPIO, NOME_MUNICIPIO, POP_COLETADA, POP_IMPUTADA, POP_TOTAL) values ('&quot;; [.A67]; &quot;', '&quot;; [.B67]; &quot;', '&quot;; [.C67]; &quot;', '&quot;; [.D67]; &quot;',&quot;; [.E67]; &quot;, &quot;; [.F67]; &quot;, &quot;; [.G67]; &quot;);&quot;)" office:value-type="string" office:string-value="insert into IBGE_MUNICIPIOS (UF, COD_UF, CODIGO_MUNICIPIO, NOME_MUNICIPIO, POP_COLETADA, POP_IMPUTADA, POP_TOTAL) values ('PR', '41', '4600', 'Capitão Leônidas Marques',13960, 688, 14648);" calcext:value-type="string">
            <text:p>insert into IBGE_MUNICIPIOS (UF, COD_UF, CODIGO_MUNICIPIO, NOME_MUNICIPIO, POP_COLETADA, POP_IMPUTADA, POP_TOTAL) values ('PR', '41', '4600', 'Capitão Leônidas Marques',13960, 688, 14648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4659" calcext:value-type="float">
            <text:p>4659</text:p>
          </table:table-cell>
          <table:table-cell office:value-type="string" calcext:value-type="string">
            <text:p>Carambeí</text:p>
          </table:table-cell>
          <table:table-cell office:value-type="float" office:value="22773" calcext:value-type="float">
            <text:p>22773</text:p>
          </table:table-cell>
          <table:table-cell office:value-type="float" office:value="510" calcext:value-type="float">
            <text:p>510</text:p>
          </table:table-cell>
          <table:table-cell office:value-type="float" office:value="23283" calcext:value-type="float">
            <text:p>23283</text:p>
          </table:table-cell>
          <table:table-cell table:formula="of:=CONCATENATE(&quot;insert into IBGE_MUNICIPIOS (UF, COD_UF, CODIGO_MUNICIPIO, NOME_MUNICIPIO, POP_COLETADA, POP_IMPUTADA, POP_TOTAL) values ('&quot;; [.A68]; &quot;', '&quot;; [.B68]; &quot;', '&quot;; [.C68]; &quot;', '&quot;; [.D68]; &quot;',&quot;; [.E68]; &quot;, &quot;; [.F68]; &quot;, &quot;; [.G68]; &quot;);&quot;)" office:value-type="string" office:string-value="insert into IBGE_MUNICIPIOS (UF, COD_UF, CODIGO_MUNICIPIO, NOME_MUNICIPIO, POP_COLETADA, POP_IMPUTADA, POP_TOTAL) values ('PR', '41', '4659', 'Carambeí',22773, 510, 23283);" calcext:value-type="string">
            <text:p>insert into IBGE_MUNICIPIOS (UF, COD_UF, CODIGO_MUNICIPIO, NOME_MUNICIPIO, POP_COLETADA, POP_IMPUTADA, POP_TOTAL) values ('PR', '41', '4659', 'Carambeí',22773, 510, 23283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4709" calcext:value-type="float">
            <text:p>4709</text:p>
          </table:table-cell>
          <table:table-cell office:value-type="string" calcext:value-type="string">
            <text:p>Carlópolis</text:p>
          </table:table-cell>
          <table:table-cell office:value-type="float" office:value="16769" calcext:value-type="float">
            <text:p>16769</text:p>
          </table:table-cell>
          <table:table-cell office:value-type="float" office:value="136" calcext:value-type="float">
            <text:p>136</text:p>
          </table:table-cell>
          <table:table-cell office:value-type="float" office:value="16905" calcext:value-type="float">
            <text:p>16905</text:p>
          </table:table-cell>
          <table:table-cell table:formula="of:=CONCATENATE(&quot;insert into IBGE_MUNICIPIOS (UF, COD_UF, CODIGO_MUNICIPIO, NOME_MUNICIPIO, POP_COLETADA, POP_IMPUTADA, POP_TOTAL) values ('&quot;; [.A69]; &quot;', '&quot;; [.B69]; &quot;', '&quot;; [.C69]; &quot;', '&quot;; [.D69]; &quot;',&quot;; [.E69]; &quot;, &quot;; [.F69]; &quot;, &quot;; [.G69]; &quot;);&quot;)" office:value-type="string" office:string-value="insert into IBGE_MUNICIPIOS (UF, COD_UF, CODIGO_MUNICIPIO, NOME_MUNICIPIO, POP_COLETADA, POP_IMPUTADA, POP_TOTAL) values ('PR', '41', '4709', 'Carlópolis',16769, 136, 16905);" calcext:value-type="string">
            <text:p>insert into IBGE_MUNICIPIOS (UF, COD_UF, CODIGO_MUNICIPIO, NOME_MUNICIPIO, POP_COLETADA, POP_IMPUTADA, POP_TOTAL) values ('PR', '41', '4709', 'Carlópolis',16769, 136, 16905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4808" calcext:value-type="float">
            <text:p>4808</text:p>
          </table:table-cell>
          <table:table-cell office:value-type="string" calcext:value-type="string">
            <text:p>Cascavel</text:p>
          </table:table-cell>
          <table:table-cell office:value-type="float" office:value="321818" calcext:value-type="float">
            <text:p>321818</text:p>
          </table:table-cell>
          <table:table-cell office:value-type="float" office:value="26233" calcext:value-type="float">
            <text:p>26233</text:p>
          </table:table-cell>
          <table:table-cell office:value-type="float" office:value="348051" calcext:value-type="float">
            <text:p>348051</text:p>
          </table:table-cell>
          <table:table-cell table:formula="of:=CONCATENATE(&quot;insert into IBGE_MUNICIPIOS (UF, COD_UF, CODIGO_MUNICIPIO, NOME_MUNICIPIO, POP_COLETADA, POP_IMPUTADA, POP_TOTAL) values ('&quot;; [.A70]; &quot;', '&quot;; [.B70]; &quot;', '&quot;; [.C70]; &quot;', '&quot;; [.D70]; &quot;',&quot;; [.E70]; &quot;, &quot;; [.F70]; &quot;, &quot;; [.G70]; &quot;);&quot;)" office:value-type="string" office:string-value="insert into IBGE_MUNICIPIOS (UF, COD_UF, CODIGO_MUNICIPIO, NOME_MUNICIPIO, POP_COLETADA, POP_IMPUTADA, POP_TOTAL) values ('PR', '41', '4808', 'Cascavel',321818, 26233, 348051);" calcext:value-type="string">
            <text:p>insert into IBGE_MUNICIPIOS (UF, COD_UF, CODIGO_MUNICIPIO, NOME_MUNICIPIO, POP_COLETADA, POP_IMPUTADA, POP_TOTAL) values ('PR', '41', '4808', 'Cascavel',321818, 26233, 348051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4907" calcext:value-type="float">
            <text:p>4907</text:p>
          </table:table-cell>
          <table:table-cell office:value-type="string" calcext:value-type="string">
            <text:p>Castro</text:p>
          </table:table-cell>
          <table:table-cell office:value-type="float" office:value="70175" calcext:value-type="float">
            <text:p>70175</text:p>
          </table:table-cell>
          <table:table-cell office:value-type="float" office:value="2900" calcext:value-type="float">
            <text:p>2900</text:p>
          </table:table-cell>
          <table:table-cell office:value-type="float" office:value="73075" calcext:value-type="float">
            <text:p>73075</text:p>
          </table:table-cell>
          <table:table-cell table:formula="of:=CONCATENATE(&quot;insert into IBGE_MUNICIPIOS (UF, COD_UF, CODIGO_MUNICIPIO, NOME_MUNICIPIO, POP_COLETADA, POP_IMPUTADA, POP_TOTAL) values ('&quot;; [.A71]; &quot;', '&quot;; [.B71]; &quot;', '&quot;; [.C71]; &quot;', '&quot;; [.D71]; &quot;',&quot;; [.E71]; &quot;, &quot;; [.F71]; &quot;, &quot;; [.G71]; &quot;);&quot;)" office:value-type="string" office:string-value="insert into IBGE_MUNICIPIOS (UF, COD_UF, CODIGO_MUNICIPIO, NOME_MUNICIPIO, POP_COLETADA, POP_IMPUTADA, POP_TOTAL) values ('PR', '41', '4907', 'Castro',70175, 2900, 73075);" calcext:value-type="string">
            <text:p>insert into IBGE_MUNICIPIOS (UF, COD_UF, CODIGO_MUNICIPIO, NOME_MUNICIPIO, POP_COLETADA, POP_IMPUTADA, POP_TOTAL) values ('PR', '41', '4907', 'Castro',70175, 2900, 73075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5003" calcext:value-type="float">
            <text:p>5003</text:p>
          </table:table-cell>
          <table:table-cell office:value-type="string" calcext:value-type="string">
            <text:p>Catanduvas</text:p>
          </table:table-cell>
          <table:table-cell office:value-type="float" office:value="10409" calcext:value-type="float">
            <text:p>10409</text:p>
          </table:table-cell>
          <table:table-cell office:value-type="float" office:value="37" calcext:value-type="float">
            <text:p>37</text:p>
          </table:table-cell>
          <table:table-cell office:value-type="float" office:value="10446" calcext:value-type="float">
            <text:p>10446</text:p>
          </table:table-cell>
          <table:table-cell table:formula="of:=CONCATENATE(&quot;insert into IBGE_MUNICIPIOS (UF, COD_UF, CODIGO_MUNICIPIO, NOME_MUNICIPIO, POP_COLETADA, POP_IMPUTADA, POP_TOTAL) values ('&quot;; [.A72]; &quot;', '&quot;; [.B72]; &quot;', '&quot;; [.C72]; &quot;', '&quot;; [.D72]; &quot;',&quot;; [.E72]; &quot;, &quot;; [.F72]; &quot;, &quot;; [.G72]; &quot;);&quot;)" office:value-type="string" office:string-value="insert into IBGE_MUNICIPIOS (UF, COD_UF, CODIGO_MUNICIPIO, NOME_MUNICIPIO, POP_COLETADA, POP_IMPUTADA, POP_TOTAL) values ('PR', '41', '5003', 'Catanduvas',10409, 37, 10446);" calcext:value-type="string">
            <text:p>insert into IBGE_MUNICIPIOS (UF, COD_UF, CODIGO_MUNICIPIO, NOME_MUNICIPIO, POP_COLETADA, POP_IMPUTADA, POP_TOTAL) values ('PR', '41', '5003', 'Catanduvas',10409, 37, 10446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5102" calcext:value-type="float">
            <text:p>5102</text:p>
          </table:table-cell>
          <table:table-cell office:value-type="string" calcext:value-type="string">
            <text:p>Centenário do Sul</text:p>
          </table:table-cell>
          <table:table-cell office:value-type="float" office:value="10784" calcext:value-type="float">
            <text:p>10784</text:p>
          </table:table-cell>
          <table:table-cell office:value-type="float" office:value="48" calcext:value-type="float">
            <text:p>48</text:p>
          </table:table-cell>
          <table:table-cell office:value-type="float" office:value="10832" calcext:value-type="float">
            <text:p>10832</text:p>
          </table:table-cell>
          <table:table-cell table:formula="of:=CONCATENATE(&quot;insert into IBGE_MUNICIPIOS (UF, COD_UF, CODIGO_MUNICIPIO, NOME_MUNICIPIO, POP_COLETADA, POP_IMPUTADA, POP_TOTAL) values ('&quot;; [.A73]; &quot;', '&quot;; [.B73]; &quot;', '&quot;; [.C73]; &quot;', '&quot;; [.D73]; &quot;',&quot;; [.E73]; &quot;, &quot;; [.F73]; &quot;, &quot;; [.G73]; &quot;);&quot;)" office:value-type="string" office:string-value="insert into IBGE_MUNICIPIOS (UF, COD_UF, CODIGO_MUNICIPIO, NOME_MUNICIPIO, POP_COLETADA, POP_IMPUTADA, POP_TOTAL) values ('PR', '41', '5102', 'Centenário do Sul',10784, 48, 10832);" calcext:value-type="string">
            <text:p>insert into IBGE_MUNICIPIOS (UF, COD_UF, CODIGO_MUNICIPIO, NOME_MUNICIPIO, POP_COLETADA, POP_IMPUTADA, POP_TOTAL) values ('PR', '41', '5102', 'Centenário do Sul',10784, 48, 10832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5201" calcext:value-type="float">
            <text:p>5201</text:p>
          </table:table-cell>
          <table:table-cell office:value-type="string" calcext:value-type="string">
            <text:p>Cerro Azul</text:p>
          </table:table-cell>
          <table:table-cell office:value-type="float" office:value="15785" calcext:value-type="float">
            <text:p>15785</text:p>
          </table:table-cell>
          <table:table-cell office:value-type="float" office:value="349" calcext:value-type="float">
            <text:p>349</text:p>
          </table:table-cell>
          <table:table-cell office:value-type="float" office:value="16134" calcext:value-type="float">
            <text:p>16134</text:p>
          </table:table-cell>
          <table:table-cell table:formula="of:=CONCATENATE(&quot;insert into IBGE_MUNICIPIOS (UF, COD_UF, CODIGO_MUNICIPIO, NOME_MUNICIPIO, POP_COLETADA, POP_IMPUTADA, POP_TOTAL) values ('&quot;; [.A74]; &quot;', '&quot;; [.B74]; &quot;', '&quot;; [.C74]; &quot;', '&quot;; [.D74]; &quot;',&quot;; [.E74]; &quot;, &quot;; [.F74]; &quot;, &quot;; [.G74]; &quot;);&quot;)" office:value-type="string" office:string-value="insert into IBGE_MUNICIPIOS (UF, COD_UF, CODIGO_MUNICIPIO, NOME_MUNICIPIO, POP_COLETADA, POP_IMPUTADA, POP_TOTAL) values ('PR', '41', '5201', 'Cerro Azul',15785, 349, 16134);" calcext:value-type="string">
            <text:p>insert into IBGE_MUNICIPIOS (UF, COD_UF, CODIGO_MUNICIPIO, NOME_MUNICIPIO, POP_COLETADA, POP_IMPUTADA, POP_TOTAL) values ('PR', '41', '5201', 'Cerro Azul',15785, 349, 16134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5300" calcext:value-type="float">
            <text:p>5300</text:p>
          </table:table-cell>
          <table:table-cell office:value-type="string" calcext:value-type="string">
            <text:p>Céu Azul</text:p>
          </table:table-cell>
          <table:table-cell office:value-type="float" office:value="11030" calcext:value-type="float">
            <text:p>11030</text:p>
          </table:table-cell>
          <table:table-cell office:value-type="float" office:value="57" calcext:value-type="float">
            <text:p>57</text:p>
          </table:table-cell>
          <table:table-cell office:value-type="float" office:value="11087" calcext:value-type="float">
            <text:p>11087</text:p>
          </table:table-cell>
          <table:table-cell table:formula="of:=CONCATENATE(&quot;insert into IBGE_MUNICIPIOS (UF, COD_UF, CODIGO_MUNICIPIO, NOME_MUNICIPIO, POP_COLETADA, POP_IMPUTADA, POP_TOTAL) values ('&quot;; [.A75]; &quot;', '&quot;; [.B75]; &quot;', '&quot;; [.C75]; &quot;', '&quot;; [.D75]; &quot;',&quot;; [.E75]; &quot;, &quot;; [.F75]; &quot;, &quot;; [.G75]; &quot;);&quot;)" office:value-type="string" office:string-value="insert into IBGE_MUNICIPIOS (UF, COD_UF, CODIGO_MUNICIPIO, NOME_MUNICIPIO, POP_COLETADA, POP_IMPUTADA, POP_TOTAL) values ('PR', '41', '5300', 'Céu Azul',11030, 57, 11087);" calcext:value-type="string">
            <text:p>insert into IBGE_MUNICIPIOS (UF, COD_UF, CODIGO_MUNICIPIO, NOME_MUNICIPIO, POP_COLETADA, POP_IMPUTADA, POP_TOTAL) values ('PR', '41', '5300', 'Céu Azul',11030, 57, 11087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5409" calcext:value-type="float">
            <text:p>5409</text:p>
          </table:table-cell>
          <table:table-cell office:value-type="string" calcext:value-type="string">
            <text:p>Chopinzinho</text:p>
          </table:table-cell>
          <table:table-cell office:value-type="float" office:value="20532" calcext:value-type="float">
            <text:p>20532</text:p>
          </table:table-cell>
          <table:table-cell office:value-type="float" office:value="553" calcext:value-type="float">
            <text:p>553</text:p>
          </table:table-cell>
          <table:table-cell office:value-type="float" office:value="21085" calcext:value-type="float">
            <text:p>21085</text:p>
          </table:table-cell>
          <table:table-cell table:formula="of:=CONCATENATE(&quot;insert into IBGE_MUNICIPIOS (UF, COD_UF, CODIGO_MUNICIPIO, NOME_MUNICIPIO, POP_COLETADA, POP_IMPUTADA, POP_TOTAL) values ('&quot;; [.A76]; &quot;', '&quot;; [.B76]; &quot;', '&quot;; [.C76]; &quot;', '&quot;; [.D76]; &quot;',&quot;; [.E76]; &quot;, &quot;; [.F76]; &quot;, &quot;; [.G76]; &quot;);&quot;)" office:value-type="string" office:string-value="insert into IBGE_MUNICIPIOS (UF, COD_UF, CODIGO_MUNICIPIO, NOME_MUNICIPIO, POP_COLETADA, POP_IMPUTADA, POP_TOTAL) values ('PR', '41', '5409', 'Chopinzinho',20532, 553, 21085);" calcext:value-type="string">
            <text:p>insert into IBGE_MUNICIPIOS (UF, COD_UF, CODIGO_MUNICIPIO, NOME_MUNICIPIO, POP_COLETADA, POP_IMPUTADA, POP_TOTAL) values ('PR', '41', '5409', 'Chopinzinho',20532, 553, 21085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5508" calcext:value-type="float">
            <text:p>5508</text:p>
          </table:table-cell>
          <table:table-cell office:value-type="string" calcext:value-type="string">
            <text:p>Cianorte</text:p>
          </table:table-cell>
          <table:table-cell office:value-type="float" office:value="73943" calcext:value-type="float">
            <text:p>73943</text:p>
          </table:table-cell>
          <table:table-cell office:value-type="float" office:value="5584" calcext:value-type="float">
            <text:p>5584</text:p>
          </table:table-cell>
          <table:table-cell office:value-type="float" office:value="79527" calcext:value-type="float">
            <text:p>79527</text:p>
          </table:table-cell>
          <table:table-cell table:formula="of:=CONCATENATE(&quot;insert into IBGE_MUNICIPIOS (UF, COD_UF, CODIGO_MUNICIPIO, NOME_MUNICIPIO, POP_COLETADA, POP_IMPUTADA, POP_TOTAL) values ('&quot;; [.A77]; &quot;', '&quot;; [.B77]; &quot;', '&quot;; [.C77]; &quot;', '&quot;; [.D77]; &quot;',&quot;; [.E77]; &quot;, &quot;; [.F77]; &quot;, &quot;; [.G77]; &quot;);&quot;)" office:value-type="string" office:string-value="insert into IBGE_MUNICIPIOS (UF, COD_UF, CODIGO_MUNICIPIO, NOME_MUNICIPIO, POP_COLETADA, POP_IMPUTADA, POP_TOTAL) values ('PR', '41', '5508', 'Cianorte',73943, 5584, 79527);" calcext:value-type="string">
            <text:p>insert into IBGE_MUNICIPIOS (UF, COD_UF, CODIGO_MUNICIPIO, NOME_MUNICIPIO, POP_COLETADA, POP_IMPUTADA, POP_TOTAL) values ('PR', '41', '5508', 'Cianorte',73943, 5584, 79527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5607" calcext:value-type="float">
            <text:p>5607</text:p>
          </table:table-cell>
          <table:table-cell office:value-type="string" calcext:value-type="string">
            <text:p>Cidade Gaúcha</text:p>
          </table:table-cell>
          <table:table-cell office:value-type="float" office:value="11463" calcext:value-type="float">
            <text:p>11463</text:p>
          </table:table-cell>
          <table:table-cell office:value-type="float" office:value="4" calcext:value-type="float">
            <text:p>4</text:p>
          </table:table-cell>
          <table:table-cell office:value-type="float" office:value="11467" calcext:value-type="float">
            <text:p>11467</text:p>
          </table:table-cell>
          <table:table-cell table:formula="of:=CONCATENATE(&quot;insert into IBGE_MUNICIPIOS (UF, COD_UF, CODIGO_MUNICIPIO, NOME_MUNICIPIO, POP_COLETADA, POP_IMPUTADA, POP_TOTAL) values ('&quot;; [.A78]; &quot;', '&quot;; [.B78]; &quot;', '&quot;; [.C78]; &quot;', '&quot;; [.D78]; &quot;',&quot;; [.E78]; &quot;, &quot;; [.F78]; &quot;, &quot;; [.G78]; &quot;);&quot;)" office:value-type="string" office:string-value="insert into IBGE_MUNICIPIOS (UF, COD_UF, CODIGO_MUNICIPIO, NOME_MUNICIPIO, POP_COLETADA, POP_IMPUTADA, POP_TOTAL) values ('PR', '41', '5607', 'Cidade Gaúcha',11463, 4, 11467);" calcext:value-type="string">
            <text:p>insert into IBGE_MUNICIPIOS (UF, COD_UF, CODIGO_MUNICIPIO, NOME_MUNICIPIO, POP_COLETADA, POP_IMPUTADA, POP_TOTAL) values ('PR', '41', '5607', 'Cidade Gaúcha',11463, 4, 11467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5706" calcext:value-type="float">
            <text:p>5706</text:p>
          </table:table-cell>
          <table:table-cell office:value-type="string" calcext:value-type="string">
            <text:p>Clevelândia</text:p>
          </table:table-cell>
          <table:table-cell office:value-type="float" office:value="14620" calcext:value-type="float">
            <text:p>14620</text:p>
          </table:table-cell>
          <table:table-cell office:value-type="float" office:value="450" calcext:value-type="float">
            <text:p>450</text:p>
          </table:table-cell>
          <table:table-cell office:value-type="float" office:value="15070" calcext:value-type="float">
            <text:p>15070</text:p>
          </table:table-cell>
          <table:table-cell table:formula="of:=CONCATENATE(&quot;insert into IBGE_MUNICIPIOS (UF, COD_UF, CODIGO_MUNICIPIO, NOME_MUNICIPIO, POP_COLETADA, POP_IMPUTADA, POP_TOTAL) values ('&quot;; [.A79]; &quot;', '&quot;; [.B79]; &quot;', '&quot;; [.C79]; &quot;', '&quot;; [.D79]; &quot;',&quot;; [.E79]; &quot;, &quot;; [.F79]; &quot;, &quot;; [.G79]; &quot;);&quot;)" office:value-type="string" office:string-value="insert into IBGE_MUNICIPIOS (UF, COD_UF, CODIGO_MUNICIPIO, NOME_MUNICIPIO, POP_COLETADA, POP_IMPUTADA, POP_TOTAL) values ('PR', '41', '5706', 'Clevelândia',14620, 450, 15070);" calcext:value-type="string">
            <text:p>insert into IBGE_MUNICIPIOS (UF, COD_UF, CODIGO_MUNICIPIO, NOME_MUNICIPIO, POP_COLETADA, POP_IMPUTADA, POP_TOTAL) values ('PR', '41', '5706', 'Clevelândia',14620, 450, 15070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5805" calcext:value-type="float">
            <text:p>5805</text:p>
          </table:table-cell>
          <table:table-cell office:value-type="string" calcext:value-type="string">
            <text:p>Colombo</text:p>
          </table:table-cell>
          <table:table-cell office:value-type="float" office:value="219900" calcext:value-type="float">
            <text:p>219900</text:p>
          </table:table-cell>
          <table:table-cell office:value-type="float" office:value="12312" calcext:value-type="float">
            <text:p>12312</text:p>
          </table:table-cell>
          <table:table-cell office:value-type="float" office:value="232212" calcext:value-type="float">
            <text:p>232212</text:p>
          </table:table-cell>
          <table:table-cell table:formula="of:=CONCATENATE(&quot;insert into IBGE_MUNICIPIOS (UF, COD_UF, CODIGO_MUNICIPIO, NOME_MUNICIPIO, POP_COLETADA, POP_IMPUTADA, POP_TOTAL) values ('&quot;; [.A80]; &quot;', '&quot;; [.B80]; &quot;', '&quot;; [.C80]; &quot;', '&quot;; [.D80]; &quot;',&quot;; [.E80]; &quot;, &quot;; [.F80]; &quot;, &quot;; [.G80]; &quot;);&quot;)" office:value-type="string" office:string-value="insert into IBGE_MUNICIPIOS (UF, COD_UF, CODIGO_MUNICIPIO, NOME_MUNICIPIO, POP_COLETADA, POP_IMPUTADA, POP_TOTAL) values ('PR', '41', '5805', 'Colombo',219900, 12312, 232212);" calcext:value-type="string">
            <text:p>insert into IBGE_MUNICIPIOS (UF, COD_UF, CODIGO_MUNICIPIO, NOME_MUNICIPIO, POP_COLETADA, POP_IMPUTADA, POP_TOTAL) values ('PR', '41', '5805', 'Colombo',219900, 12312, 232212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5904" calcext:value-type="float">
            <text:p>5904</text:p>
          </table:table-cell>
          <table:table-cell office:value-type="string" calcext:value-type="string">
            <text:p>Colorado</text:p>
          </table:table-cell>
          <table:table-cell office:value-type="float" office:value="22862" calcext:value-type="float">
            <text:p>22862</text:p>
          </table:table-cell>
          <table:table-cell office:value-type="float" office:value="34" calcext:value-type="float">
            <text:p>34</text:p>
          </table:table-cell>
          <table:table-cell office:value-type="float" office:value="22896" calcext:value-type="float">
            <text:p>22896</text:p>
          </table:table-cell>
          <table:table-cell table:formula="of:=CONCATENATE(&quot;insert into IBGE_MUNICIPIOS (UF, COD_UF, CODIGO_MUNICIPIO, NOME_MUNICIPIO, POP_COLETADA, POP_IMPUTADA, POP_TOTAL) values ('&quot;; [.A81]; &quot;', '&quot;; [.B81]; &quot;', '&quot;; [.C81]; &quot;', '&quot;; [.D81]; &quot;',&quot;; [.E81]; &quot;, &quot;; [.F81]; &quot;, &quot;; [.G81]; &quot;);&quot;)" office:value-type="string" office:string-value="insert into IBGE_MUNICIPIOS (UF, COD_UF, CODIGO_MUNICIPIO, NOME_MUNICIPIO, POP_COLETADA, POP_IMPUTADA, POP_TOTAL) values ('PR', '41', '5904', 'Colorado',22862, 34, 22896);" calcext:value-type="string">
            <text:p>insert into IBGE_MUNICIPIOS (UF, COD_UF, CODIGO_MUNICIPIO, NOME_MUNICIPIO, POP_COLETADA, POP_IMPUTADA, POP_TOTAL) values ('PR', '41', '5904', 'Colorado',22862, 34, 22896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6001" calcext:value-type="float">
            <text:p>6001</text:p>
          </table:table-cell>
          <table:table-cell office:value-type="string" calcext:value-type="string">
            <text:p>Congonhinhas</text:p>
          </table:table-cell>
          <table:table-cell office:value-type="float" office:value="8303" calcext:value-type="float">
            <text:p>8303</text:p>
          </table:table-cell>
          <table:table-cell office:value-type="float" office:value="17" calcext:value-type="float">
            <text:p>17</text:p>
          </table:table-cell>
          <table:table-cell office:value-type="float" office:value="8320" calcext:value-type="float">
            <text:p>8320</text:p>
          </table:table-cell>
          <table:table-cell table:formula="of:=CONCATENATE(&quot;insert into IBGE_MUNICIPIOS (UF, COD_UF, CODIGO_MUNICIPIO, NOME_MUNICIPIO, POP_COLETADA, POP_IMPUTADA, POP_TOTAL) values ('&quot;; [.A82]; &quot;', '&quot;; [.B82]; &quot;', '&quot;; [.C82]; &quot;', '&quot;; [.D82]; &quot;',&quot;; [.E82]; &quot;, &quot;; [.F82]; &quot;, &quot;; [.G82]; &quot;);&quot;)" office:value-type="string" office:string-value="insert into IBGE_MUNICIPIOS (UF, COD_UF, CODIGO_MUNICIPIO, NOME_MUNICIPIO, POP_COLETADA, POP_IMPUTADA, POP_TOTAL) values ('PR', '41', '6001', 'Congonhinhas',8303, 17, 8320);" calcext:value-type="string">
            <text:p>insert into IBGE_MUNICIPIOS (UF, COD_UF, CODIGO_MUNICIPIO, NOME_MUNICIPIO, POP_COLETADA, POP_IMPUTADA, POP_TOTAL) values ('PR', '41', '6001', 'Congonhinhas',8303, 17, 8320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6100" calcext:value-type="float">
            <text:p>6100</text:p>
          </table:table-cell>
          <table:table-cell office:value-type="string" calcext:value-type="string">
            <text:p>Conselheiro Mairinck</text:p>
          </table:table-cell>
          <table:table-cell office:value-type="float" office:value="3396" calcext:value-type="float">
            <text:p>3396</text:p>
          </table:table-cell>
          <table:table-cell office:value-type="float" office:value="65" calcext:value-type="float">
            <text:p>65</text:p>
          </table:table-cell>
          <table:table-cell office:value-type="float" office:value="3461" calcext:value-type="float">
            <text:p>3461</text:p>
          </table:table-cell>
          <table:table-cell table:formula="of:=CONCATENATE(&quot;insert into IBGE_MUNICIPIOS (UF, COD_UF, CODIGO_MUNICIPIO, NOME_MUNICIPIO, POP_COLETADA, POP_IMPUTADA, POP_TOTAL) values ('&quot;; [.A83]; &quot;', '&quot;; [.B83]; &quot;', '&quot;; [.C83]; &quot;', '&quot;; [.D83]; &quot;',&quot;; [.E83]; &quot;, &quot;; [.F83]; &quot;, &quot;; [.G83]; &quot;);&quot;)" office:value-type="string" office:string-value="insert into IBGE_MUNICIPIOS (UF, COD_UF, CODIGO_MUNICIPIO, NOME_MUNICIPIO, POP_COLETADA, POP_IMPUTADA, POP_TOTAL) values ('PR', '41', '6100', 'Conselheiro Mairinck',3396, 65, 3461);" calcext:value-type="string">
            <text:p>insert into IBGE_MUNICIPIOS (UF, COD_UF, CODIGO_MUNICIPIO, NOME_MUNICIPIO, POP_COLETADA, POP_IMPUTADA, POP_TOTAL) values ('PR', '41', '6100', 'Conselheiro Mairinck',3396, 65, 3461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6209" calcext:value-type="float">
            <text:p>6209</text:p>
          </table:table-cell>
          <table:table-cell office:value-type="string" calcext:value-type="string">
            <text:p>Contenda</text:p>
          </table:table-cell>
          <table:table-cell office:value-type="float" office:value="18324" calcext:value-type="float">
            <text:p>18324</text:p>
          </table:table-cell>
          <table:table-cell office:value-type="float" office:value="804" calcext:value-type="float">
            <text:p>804</text:p>
          </table:table-cell>
          <table:table-cell office:value-type="float" office:value="19128" calcext:value-type="float">
            <text:p>19128</text:p>
          </table:table-cell>
          <table:table-cell table:formula="of:=CONCATENATE(&quot;insert into IBGE_MUNICIPIOS (UF, COD_UF, CODIGO_MUNICIPIO, NOME_MUNICIPIO, POP_COLETADA, POP_IMPUTADA, POP_TOTAL) values ('&quot;; [.A84]; &quot;', '&quot;; [.B84]; &quot;', '&quot;; [.C84]; &quot;', '&quot;; [.D84]; &quot;',&quot;; [.E84]; &quot;, &quot;; [.F84]; &quot;, &quot;; [.G84]; &quot;);&quot;)" office:value-type="string" office:string-value="insert into IBGE_MUNICIPIOS (UF, COD_UF, CODIGO_MUNICIPIO, NOME_MUNICIPIO, POP_COLETADA, POP_IMPUTADA, POP_TOTAL) values ('PR', '41', '6209', 'Contenda',18324, 804, 19128);" calcext:value-type="string">
            <text:p>insert into IBGE_MUNICIPIOS (UF, COD_UF, CODIGO_MUNICIPIO, NOME_MUNICIPIO, POP_COLETADA, POP_IMPUTADA, POP_TOTAL) values ('PR', '41', '6209', 'Contenda',18324, 804, 19128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6308" calcext:value-type="float">
            <text:p>6308</text:p>
          </table:table-cell>
          <table:table-cell office:value-type="string" calcext:value-type="string">
            <text:p>Corbélia</text:p>
          </table:table-cell>
          <table:table-cell office:value-type="float" office:value="17369" calcext:value-type="float">
            <text:p>17369</text:p>
          </table:table-cell>
          <table:table-cell office:value-type="float" office:value="101" calcext:value-type="float">
            <text:p>101</text:p>
          </table:table-cell>
          <table:table-cell office:value-type="float" office:value="17470" calcext:value-type="float">
            <text:p>17470</text:p>
          </table:table-cell>
          <table:table-cell table:formula="of:=CONCATENATE(&quot;insert into IBGE_MUNICIPIOS (UF, COD_UF, CODIGO_MUNICIPIO, NOME_MUNICIPIO, POP_COLETADA, POP_IMPUTADA, POP_TOTAL) values ('&quot;; [.A85]; &quot;', '&quot;; [.B85]; &quot;', '&quot;; [.C85]; &quot;', '&quot;; [.D85]; &quot;',&quot;; [.E85]; &quot;, &quot;; [.F85]; &quot;, &quot;; [.G85]; &quot;);&quot;)" office:value-type="string" office:string-value="insert into IBGE_MUNICIPIOS (UF, COD_UF, CODIGO_MUNICIPIO, NOME_MUNICIPIO, POP_COLETADA, POP_IMPUTADA, POP_TOTAL) values ('PR', '41', '6308', 'Corbélia',17369, 101, 17470);" calcext:value-type="string">
            <text:p>insert into IBGE_MUNICIPIOS (UF, COD_UF, CODIGO_MUNICIPIO, NOME_MUNICIPIO, POP_COLETADA, POP_IMPUTADA, POP_TOTAL) values ('PR', '41', '6308', 'Corbélia',17369, 101, 17470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6407" calcext:value-type="float">
            <text:p>6407</text:p>
          </table:table-cell>
          <table:table-cell office:value-type="string" calcext:value-type="string">
            <text:p>Cornélio Procópio</text:p>
          </table:table-cell>
          <table:table-cell office:value-type="float" office:value="45119" calcext:value-type="float">
            <text:p>45119</text:p>
          </table:table-cell>
          <table:table-cell office:value-type="float" office:value="87" calcext:value-type="float">
            <text:p>87</text:p>
          </table:table-cell>
          <table:table-cell office:value-type="float" office:value="45206" calcext:value-type="float">
            <text:p>45206</text:p>
          </table:table-cell>
          <table:table-cell table:formula="of:=CONCATENATE(&quot;insert into IBGE_MUNICIPIOS (UF, COD_UF, CODIGO_MUNICIPIO, NOME_MUNICIPIO, POP_COLETADA, POP_IMPUTADA, POP_TOTAL) values ('&quot;; [.A86]; &quot;', '&quot;; [.B86]; &quot;', '&quot;; [.C86]; &quot;', '&quot;; [.D86]; &quot;',&quot;; [.E86]; &quot;, &quot;; [.F86]; &quot;, &quot;; [.G86]; &quot;);&quot;)" office:value-type="string" office:string-value="insert into IBGE_MUNICIPIOS (UF, COD_UF, CODIGO_MUNICIPIO, NOME_MUNICIPIO, POP_COLETADA, POP_IMPUTADA, POP_TOTAL) values ('PR', '41', '6407', 'Cornélio Procópio',45119, 87, 45206);" calcext:value-type="string">
            <text:p>insert into IBGE_MUNICIPIOS (UF, COD_UF, CODIGO_MUNICIPIO, NOME_MUNICIPIO, POP_COLETADA, POP_IMPUTADA, POP_TOTAL) values ('PR', '41', '6407', 'Cornélio Procópio',45119, 87, 45206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6456" calcext:value-type="float">
            <text:p>6456</text:p>
          </table:table-cell>
          <table:table-cell office:value-type="string" calcext:value-type="string">
            <text:p>Coronel Domingos Soares</text:p>
          </table:table-cell>
          <table:table-cell office:value-type="float" office:value="5415" calcext:value-type="float">
            <text:p>5415</text:p>
          </table:table-cell>
          <table:table-cell office:value-type="float" office:value="234" calcext:value-type="float">
            <text:p>234</text:p>
          </table:table-cell>
          <table:table-cell office:value-type="float" office:value="5649" calcext:value-type="float">
            <text:p>5649</text:p>
          </table:table-cell>
          <table:table-cell table:formula="of:=CONCATENATE(&quot;insert into IBGE_MUNICIPIOS (UF, COD_UF, CODIGO_MUNICIPIO, NOME_MUNICIPIO, POP_COLETADA, POP_IMPUTADA, POP_TOTAL) values ('&quot;; [.A87]; &quot;', '&quot;; [.B87]; &quot;', '&quot;; [.C87]; &quot;', '&quot;; [.D87]; &quot;',&quot;; [.E87]; &quot;, &quot;; [.F87]; &quot;, &quot;; [.G87]; &quot;);&quot;)" office:value-type="string" office:string-value="insert into IBGE_MUNICIPIOS (UF, COD_UF, CODIGO_MUNICIPIO, NOME_MUNICIPIO, POP_COLETADA, POP_IMPUTADA, POP_TOTAL) values ('PR', '41', '6456', 'Coronel Domingos Soares',5415, 234, 5649);" calcext:value-type="string">
            <text:p>insert into IBGE_MUNICIPIOS (UF, COD_UF, CODIGO_MUNICIPIO, NOME_MUNICIPIO, POP_COLETADA, POP_IMPUTADA, POP_TOTAL) values ('PR', '41', '6456', 'Coronel Domingos Soares',5415, 234, 5649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6506" calcext:value-type="float">
            <text:p>6506</text:p>
          </table:table-cell>
          <table:table-cell office:value-type="string" calcext:value-type="string">
            <text:p>Coronel Vivida</text:p>
          </table:table-cell>
          <table:table-cell office:value-type="float" office:value="22578" calcext:value-type="float">
            <text:p>22578</text:p>
          </table:table-cell>
          <table:table-cell office:value-type="float" office:value="753" calcext:value-type="float">
            <text:p>753</text:p>
          </table:table-cell>
          <table:table-cell office:value-type="float" office:value="23331" calcext:value-type="float">
            <text:p>23331</text:p>
          </table:table-cell>
          <table:table-cell table:formula="of:=CONCATENATE(&quot;insert into IBGE_MUNICIPIOS (UF, COD_UF, CODIGO_MUNICIPIO, NOME_MUNICIPIO, POP_COLETADA, POP_IMPUTADA, POP_TOTAL) values ('&quot;; [.A88]; &quot;', '&quot;; [.B88]; &quot;', '&quot;; [.C88]; &quot;', '&quot;; [.D88]; &quot;',&quot;; [.E88]; &quot;, &quot;; [.F88]; &quot;, &quot;; [.G88]; &quot;);&quot;)" office:value-type="string" office:string-value="insert into IBGE_MUNICIPIOS (UF, COD_UF, CODIGO_MUNICIPIO, NOME_MUNICIPIO, POP_COLETADA, POP_IMPUTADA, POP_TOTAL) values ('PR', '41', '6506', 'Coronel Vivida',22578, 753, 23331);" calcext:value-type="string">
            <text:p>insert into IBGE_MUNICIPIOS (UF, COD_UF, CODIGO_MUNICIPIO, NOME_MUNICIPIO, POP_COLETADA, POP_IMPUTADA, POP_TOTAL) values ('PR', '41', '6506', 'Coronel Vivida',22578, 753, 23331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6555" calcext:value-type="float">
            <text:p>6555</text:p>
          </table:table-cell>
          <table:table-cell office:value-type="string" calcext:value-type="string">
            <text:p>Corumbataí do Sul</text:p>
          </table:table-cell>
          <table:table-cell office:value-type="float" office:value="3693" calcext:value-type="float">
            <text:p>3693</text:p>
          </table:table-cell>
          <table:table-cell office:value-type="float" office:value="67" calcext:value-type="float">
            <text:p>67</text:p>
          </table:table-cell>
          <table:table-cell office:value-type="float" office:value="3760" calcext:value-type="float">
            <text:p>3760</text:p>
          </table:table-cell>
          <table:table-cell table:formula="of:=CONCATENATE(&quot;insert into IBGE_MUNICIPIOS (UF, COD_UF, CODIGO_MUNICIPIO, NOME_MUNICIPIO, POP_COLETADA, POP_IMPUTADA, POP_TOTAL) values ('&quot;; [.A89]; &quot;', '&quot;; [.B89]; &quot;', '&quot;; [.C89]; &quot;', '&quot;; [.D89]; &quot;',&quot;; [.E89]; &quot;, &quot;; [.F89]; &quot;, &quot;; [.G89]; &quot;);&quot;)" office:value-type="string" office:string-value="insert into IBGE_MUNICIPIOS (UF, COD_UF, CODIGO_MUNICIPIO, NOME_MUNICIPIO, POP_COLETADA, POP_IMPUTADA, POP_TOTAL) values ('PR', '41', '6555', 'Corumbataí do Sul',3693, 67, 3760);" calcext:value-type="string">
            <text:p>insert into IBGE_MUNICIPIOS (UF, COD_UF, CODIGO_MUNICIPIO, NOME_MUNICIPIO, POP_COLETADA, POP_IMPUTADA, POP_TOTAL) values ('PR', '41', '6555', 'Corumbataí do Sul',3693, 67, 3760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6571" calcext:value-type="float">
            <text:p>6571</text:p>
          </table:table-cell>
          <table:table-cell office:value-type="string" calcext:value-type="string">
            <text:p>Cruzeiro do Iguaçu</text:p>
          </table:table-cell>
          <table:table-cell office:value-type="float" office:value="4117" calcext:value-type="float">
            <text:p>4117</text:p>
          </table:table-cell>
          <table:table-cell office:value-type="float" office:value="16" calcext:value-type="float">
            <text:p>16</text:p>
          </table:table-cell>
          <table:table-cell office:value-type="float" office:value="4133" calcext:value-type="float">
            <text:p>4133</text:p>
          </table:table-cell>
          <table:table-cell table:formula="of:=CONCATENATE(&quot;insert into IBGE_MUNICIPIOS (UF, COD_UF, CODIGO_MUNICIPIO, NOME_MUNICIPIO, POP_COLETADA, POP_IMPUTADA, POP_TOTAL) values ('&quot;; [.A90]; &quot;', '&quot;; [.B90]; &quot;', '&quot;; [.C90]; &quot;', '&quot;; [.D90]; &quot;',&quot;; [.E90]; &quot;, &quot;; [.F90]; &quot;, &quot;; [.G90]; &quot;);&quot;)" office:value-type="string" office:string-value="insert into IBGE_MUNICIPIOS (UF, COD_UF, CODIGO_MUNICIPIO, NOME_MUNICIPIO, POP_COLETADA, POP_IMPUTADA, POP_TOTAL) values ('PR', '41', '6571', 'Cruzeiro do Iguaçu',4117, 16, 4133);" calcext:value-type="string">
            <text:p>insert into IBGE_MUNICIPIOS (UF, COD_UF, CODIGO_MUNICIPIO, NOME_MUNICIPIO, POP_COLETADA, POP_IMPUTADA, POP_TOTAL) values ('PR', '41', '6571', 'Cruzeiro do Iguaçu',4117, 16, 4133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6605" calcext:value-type="float">
            <text:p>6605</text:p>
          </table:table-cell>
          <table:table-cell office:value-type="string" calcext:value-type="string">
            <text:p>Cruzeiro do Oeste</text:p>
          </table:table-cell>
          <table:table-cell office:value-type="float" office:value="23723" calcext:value-type="float">
            <text:p>23723</text:p>
          </table:table-cell>
          <table:table-cell office:value-type="float" office:value="108" calcext:value-type="float">
            <text:p>108</text:p>
          </table:table-cell>
          <table:table-cell office:value-type="float" office:value="23831" calcext:value-type="float">
            <text:p>23831</text:p>
          </table:table-cell>
          <table:table-cell table:formula="of:=CONCATENATE(&quot;insert into IBGE_MUNICIPIOS (UF, COD_UF, CODIGO_MUNICIPIO, NOME_MUNICIPIO, POP_COLETADA, POP_IMPUTADA, POP_TOTAL) values ('&quot;; [.A91]; &quot;', '&quot;; [.B91]; &quot;', '&quot;; [.C91]; &quot;', '&quot;; [.D91]; &quot;',&quot;; [.E91]; &quot;, &quot;; [.F91]; &quot;, &quot;; [.G91]; &quot;);&quot;)" office:value-type="string" office:string-value="insert into IBGE_MUNICIPIOS (UF, COD_UF, CODIGO_MUNICIPIO, NOME_MUNICIPIO, POP_COLETADA, POP_IMPUTADA, POP_TOTAL) values ('PR', '41', '6605', 'Cruzeiro do Oeste',23723, 108, 23831);" calcext:value-type="string">
            <text:p>insert into IBGE_MUNICIPIOS (UF, COD_UF, CODIGO_MUNICIPIO, NOME_MUNICIPIO, POP_COLETADA, POP_IMPUTADA, POP_TOTAL) values ('PR', '41', '6605', 'Cruzeiro do Oeste',23723, 108, 23831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6704" calcext:value-type="float">
            <text:p>6704</text:p>
          </table:table-cell>
          <table:table-cell office:value-type="string" calcext:value-type="string">
            <text:p>Cruzeiro do Sul</text:p>
          </table:table-cell>
          <table:table-cell office:value-type="float" office:value="4492" calcext:value-type="float">
            <text:p>4492</text:p>
          </table:table-cell>
          <table:table-cell office:value-type="float" office:value="2" calcext:value-type="float">
            <text:p>2</text:p>
          </table:table-cell>
          <table:table-cell office:value-type="float" office:value="4494" calcext:value-type="float">
            <text:p>4494</text:p>
          </table:table-cell>
          <table:table-cell table:formula="of:=CONCATENATE(&quot;insert into IBGE_MUNICIPIOS (UF, COD_UF, CODIGO_MUNICIPIO, NOME_MUNICIPIO, POP_COLETADA, POP_IMPUTADA, POP_TOTAL) values ('&quot;; [.A92]; &quot;', '&quot;; [.B92]; &quot;', '&quot;; [.C92]; &quot;', '&quot;; [.D92]; &quot;',&quot;; [.E92]; &quot;, &quot;; [.F92]; &quot;, &quot;; [.G92]; &quot;);&quot;)" office:value-type="string" office:string-value="insert into IBGE_MUNICIPIOS (UF, COD_UF, CODIGO_MUNICIPIO, NOME_MUNICIPIO, POP_COLETADA, POP_IMPUTADA, POP_TOTAL) values ('PR', '41', '6704', 'Cruzeiro do Sul',4492, 2, 4494);" calcext:value-type="string">
            <text:p>insert into IBGE_MUNICIPIOS (UF, COD_UF, CODIGO_MUNICIPIO, NOME_MUNICIPIO, POP_COLETADA, POP_IMPUTADA, POP_TOTAL) values ('PR', '41', '6704', 'Cruzeiro do Sul',4492, 2, 4494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6803" calcext:value-type="float">
            <text:p>6803</text:p>
          </table:table-cell>
          <table:table-cell office:value-type="string" calcext:value-type="string">
            <text:p>Cruz Machado</text:p>
          </table:table-cell>
          <table:table-cell office:value-type="float" office:value="15835" calcext:value-type="float">
            <text:p>15835</text:p>
          </table:table-cell>
          <table:table-cell office:value-type="float" office:value="143" calcext:value-type="float">
            <text:p>143</text:p>
          </table:table-cell>
          <table:table-cell office:value-type="float" office:value="15978" calcext:value-type="float">
            <text:p>15978</text:p>
          </table:table-cell>
          <table:table-cell table:formula="of:=CONCATENATE(&quot;insert into IBGE_MUNICIPIOS (UF, COD_UF, CODIGO_MUNICIPIO, NOME_MUNICIPIO, POP_COLETADA, POP_IMPUTADA, POP_TOTAL) values ('&quot;; [.A93]; &quot;', '&quot;; [.B93]; &quot;', '&quot;; [.C93]; &quot;', '&quot;; [.D93]; &quot;',&quot;; [.E93]; &quot;, &quot;; [.F93]; &quot;, &quot;; [.G93]; &quot;);&quot;)" office:value-type="string" office:string-value="insert into IBGE_MUNICIPIOS (UF, COD_UF, CODIGO_MUNICIPIO, NOME_MUNICIPIO, POP_COLETADA, POP_IMPUTADA, POP_TOTAL) values ('PR', '41', '6803', 'Cruz Machado',15835, 143, 15978);" calcext:value-type="string">
            <text:p>insert into IBGE_MUNICIPIOS (UF, COD_UF, CODIGO_MUNICIPIO, NOME_MUNICIPIO, POP_COLETADA, POP_IMPUTADA, POP_TOTAL) values ('PR', '41', '6803', 'Cruz Machado',15835, 143, 15978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6852" calcext:value-type="float">
            <text:p>6852</text:p>
          </table:table-cell>
          <table:table-cell office:value-type="string" calcext:value-type="string">
            <text:p>Cruzmaltina</text:p>
          </table:table-cell>
          <table:table-cell office:value-type="float" office:value="2878" calcext:value-type="float">
            <text:p>2878</text:p>
          </table:table-cell>
          <table:table-cell office:value-type="float" office:value="14" calcext:value-type="float">
            <text:p>14</text:p>
          </table:table-cell>
          <table:table-cell office:value-type="float" office:value="2892" calcext:value-type="float">
            <text:p>2892</text:p>
          </table:table-cell>
          <table:table-cell table:formula="of:=CONCATENATE(&quot;insert into IBGE_MUNICIPIOS (UF, COD_UF, CODIGO_MUNICIPIO, NOME_MUNICIPIO, POP_COLETADA, POP_IMPUTADA, POP_TOTAL) values ('&quot;; [.A94]; &quot;', '&quot;; [.B94]; &quot;', '&quot;; [.C94]; &quot;', '&quot;; [.D94]; &quot;',&quot;; [.E94]; &quot;, &quot;; [.F94]; &quot;, &quot;; [.G94]; &quot;);&quot;)" office:value-type="string" office:string-value="insert into IBGE_MUNICIPIOS (UF, COD_UF, CODIGO_MUNICIPIO, NOME_MUNICIPIO, POP_COLETADA, POP_IMPUTADA, POP_TOTAL) values ('PR', '41', '6852', 'Cruzmaltina',2878, 14, 2892);" calcext:value-type="string">
            <text:p>insert into IBGE_MUNICIPIOS (UF, COD_UF, CODIGO_MUNICIPIO, NOME_MUNICIPIO, POP_COLETADA, POP_IMPUTADA, POP_TOTAL) values ('PR', '41', '6852', 'Cruzmaltina',2878, 14, 2892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6902" calcext:value-type="float">
            <text:p>6902</text:p>
          </table:table-cell>
          <table:table-cell office:value-type="string" calcext:value-type="string">
            <text:p>Curitiba</text:p>
          </table:table-cell>
          <table:table-cell office:value-type="float" office:value="1727746" calcext:value-type="float">
            <text:p>1727746</text:p>
          </table:table-cell>
          <table:table-cell office:value-type="float" office:value="45972" calcext:value-type="float">
            <text:p>45972</text:p>
          </table:table-cell>
          <table:table-cell office:value-type="float" office:value="1773718" calcext:value-type="float">
            <text:p>1773718</text:p>
          </table:table-cell>
          <table:table-cell table:formula="of:=CONCATENATE(&quot;insert into IBGE_MUNICIPIOS (UF, COD_UF, CODIGO_MUNICIPIO, NOME_MUNICIPIO, POP_COLETADA, POP_IMPUTADA, POP_TOTAL) values ('&quot;; [.A95]; &quot;', '&quot;; [.B95]; &quot;', '&quot;; [.C95]; &quot;', '&quot;; [.D95]; &quot;',&quot;; [.E95]; &quot;, &quot;; [.F95]; &quot;, &quot;; [.G95]; &quot;);&quot;)" office:value-type="string" office:string-value="insert into IBGE_MUNICIPIOS (UF, COD_UF, CODIGO_MUNICIPIO, NOME_MUNICIPIO, POP_COLETADA, POP_IMPUTADA, POP_TOTAL) values ('PR', '41', '6902', 'Curitiba',1727746, 45972, 1773718);" calcext:value-type="string">
            <text:p>insert into IBGE_MUNICIPIOS (UF, COD_UF, CODIGO_MUNICIPIO, NOME_MUNICIPIO, POP_COLETADA, POP_IMPUTADA, POP_TOTAL) values ('PR', '41', '6902', 'Curitiba',1727746, 45972, 1773718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7009" calcext:value-type="float">
            <text:p>7009</text:p>
          </table:table-cell>
          <table:table-cell office:value-type="string" calcext:value-type="string">
            <text:p>Curiúva</text:p>
          </table:table-cell>
          <table:table-cell office:value-type="float" office:value="13008" calcext:value-type="float">
            <text:p>13008</text:p>
          </table:table-cell>
          <table:table-cell office:value-type="float" office:value="639" calcext:value-type="float">
            <text:p>639</text:p>
          </table:table-cell>
          <table:table-cell office:value-type="float" office:value="13647" calcext:value-type="float">
            <text:p>13647</text:p>
          </table:table-cell>
          <table:table-cell table:formula="of:=CONCATENATE(&quot;insert into IBGE_MUNICIPIOS (UF, COD_UF, CODIGO_MUNICIPIO, NOME_MUNICIPIO, POP_COLETADA, POP_IMPUTADA, POP_TOTAL) values ('&quot;; [.A96]; &quot;', '&quot;; [.B96]; &quot;', '&quot;; [.C96]; &quot;', '&quot;; [.D96]; &quot;',&quot;; [.E96]; &quot;, &quot;; [.F96]; &quot;, &quot;; [.G96]; &quot;);&quot;)" office:value-type="string" office:string-value="insert into IBGE_MUNICIPIOS (UF, COD_UF, CODIGO_MUNICIPIO, NOME_MUNICIPIO, POP_COLETADA, POP_IMPUTADA, POP_TOTAL) values ('PR', '41', '7009', 'Curiúva',13008, 639, 13647);" calcext:value-type="string">
            <text:p>insert into IBGE_MUNICIPIOS (UF, COD_UF, CODIGO_MUNICIPIO, NOME_MUNICIPIO, POP_COLETADA, POP_IMPUTADA, POP_TOTAL) values ('PR', '41', '7009', 'Curiúva',13008, 639, 13647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7108" calcext:value-type="float">
            <text:p>7108</text:p>
          </table:table-cell>
          <table:table-cell office:value-type="string" calcext:value-type="string">
            <text:p>Diamante do Norte</text:p>
          </table:table-cell>
          <table:table-cell office:value-type="float" office:value="5111" calcext:value-type="float">
            <text:p>5111</text:p>
          </table:table-cell>
          <table:table-cell office:value-type="float" office:value="31" calcext:value-type="float">
            <text:p>31</text:p>
          </table:table-cell>
          <table:table-cell office:value-type="float" office:value="5142" calcext:value-type="float">
            <text:p>5142</text:p>
          </table:table-cell>
          <table:table-cell table:formula="of:=CONCATENATE(&quot;insert into IBGE_MUNICIPIOS (UF, COD_UF, CODIGO_MUNICIPIO, NOME_MUNICIPIO, POP_COLETADA, POP_IMPUTADA, POP_TOTAL) values ('&quot;; [.A97]; &quot;', '&quot;; [.B97]; &quot;', '&quot;; [.C97]; &quot;', '&quot;; [.D97]; &quot;',&quot;; [.E97]; &quot;, &quot;; [.F97]; &quot;, &quot;; [.G97]; &quot;);&quot;)" office:value-type="string" office:string-value="insert into IBGE_MUNICIPIOS (UF, COD_UF, CODIGO_MUNICIPIO, NOME_MUNICIPIO, POP_COLETADA, POP_IMPUTADA, POP_TOTAL) values ('PR', '41', '7108', 'Diamante do Norte',5111, 31, 5142);" calcext:value-type="string">
            <text:p>insert into IBGE_MUNICIPIOS (UF, COD_UF, CODIGO_MUNICIPIO, NOME_MUNICIPIO, POP_COLETADA, POP_IMPUTADA, POP_TOTAL) values ('PR', '41', '7108', 'Diamante do Norte',5111, 31, 5142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7124" calcext:value-type="float">
            <text:p>7124</text:p>
          </table:table-cell>
          <table:table-cell office:value-type="string" calcext:value-type="string">
            <text:p>Diamante do Sul</text:p>
          </table:table-cell>
          <table:table-cell office:value-type="float" office:value="3140" calcext:value-type="float">
            <text:p>3140</text:p>
          </table:table-cell>
          <table:table-cell office:value-type="float" office:value="31" calcext:value-type="float">
            <text:p>31</text:p>
          </table:table-cell>
          <table:table-cell office:value-type="float" office:value="3171" calcext:value-type="float">
            <text:p>3171</text:p>
          </table:table-cell>
          <table:table-cell table:formula="of:=CONCATENATE(&quot;insert into IBGE_MUNICIPIOS (UF, COD_UF, CODIGO_MUNICIPIO, NOME_MUNICIPIO, POP_COLETADA, POP_IMPUTADA, POP_TOTAL) values ('&quot;; [.A98]; &quot;', '&quot;; [.B98]; &quot;', '&quot;; [.C98]; &quot;', '&quot;; [.D98]; &quot;',&quot;; [.E98]; &quot;, &quot;; [.F98]; &quot;, &quot;; [.G98]; &quot;);&quot;)" office:value-type="string" office:string-value="insert into IBGE_MUNICIPIOS (UF, COD_UF, CODIGO_MUNICIPIO, NOME_MUNICIPIO, POP_COLETADA, POP_IMPUTADA, POP_TOTAL) values ('PR', '41', '7124', 'Diamante do Sul',3140, 31, 3171);" calcext:value-type="string">
            <text:p>insert into IBGE_MUNICIPIOS (UF, COD_UF, CODIGO_MUNICIPIO, NOME_MUNICIPIO, POP_COLETADA, POP_IMPUTADA, POP_TOTAL) values ('PR', '41', '7124', 'Diamante do Sul',3140, 31, 3171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7157" calcext:value-type="float">
            <text:p>7157</text:p>
          </table:table-cell>
          <table:table-cell office:value-type="string" calcext:value-type="string">
            <text:p>Diamante Do Oeste</text:p>
          </table:table-cell>
          <table:table-cell office:value-type="float" office:value="4241" calcext:value-type="float">
            <text:p>4241</text:p>
          </table:table-cell>
          <table:table-cell office:value-type="float" office:value="316" calcext:value-type="float">
            <text:p>316</text:p>
          </table:table-cell>
          <table:table-cell office:value-type="float" office:value="4557" calcext:value-type="float">
            <text:p>4557</text:p>
          </table:table-cell>
          <table:table-cell table:formula="of:=CONCATENATE(&quot;insert into IBGE_MUNICIPIOS (UF, COD_UF, CODIGO_MUNICIPIO, NOME_MUNICIPIO, POP_COLETADA, POP_IMPUTADA, POP_TOTAL) values ('&quot;; [.A99]; &quot;', '&quot;; [.B99]; &quot;', '&quot;; [.C99]; &quot;', '&quot;; [.D99]; &quot;',&quot;; [.E99]; &quot;, &quot;; [.F99]; &quot;, &quot;; [.G99]; &quot;);&quot;)" office:value-type="string" office:string-value="insert into IBGE_MUNICIPIOS (UF, COD_UF, CODIGO_MUNICIPIO, NOME_MUNICIPIO, POP_COLETADA, POP_IMPUTADA, POP_TOTAL) values ('PR', '41', '7157', 'Diamante Do Oeste',4241, 316, 4557);" calcext:value-type="string">
            <text:p>insert into IBGE_MUNICIPIOS (UF, COD_UF, CODIGO_MUNICIPIO, NOME_MUNICIPIO, POP_COLETADA, POP_IMPUTADA, POP_TOTAL) values ('PR', '41', '7157', 'Diamante Do Oeste',4241, 316, 4557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7207" calcext:value-type="float">
            <text:p>7207</text:p>
          </table:table-cell>
          <table:table-cell office:value-type="string" calcext:value-type="string">
            <text:p>Dois Vizinhos</text:p>
          </table:table-cell>
          <table:table-cell office:value-type="float" office:value="44662" calcext:value-type="float">
            <text:p>44662</text:p>
          </table:table-cell>
          <table:table-cell office:value-type="float" office:value="207" calcext:value-type="float">
            <text:p>207</text:p>
          </table:table-cell>
          <table:table-cell office:value-type="float" office:value="44869" calcext:value-type="float">
            <text:p>44869</text:p>
          </table:table-cell>
          <table:table-cell table:formula="of:=CONCATENATE(&quot;insert into IBGE_MUNICIPIOS (UF, COD_UF, CODIGO_MUNICIPIO, NOME_MUNICIPIO, POP_COLETADA, POP_IMPUTADA, POP_TOTAL) values ('&quot;; [.A100]; &quot;', '&quot;; [.B100]; &quot;', '&quot;; [.C100]; &quot;', '&quot;; [.D100]; &quot;',&quot;; [.E100]; &quot;, &quot;; [.F100]; &quot;, &quot;; [.G100]; &quot;);&quot;)" office:value-type="string" office:string-value="insert into IBGE_MUNICIPIOS (UF, COD_UF, CODIGO_MUNICIPIO, NOME_MUNICIPIO, POP_COLETADA, POP_IMPUTADA, POP_TOTAL) values ('PR', '41', '7207', 'Dois Vizinhos',44662, 207, 44869);" calcext:value-type="string">
            <text:p>insert into IBGE_MUNICIPIOS (UF, COD_UF, CODIGO_MUNICIPIO, NOME_MUNICIPIO, POP_COLETADA, POP_IMPUTADA, POP_TOTAL) values ('PR', '41', '7207', 'Dois Vizinhos',44662, 207, 44869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7256" calcext:value-type="float">
            <text:p>7256</text:p>
          </table:table-cell>
          <table:table-cell office:value-type="string" calcext:value-type="string">
            <text:p>Douradina</text:p>
          </table:table-cell>
          <table:table-cell office:value-type="float" office:value="9140" calcext:value-type="float">
            <text:p>9140</text:p>
          </table:table-cell>
          <table:table-cell office:value-type="float" office:value="21" calcext:value-type="float">
            <text:p>21</text:p>
          </table:table-cell>
          <table:table-cell office:value-type="float" office:value="9161" calcext:value-type="float">
            <text:p>9161</text:p>
          </table:table-cell>
          <table:table-cell table:formula="of:=CONCATENATE(&quot;insert into IBGE_MUNICIPIOS (UF, COD_UF, CODIGO_MUNICIPIO, NOME_MUNICIPIO, POP_COLETADA, POP_IMPUTADA, POP_TOTAL) values ('&quot;; [.A101]; &quot;', '&quot;; [.B101]; &quot;', '&quot;; [.C101]; &quot;', '&quot;; [.D101]; &quot;',&quot;; [.E101]; &quot;, &quot;; [.F101]; &quot;, &quot;; [.G101]; &quot;);&quot;)" office:value-type="string" office:string-value="insert into IBGE_MUNICIPIOS (UF, COD_UF, CODIGO_MUNICIPIO, NOME_MUNICIPIO, POP_COLETADA, POP_IMPUTADA, POP_TOTAL) values ('PR', '41', '7256', 'Douradina',9140, 21, 9161);" calcext:value-type="string">
            <text:p>insert into IBGE_MUNICIPIOS (UF, COD_UF, CODIGO_MUNICIPIO, NOME_MUNICIPIO, POP_COLETADA, POP_IMPUTADA, POP_TOTAL) values ('PR', '41', '7256', 'Douradina',9140, 21, 9161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7306" calcext:value-type="float">
            <text:p>7306</text:p>
          </table:table-cell>
          <table:table-cell office:value-type="string" calcext:value-type="string">
            <text:p>Doutor Camargo</text:p>
          </table:table-cell>
          <table:table-cell office:value-type="float" office:value="6154" calcext:value-type="float">
            <text:p>6154</text:p>
          </table:table-cell>
          <table:table-cell office:value-type="float" office:value="173" calcext:value-type="float">
            <text:p>173</text:p>
          </table:table-cell>
          <table:table-cell office:value-type="float" office:value="6327" calcext:value-type="float">
            <text:p>6327</text:p>
          </table:table-cell>
          <table:table-cell table:formula="of:=CONCATENATE(&quot;insert into IBGE_MUNICIPIOS (UF, COD_UF, CODIGO_MUNICIPIO, NOME_MUNICIPIO, POP_COLETADA, POP_IMPUTADA, POP_TOTAL) values ('&quot;; [.A102]; &quot;', '&quot;; [.B102]; &quot;', '&quot;; [.C102]; &quot;', '&quot;; [.D102]; &quot;',&quot;; [.E102]; &quot;, &quot;; [.F102]; &quot;, &quot;; [.G102]; &quot;);&quot;)" office:value-type="string" office:string-value="insert into IBGE_MUNICIPIOS (UF, COD_UF, CODIGO_MUNICIPIO, NOME_MUNICIPIO, POP_COLETADA, POP_IMPUTADA, POP_TOTAL) values ('PR', '41', '7306', 'Doutor Camargo',6154, 173, 6327);" calcext:value-type="string">
            <text:p>insert into IBGE_MUNICIPIOS (UF, COD_UF, CODIGO_MUNICIPIO, NOME_MUNICIPIO, POP_COLETADA, POP_IMPUTADA, POP_TOTAL) values ('PR', '41', '7306', 'Doutor Camargo',6154, 173, 6327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7405" calcext:value-type="float">
            <text:p>7405</text:p>
          </table:table-cell>
          <table:table-cell office:value-type="string" calcext:value-type="string">
            <text:p>Enéas Marques</text:p>
          </table:table-cell>
          <table:table-cell office:value-type="float" office:value="5993" calcext:value-type="float">
            <text:p>5993</text:p>
          </table:table-cell>
          <table:table-cell office:value-type="float" office:value="6" calcext:value-type="float">
            <text:p>6</text:p>
          </table:table-cell>
          <table:table-cell office:value-type="float" office:value="5999" calcext:value-type="float">
            <text:p>5999</text:p>
          </table:table-cell>
          <table:table-cell table:formula="of:=CONCATENATE(&quot;insert into IBGE_MUNICIPIOS (UF, COD_UF, CODIGO_MUNICIPIO, NOME_MUNICIPIO, POP_COLETADA, POP_IMPUTADA, POP_TOTAL) values ('&quot;; [.A103]; &quot;', '&quot;; [.B103]; &quot;', '&quot;; [.C103]; &quot;', '&quot;; [.D103]; &quot;',&quot;; [.E103]; &quot;, &quot;; [.F103]; &quot;, &quot;; [.G103]; &quot;);&quot;)" office:value-type="string" office:string-value="insert into IBGE_MUNICIPIOS (UF, COD_UF, CODIGO_MUNICIPIO, NOME_MUNICIPIO, POP_COLETADA, POP_IMPUTADA, POP_TOTAL) values ('PR', '41', '7405', 'Enéas Marques',5993, 6, 5999);" calcext:value-type="string">
            <text:p>insert into IBGE_MUNICIPIOS (UF, COD_UF, CODIGO_MUNICIPIO, NOME_MUNICIPIO, POP_COLETADA, POP_IMPUTADA, POP_TOTAL) values ('PR', '41', '7405', 'Enéas Marques',5993, 6, 5999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Engenheiro Beltrão</text:p>
          </table:table-cell>
          <table:table-cell office:value-type="float" office:value="12032" calcext:value-type="float">
            <text:p>12032</text:p>
          </table:table-cell>
          <table:table-cell office:value-type="float" office:value="422" calcext:value-type="float">
            <text:p>422</text:p>
          </table:table-cell>
          <table:table-cell office:value-type="float" office:value="12454" calcext:value-type="float">
            <text:p>12454</text:p>
          </table:table-cell>
          <table:table-cell table:formula="of:=CONCATENATE(&quot;insert into IBGE_MUNICIPIOS (UF, COD_UF, CODIGO_MUNICIPIO, NOME_MUNICIPIO, POP_COLETADA, POP_IMPUTADA, POP_TOTAL) values ('&quot;; [.A104]; &quot;', '&quot;; [.B104]; &quot;', '&quot;; [.C104]; &quot;', '&quot;; [.D104]; &quot;',&quot;; [.E104]; &quot;, &quot;; [.F104]; &quot;, &quot;; [.G104]; &quot;);&quot;)" office:value-type="string" office:string-value="insert into IBGE_MUNICIPIOS (UF, COD_UF, CODIGO_MUNICIPIO, NOME_MUNICIPIO, POP_COLETADA, POP_IMPUTADA, POP_TOTAL) values ('PR', '41', '7504', 'Engenheiro Beltrão',12032, 422, 12454);" calcext:value-type="string">
            <text:p>insert into IBGE_MUNICIPIOS (UF, COD_UF, CODIGO_MUNICIPIO, NOME_MUNICIPIO, POP_COLETADA, POP_IMPUTADA, POP_TOTAL) values ('PR', '41', '7504', 'Engenheiro Beltrão',12032, 422, 12454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7520" calcext:value-type="float">
            <text:p>7520</text:p>
          </table:table-cell>
          <table:table-cell office:value-type="string" calcext:value-type="string">
            <text:p>Esperança Nova</text:p>
          </table:table-cell>
          <table:table-cell office:value-type="float" office:value="1846" calcext:value-type="float">
            <text:p>1846</text:p>
          </table:table-cell>
          <table:table-cell office:value-type="float" office:value="3" calcext:value-type="float">
            <text:p>3</text:p>
          </table:table-cell>
          <table:table-cell office:value-type="float" office:value="1849" calcext:value-type="float">
            <text:p>1849</text:p>
          </table:table-cell>
          <table:table-cell table:formula="of:=CONCATENATE(&quot;insert into IBGE_MUNICIPIOS (UF, COD_UF, CODIGO_MUNICIPIO, NOME_MUNICIPIO, POP_COLETADA, POP_IMPUTADA, POP_TOTAL) values ('&quot;; [.A105]; &quot;', '&quot;; [.B105]; &quot;', '&quot;; [.C105]; &quot;', '&quot;; [.D105]; &quot;',&quot;; [.E105]; &quot;, &quot;; [.F105]; &quot;, &quot;; [.G105]; &quot;);&quot;)" office:value-type="string" office:string-value="insert into IBGE_MUNICIPIOS (UF, COD_UF, CODIGO_MUNICIPIO, NOME_MUNICIPIO, POP_COLETADA, POP_IMPUTADA, POP_TOTAL) values ('PR', '41', '7520', 'Esperança Nova',1846, 3, 1849);" calcext:value-type="string">
            <text:p>insert into IBGE_MUNICIPIOS (UF, COD_UF, CODIGO_MUNICIPIO, NOME_MUNICIPIO, POP_COLETADA, POP_IMPUTADA, POP_TOTAL) values ('PR', '41', '7520', 'Esperança Nova',1846, 3, 1849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7538" calcext:value-type="float">
            <text:p>7538</text:p>
          </table:table-cell>
          <table:table-cell office:value-type="string" calcext:value-type="string">
            <text:p>Entre Rios do Oeste</text:p>
          </table:table-cell>
          <table:table-cell office:value-type="float" office:value="4461" calcext:value-type="float">
            <text:p>4461</text:p>
          </table:table-cell>
          <table:table-cell office:value-type="float" office:value="114" calcext:value-type="float">
            <text:p>114</text:p>
          </table:table-cell>
          <table:table-cell office:value-type="float" office:value="4575" calcext:value-type="float">
            <text:p>4575</text:p>
          </table:table-cell>
          <table:table-cell table:formula="of:=CONCATENATE(&quot;insert into IBGE_MUNICIPIOS (UF, COD_UF, CODIGO_MUNICIPIO, NOME_MUNICIPIO, POP_COLETADA, POP_IMPUTADA, POP_TOTAL) values ('&quot;; [.A106]; &quot;', '&quot;; [.B106]; &quot;', '&quot;; [.C106]; &quot;', '&quot;; [.D106]; &quot;',&quot;; [.E106]; &quot;, &quot;; [.F106]; &quot;, &quot;; [.G106]; &quot;);&quot;)" office:value-type="string" office:string-value="insert into IBGE_MUNICIPIOS (UF, COD_UF, CODIGO_MUNICIPIO, NOME_MUNICIPIO, POP_COLETADA, POP_IMPUTADA, POP_TOTAL) values ('PR', '41', '7538', 'Entre Rios do Oeste',4461, 114, 4575);" calcext:value-type="string">
            <text:p>insert into IBGE_MUNICIPIOS (UF, COD_UF, CODIGO_MUNICIPIO, NOME_MUNICIPIO, POP_COLETADA, POP_IMPUTADA, POP_TOTAL) values ('PR', '41', '7538', 'Entre Rios do Oeste',4461, 114, 4575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7546" calcext:value-type="float">
            <text:p>7546</text:p>
          </table:table-cell>
          <table:table-cell office:value-type="string" calcext:value-type="string">
            <text:p>Espigão Alto do Iguaçu</text:p>
          </table:table-cell>
          <table:table-cell office:value-type="float" office:value="4726" calcext:value-type="float">
            <text:p>4726</text:p>
          </table:table-cell>
          <table:table-cell office:value-type="float" office:value="71" calcext:value-type="float">
            <text:p>71</text:p>
          </table:table-cell>
          <table:table-cell office:value-type="float" office:value="4797" calcext:value-type="float">
            <text:p>4797</text:p>
          </table:table-cell>
          <table:table-cell table:formula="of:=CONCATENATE(&quot;insert into IBGE_MUNICIPIOS (UF, COD_UF, CODIGO_MUNICIPIO, NOME_MUNICIPIO, POP_COLETADA, POP_IMPUTADA, POP_TOTAL) values ('&quot;; [.A107]; &quot;', '&quot;; [.B107]; &quot;', '&quot;; [.C107]; &quot;', '&quot;; [.D107]; &quot;',&quot;; [.E107]; &quot;, &quot;; [.F107]; &quot;, &quot;; [.G107]; &quot;);&quot;)" office:value-type="string" office:string-value="insert into IBGE_MUNICIPIOS (UF, COD_UF, CODIGO_MUNICIPIO, NOME_MUNICIPIO, POP_COLETADA, POP_IMPUTADA, POP_TOTAL) values ('PR', '41', '7546', 'Espigão Alto do Iguaçu',4726, 71, 4797);" calcext:value-type="string">
            <text:p>insert into IBGE_MUNICIPIOS (UF, COD_UF, CODIGO_MUNICIPIO, NOME_MUNICIPIO, POP_COLETADA, POP_IMPUTADA, POP_TOTAL) values ('PR', '41', '7546', 'Espigão Alto do Iguaçu',4726, 71, 4797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7553" calcext:value-type="float">
            <text:p>7553</text:p>
          </table:table-cell>
          <table:table-cell office:value-type="string" calcext:value-type="string">
            <text:p>Farol</text:p>
          </table:table-cell>
          <table:table-cell office:value-type="float" office:value="2983" calcext:value-type="float">
            <text:p>2983</text:p>
          </table:table-cell>
          <table:table-cell office:value-type="float" office:value="56" calcext:value-type="float">
            <text:p>56</text:p>
          </table:table-cell>
          <table:table-cell office:value-type="float" office:value="3039" calcext:value-type="float">
            <text:p>3039</text:p>
          </table:table-cell>
          <table:table-cell table:formula="of:=CONCATENATE(&quot;insert into IBGE_MUNICIPIOS (UF, COD_UF, CODIGO_MUNICIPIO, NOME_MUNICIPIO, POP_COLETADA, POP_IMPUTADA, POP_TOTAL) values ('&quot;; [.A108]; &quot;', '&quot;; [.B108]; &quot;', '&quot;; [.C108]; &quot;', '&quot;; [.D108]; &quot;',&quot;; [.E108]; &quot;, &quot;; [.F108]; &quot;, &quot;; [.G108]; &quot;);&quot;)" office:value-type="string" office:string-value="insert into IBGE_MUNICIPIOS (UF, COD_UF, CODIGO_MUNICIPIO, NOME_MUNICIPIO, POP_COLETADA, POP_IMPUTADA, POP_TOTAL) values ('PR', '41', '7553', 'Farol',2983, 56, 3039);" calcext:value-type="string">
            <text:p>insert into IBGE_MUNICIPIOS (UF, COD_UF, CODIGO_MUNICIPIO, NOME_MUNICIPIO, POP_COLETADA, POP_IMPUTADA, POP_TOTAL) values ('PR', '41', '7553', 'Farol',2983, 56, 3039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7603" calcext:value-type="float">
            <text:p>7603</text:p>
          </table:table-cell>
          <table:table-cell office:value-type="string" calcext:value-type="string">
            <text:p>Faxinal</text:p>
          </table:table-cell>
          <table:table-cell office:value-type="float" office:value="16282" calcext:value-type="float">
            <text:p>16282</text:p>
          </table:table-cell>
          <table:table-cell office:value-type="float" office:value="107" calcext:value-type="float">
            <text:p>107</text:p>
          </table:table-cell>
          <table:table-cell office:value-type="float" office:value="16389" calcext:value-type="float">
            <text:p>16389</text:p>
          </table:table-cell>
          <table:table-cell table:formula="of:=CONCATENATE(&quot;insert into IBGE_MUNICIPIOS (UF, COD_UF, CODIGO_MUNICIPIO, NOME_MUNICIPIO, POP_COLETADA, POP_IMPUTADA, POP_TOTAL) values ('&quot;; [.A109]; &quot;', '&quot;; [.B109]; &quot;', '&quot;; [.C109]; &quot;', '&quot;; [.D109]; &quot;',&quot;; [.E109]; &quot;, &quot;; [.F109]; &quot;, &quot;; [.G109]; &quot;);&quot;)" office:value-type="string" office:string-value="insert into IBGE_MUNICIPIOS (UF, COD_UF, CODIGO_MUNICIPIO, NOME_MUNICIPIO, POP_COLETADA, POP_IMPUTADA, POP_TOTAL) values ('PR', '41', '7603', 'Faxinal',16282, 107, 16389);" calcext:value-type="string">
            <text:p>insert into IBGE_MUNICIPIOS (UF, COD_UF, CODIGO_MUNICIPIO, NOME_MUNICIPIO, POP_COLETADA, POP_IMPUTADA, POP_TOTAL) values ('PR', '41', '7603', 'Faxinal',16282, 107, 16389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7652" calcext:value-type="float">
            <text:p>7652</text:p>
          </table:table-cell>
          <table:table-cell office:value-type="string" calcext:value-type="string">
            <text:p>Fazenda Rio Grande</text:p>
          </table:table-cell>
          <table:table-cell office:value-type="float" office:value="141373" calcext:value-type="float">
            <text:p>141373</text:p>
          </table:table-cell>
          <table:table-cell office:value-type="float" office:value="7500" calcext:value-type="float">
            <text:p>7500</text:p>
          </table:table-cell>
          <table:table-cell office:value-type="float" office:value="148873" calcext:value-type="float">
            <text:p>148873</text:p>
          </table:table-cell>
          <table:table-cell table:formula="of:=CONCATENATE(&quot;insert into IBGE_MUNICIPIOS (UF, COD_UF, CODIGO_MUNICIPIO, NOME_MUNICIPIO, POP_COLETADA, POP_IMPUTADA, POP_TOTAL) values ('&quot;; [.A110]; &quot;', '&quot;; [.B110]; &quot;', '&quot;; [.C110]; &quot;', '&quot;; [.D110]; &quot;',&quot;; [.E110]; &quot;, &quot;; [.F110]; &quot;, &quot;; [.G110]; &quot;);&quot;)" office:value-type="string" office:string-value="insert into IBGE_MUNICIPIOS (UF, COD_UF, CODIGO_MUNICIPIO, NOME_MUNICIPIO, POP_COLETADA, POP_IMPUTADA, POP_TOTAL) values ('PR', '41', '7652', 'Fazenda Rio Grande',141373, 7500, 148873);" calcext:value-type="string">
            <text:p>insert into IBGE_MUNICIPIOS (UF, COD_UF, CODIGO_MUNICIPIO, NOME_MUNICIPIO, POP_COLETADA, POP_IMPUTADA, POP_TOTAL) values ('PR', '41', '7652', 'Fazenda Rio Grande',141373, 7500, 148873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7702" calcext:value-type="float">
            <text:p>7702</text:p>
          </table:table-cell>
          <table:table-cell office:value-type="string" calcext:value-type="string">
            <text:p>Fênix</text:p>
          </table:table-cell>
          <table:table-cell office:value-type="float" office:value="4425" calcext:value-type="float">
            <text:p>4425</text:p>
          </table:table-cell>
          <table:table-cell office:value-type="float" office:value="67" calcext:value-type="float">
            <text:p>67</text:p>
          </table:table-cell>
          <table:table-cell office:value-type="float" office:value="4492" calcext:value-type="float">
            <text:p>4492</text:p>
          </table:table-cell>
          <table:table-cell table:formula="of:=CONCATENATE(&quot;insert into IBGE_MUNICIPIOS (UF, COD_UF, CODIGO_MUNICIPIO, NOME_MUNICIPIO, POP_COLETADA, POP_IMPUTADA, POP_TOTAL) values ('&quot;; [.A111]; &quot;', '&quot;; [.B111]; &quot;', '&quot;; [.C111]; &quot;', '&quot;; [.D111]; &quot;',&quot;; [.E111]; &quot;, &quot;; [.F111]; &quot;, &quot;; [.G111]; &quot;);&quot;)" office:value-type="string" office:string-value="insert into IBGE_MUNICIPIOS (UF, COD_UF, CODIGO_MUNICIPIO, NOME_MUNICIPIO, POP_COLETADA, POP_IMPUTADA, POP_TOTAL) values ('PR', '41', '7702', 'Fênix',4425, 67, 4492);" calcext:value-type="string">
            <text:p>insert into IBGE_MUNICIPIOS (UF, COD_UF, CODIGO_MUNICIPIO, NOME_MUNICIPIO, POP_COLETADA, POP_IMPUTADA, POP_TOTAL) values ('PR', '41', '7702', 'Fênix',4425, 67, 4492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7736" calcext:value-type="float">
            <text:p>7736</text:p>
          </table:table-cell>
          <table:table-cell office:value-type="string" calcext:value-type="string">
            <text:p>Fernandes Pinheiro</text:p>
          </table:table-cell>
          <table:table-cell office:value-type="float" office:value="6182" calcext:value-type="float">
            <text:p>6182</text:p>
          </table:table-cell>
          <table:table-cell office:value-type="float" office:value="73" calcext:value-type="float">
            <text:p>73</text:p>
          </table:table-cell>
          <table:table-cell office:value-type="float" office:value="6255" calcext:value-type="float">
            <text:p>6255</text:p>
          </table:table-cell>
          <table:table-cell table:formula="of:=CONCATENATE(&quot;insert into IBGE_MUNICIPIOS (UF, COD_UF, CODIGO_MUNICIPIO, NOME_MUNICIPIO, POP_COLETADA, POP_IMPUTADA, POP_TOTAL) values ('&quot;; [.A112]; &quot;', '&quot;; [.B112]; &quot;', '&quot;; [.C112]; &quot;', '&quot;; [.D112]; &quot;',&quot;; [.E112]; &quot;, &quot;; [.F112]; &quot;, &quot;; [.G112]; &quot;);&quot;)" office:value-type="string" office:string-value="insert into IBGE_MUNICIPIOS (UF, COD_UF, CODIGO_MUNICIPIO, NOME_MUNICIPIO, POP_COLETADA, POP_IMPUTADA, POP_TOTAL) values ('PR', '41', '7736', 'Fernandes Pinheiro',6182, 73, 6255);" calcext:value-type="string">
            <text:p>insert into IBGE_MUNICIPIOS (UF, COD_UF, CODIGO_MUNICIPIO, NOME_MUNICIPIO, POP_COLETADA, POP_IMPUTADA, POP_TOTAL) values ('PR', '41', '7736', 'Fernandes Pinheiro',6182, 73, 6255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7751" calcext:value-type="float">
            <text:p>7751</text:p>
          </table:table-cell>
          <table:table-cell office:value-type="string" calcext:value-type="string">
            <text:p>Figueira</text:p>
          </table:table-cell>
          <table:table-cell office:value-type="float" office:value="8014" calcext:value-type="float">
            <text:p>8014</text:p>
          </table:table-cell>
          <table:table-cell office:value-type="float" office:value="48" calcext:value-type="float">
            <text:p>48</text:p>
          </table:table-cell>
          <table:table-cell office:value-type="float" office:value="8062" calcext:value-type="float">
            <text:p>8062</text:p>
          </table:table-cell>
          <table:table-cell table:formula="of:=CONCATENATE(&quot;insert into IBGE_MUNICIPIOS (UF, COD_UF, CODIGO_MUNICIPIO, NOME_MUNICIPIO, POP_COLETADA, POP_IMPUTADA, POP_TOTAL) values ('&quot;; [.A113]; &quot;', '&quot;; [.B113]; &quot;', '&quot;; [.C113]; &quot;', '&quot;; [.D113]; &quot;',&quot;; [.E113]; &quot;, &quot;; [.F113]; &quot;, &quot;; [.G113]; &quot;);&quot;)" office:value-type="string" office:string-value="insert into IBGE_MUNICIPIOS (UF, COD_UF, CODIGO_MUNICIPIO, NOME_MUNICIPIO, POP_COLETADA, POP_IMPUTADA, POP_TOTAL) values ('PR', '41', '7751', 'Figueira',8014, 48, 8062);" calcext:value-type="string">
            <text:p>insert into IBGE_MUNICIPIOS (UF, COD_UF, CODIGO_MUNICIPIO, NOME_MUNICIPIO, POP_COLETADA, POP_IMPUTADA, POP_TOTAL) values ('PR', '41', '7751', 'Figueira',8014, 48, 8062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7801" calcext:value-type="float">
            <text:p>7801</text:p>
          </table:table-cell>
          <table:table-cell office:value-type="string" calcext:value-type="string">
            <text:p>Floraí</text:p>
          </table:table-cell>
          <table:table-cell office:value-type="float" office:value="4686" calcext:value-type="float">
            <text:p>4686</text:p>
          </table:table-cell>
          <table:table-cell office:value-type="float" office:value="106" calcext:value-type="float">
            <text:p>106</text:p>
          </table:table-cell>
          <table:table-cell office:value-type="float" office:value="4792" calcext:value-type="float">
            <text:p>4792</text:p>
          </table:table-cell>
          <table:table-cell table:formula="of:=CONCATENATE(&quot;insert into IBGE_MUNICIPIOS (UF, COD_UF, CODIGO_MUNICIPIO, NOME_MUNICIPIO, POP_COLETADA, POP_IMPUTADA, POP_TOTAL) values ('&quot;; [.A114]; &quot;', '&quot;; [.B114]; &quot;', '&quot;; [.C114]; &quot;', '&quot;; [.D114]; &quot;',&quot;; [.E114]; &quot;, &quot;; [.F114]; &quot;, &quot;; [.G114]; &quot;);&quot;)" office:value-type="string" office:string-value="insert into IBGE_MUNICIPIOS (UF, COD_UF, CODIGO_MUNICIPIO, NOME_MUNICIPIO, POP_COLETADA, POP_IMPUTADA, POP_TOTAL) values ('PR', '41', '7801', 'Floraí',4686, 106, 4792);" calcext:value-type="string">
            <text:p>insert into IBGE_MUNICIPIOS (UF, COD_UF, CODIGO_MUNICIPIO, NOME_MUNICIPIO, POP_COLETADA, POP_IMPUTADA, POP_TOTAL) values ('PR', '41', '7801', 'Floraí',4686, 106, 4792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7850" calcext:value-type="float">
            <text:p>7850</text:p>
          </table:table-cell>
          <table:table-cell office:value-type="string" calcext:value-type="string">
            <text:p>Flor da Serra do Sul</text:p>
          </table:table-cell>
          <table:table-cell office:value-type="float" office:value="4314" calcext:value-type="float">
            <text:p>4314</text:p>
          </table:table-cell>
          <table:table-cell office:value-type="float" office:value="50" calcext:value-type="float">
            <text:p>50</text:p>
          </table:table-cell>
          <table:table-cell office:value-type="float" office:value="4364" calcext:value-type="float">
            <text:p>4364</text:p>
          </table:table-cell>
          <table:table-cell table:formula="of:=CONCATENATE(&quot;insert into IBGE_MUNICIPIOS (UF, COD_UF, CODIGO_MUNICIPIO, NOME_MUNICIPIO, POP_COLETADA, POP_IMPUTADA, POP_TOTAL) values ('&quot;; [.A115]; &quot;', '&quot;; [.B115]; &quot;', '&quot;; [.C115]; &quot;', '&quot;; [.D115]; &quot;',&quot;; [.E115]; &quot;, &quot;; [.F115]; &quot;, &quot;; [.G115]; &quot;);&quot;)" office:value-type="string" office:string-value="insert into IBGE_MUNICIPIOS (UF, COD_UF, CODIGO_MUNICIPIO, NOME_MUNICIPIO, POP_COLETADA, POP_IMPUTADA, POP_TOTAL) values ('PR', '41', '7850', 'Flor da Serra do Sul',4314, 50, 4364);" calcext:value-type="string">
            <text:p>insert into IBGE_MUNICIPIOS (UF, COD_UF, CODIGO_MUNICIPIO, NOME_MUNICIPIO, POP_COLETADA, POP_IMPUTADA, POP_TOTAL) values ('PR', '41', '7850', 'Flor da Serra do Sul',4314, 50, 4364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7900" calcext:value-type="float">
            <text:p>7900</text:p>
          </table:table-cell>
          <table:table-cell office:value-type="string" calcext:value-type="string">
            <text:p>Floresta</text:p>
          </table:table-cell>
          <table:table-cell office:value-type="float" office:value="10138" calcext:value-type="float">
            <text:p>10138</text:p>
          </table:table-cell>
          <table:table-cell office:value-type="float" office:value="320" calcext:value-type="float">
            <text:p>320</text:p>
          </table:table-cell>
          <table:table-cell office:value-type="float" office:value="10458" calcext:value-type="float">
            <text:p>10458</text:p>
          </table:table-cell>
          <table:table-cell table:formula="of:=CONCATENATE(&quot;insert into IBGE_MUNICIPIOS (UF, COD_UF, CODIGO_MUNICIPIO, NOME_MUNICIPIO, POP_COLETADA, POP_IMPUTADA, POP_TOTAL) values ('&quot;; [.A116]; &quot;', '&quot;; [.B116]; &quot;', '&quot;; [.C116]; &quot;', '&quot;; [.D116]; &quot;',&quot;; [.E116]; &quot;, &quot;; [.F116]; &quot;, &quot;; [.G116]; &quot;);&quot;)" office:value-type="string" office:string-value="insert into IBGE_MUNICIPIOS (UF, COD_UF, CODIGO_MUNICIPIO, NOME_MUNICIPIO, POP_COLETADA, POP_IMPUTADA, POP_TOTAL) values ('PR', '41', '7900', 'Floresta',10138, 320, 10458);" calcext:value-type="string">
            <text:p>insert into IBGE_MUNICIPIOS (UF, COD_UF, CODIGO_MUNICIPIO, NOME_MUNICIPIO, POP_COLETADA, POP_IMPUTADA, POP_TOTAL) values ('PR', '41', '7900', 'Floresta',10138, 320, 10458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8007" calcext:value-type="float">
            <text:p>8007</text:p>
          </table:table-cell>
          <table:table-cell office:value-type="string" calcext:value-type="string">
            <text:p>Florestópolis</text:p>
          </table:table-cell>
          <table:table-cell office:value-type="float" office:value="11041" calcext:value-type="float">
            <text:p>11041</text:p>
          </table:table-cell>
          <table:table-cell office:value-type="float" office:value="405" calcext:value-type="float">
            <text:p>405</text:p>
          </table:table-cell>
          <table:table-cell office:value-type="float" office:value="11446" calcext:value-type="float">
            <text:p>11446</text:p>
          </table:table-cell>
          <table:table-cell table:formula="of:=CONCATENATE(&quot;insert into IBGE_MUNICIPIOS (UF, COD_UF, CODIGO_MUNICIPIO, NOME_MUNICIPIO, POP_COLETADA, POP_IMPUTADA, POP_TOTAL) values ('&quot;; [.A117]; &quot;', '&quot;; [.B117]; &quot;', '&quot;; [.C117]; &quot;', '&quot;; [.D117]; &quot;',&quot;; [.E117]; &quot;, &quot;; [.F117]; &quot;, &quot;; [.G117]; &quot;);&quot;)" office:value-type="string" office:string-value="insert into IBGE_MUNICIPIOS (UF, COD_UF, CODIGO_MUNICIPIO, NOME_MUNICIPIO, POP_COLETADA, POP_IMPUTADA, POP_TOTAL) values ('PR', '41', '8007', 'Florestópolis',11041, 405, 11446);" calcext:value-type="string">
            <text:p>insert into IBGE_MUNICIPIOS (UF, COD_UF, CODIGO_MUNICIPIO, NOME_MUNICIPIO, POP_COLETADA, POP_IMPUTADA, POP_TOTAL) values ('PR', '41', '8007', 'Florestópolis',11041, 405, 11446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8106" calcext:value-type="float">
            <text:p>8106</text:p>
          </table:table-cell>
          <table:table-cell office:value-type="string" calcext:value-type="string">
            <text:p>Flórida</text:p>
          </table:table-cell>
          <table:table-cell office:value-type="float" office:value="2634" calcext:value-type="float">
            <text:p>2634</text:p>
          </table:table-cell>
          <table:table-cell office:value-type="float" office:value="18" calcext:value-type="float">
            <text:p>18</text:p>
          </table:table-cell>
          <table:table-cell office:value-type="float" office:value="2652" calcext:value-type="float">
            <text:p>2652</text:p>
          </table:table-cell>
          <table:table-cell table:formula="of:=CONCATENATE(&quot;insert into IBGE_MUNICIPIOS (UF, COD_UF, CODIGO_MUNICIPIO, NOME_MUNICIPIO, POP_COLETADA, POP_IMPUTADA, POP_TOTAL) values ('&quot;; [.A118]; &quot;', '&quot;; [.B118]; &quot;', '&quot;; [.C118]; &quot;', '&quot;; [.D118]; &quot;',&quot;; [.E118]; &quot;, &quot;; [.F118]; &quot;, &quot;; [.G118]; &quot;);&quot;)" office:value-type="string" office:string-value="insert into IBGE_MUNICIPIOS (UF, COD_UF, CODIGO_MUNICIPIO, NOME_MUNICIPIO, POP_COLETADA, POP_IMPUTADA, POP_TOTAL) values ('PR', '41', '8106', 'Flórida',2634, 18, 2652);" calcext:value-type="string">
            <text:p>insert into IBGE_MUNICIPIOS (UF, COD_UF, CODIGO_MUNICIPIO, NOME_MUNICIPIO, POP_COLETADA, POP_IMPUTADA, POP_TOTAL) values ('PR', '41', '8106', 'Flórida',2634, 18, 2652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8205" calcext:value-type="float">
            <text:p>8205</text:p>
          </table:table-cell>
          <table:table-cell office:value-type="string" calcext:value-type="string">
            <text:p>Formosa do Oeste</text:p>
          </table:table-cell>
          <table:table-cell office:value-type="float" office:value="7609" calcext:value-type="float">
            <text:p>7609</text:p>
          </table:table-cell>
          <table:table-cell office:value-type="float" office:value="26" calcext:value-type="float">
            <text:p>26</text:p>
          </table:table-cell>
          <table:table-cell office:value-type="float" office:value="7635" calcext:value-type="float">
            <text:p>7635</text:p>
          </table:table-cell>
          <table:table-cell table:formula="of:=CONCATENATE(&quot;insert into IBGE_MUNICIPIOS (UF, COD_UF, CODIGO_MUNICIPIO, NOME_MUNICIPIO, POP_COLETADA, POP_IMPUTADA, POP_TOTAL) values ('&quot;; [.A119]; &quot;', '&quot;; [.B119]; &quot;', '&quot;; [.C119]; &quot;', '&quot;; [.D119]; &quot;',&quot;; [.E119]; &quot;, &quot;; [.F119]; &quot;, &quot;; [.G119]; &quot;);&quot;)" office:value-type="string" office:string-value="insert into IBGE_MUNICIPIOS (UF, COD_UF, CODIGO_MUNICIPIO, NOME_MUNICIPIO, POP_COLETADA, POP_IMPUTADA, POP_TOTAL) values ('PR', '41', '8205', 'Formosa do Oeste',7609, 26, 7635);" calcext:value-type="string">
            <text:p>insert into IBGE_MUNICIPIOS (UF, COD_UF, CODIGO_MUNICIPIO, NOME_MUNICIPIO, POP_COLETADA, POP_IMPUTADA, POP_TOTAL) values ('PR', '41', '8205', 'Formosa do Oeste',7609, 26, 7635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8304" calcext:value-type="float">
            <text:p>8304</text:p>
          </table:table-cell>
          <table:table-cell office:value-type="string" calcext:value-type="string">
            <text:p>Foz do Iguaçu</text:p>
          </table:table-cell>
          <table:table-cell office:value-type="float" office:value="269312" calcext:value-type="float">
            <text:p>269312</text:p>
          </table:table-cell>
          <table:table-cell office:value-type="float" office:value="16103" calcext:value-type="float">
            <text:p>16103</text:p>
          </table:table-cell>
          <table:table-cell office:value-type="float" office:value="285415" calcext:value-type="float">
            <text:p>285415</text:p>
          </table:table-cell>
          <table:table-cell table:formula="of:=CONCATENATE(&quot;insert into IBGE_MUNICIPIOS (UF, COD_UF, CODIGO_MUNICIPIO, NOME_MUNICIPIO, POP_COLETADA, POP_IMPUTADA, POP_TOTAL) values ('&quot;; [.A120]; &quot;', '&quot;; [.B120]; &quot;', '&quot;; [.C120]; &quot;', '&quot;; [.D120]; &quot;',&quot;; [.E120]; &quot;, &quot;; [.F120]; &quot;, &quot;; [.G120]; &quot;);&quot;)" office:value-type="string" office:string-value="insert into IBGE_MUNICIPIOS (UF, COD_UF, CODIGO_MUNICIPIO, NOME_MUNICIPIO, POP_COLETADA, POP_IMPUTADA, POP_TOTAL) values ('PR', '41', '8304', 'Foz do Iguaçu',269312, 16103, 285415);" calcext:value-type="string">
            <text:p>insert into IBGE_MUNICIPIOS (UF, COD_UF, CODIGO_MUNICIPIO, NOME_MUNICIPIO, POP_COLETADA, POP_IMPUTADA, POP_TOTAL) values ('PR', '41', '8304', 'Foz do Iguaçu',269312, 16103, 285415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8320" calcext:value-type="float">
            <text:p>8320</text:p>
          </table:table-cell>
          <table:table-cell office:value-type="string" calcext:value-type="string">
            <text:p>Francisco Alves</text:p>
          </table:table-cell>
          <table:table-cell office:value-type="float" office:value="7874" calcext:value-type="float">
            <text:p>7874</text:p>
          </table:table-cell>
          <table:table-cell office:value-type="float" office:value="242" calcext:value-type="float">
            <text:p>242</text:p>
          </table:table-cell>
          <table:table-cell office:value-type="float" office:value="8116" calcext:value-type="float">
            <text:p>8116</text:p>
          </table:table-cell>
          <table:table-cell table:formula="of:=CONCATENATE(&quot;insert into IBGE_MUNICIPIOS (UF, COD_UF, CODIGO_MUNICIPIO, NOME_MUNICIPIO, POP_COLETADA, POP_IMPUTADA, POP_TOTAL) values ('&quot;; [.A121]; &quot;', '&quot;; [.B121]; &quot;', '&quot;; [.C121]; &quot;', '&quot;; [.D121]; &quot;',&quot;; [.E121]; &quot;, &quot;; [.F121]; &quot;, &quot;; [.G121]; &quot;);&quot;)" office:value-type="string" office:string-value="insert into IBGE_MUNICIPIOS (UF, COD_UF, CODIGO_MUNICIPIO, NOME_MUNICIPIO, POP_COLETADA, POP_IMPUTADA, POP_TOTAL) values ('PR', '41', '8320', 'Francisco Alves',7874, 242, 8116);" calcext:value-type="string">
            <text:p>insert into IBGE_MUNICIPIOS (UF, COD_UF, CODIGO_MUNICIPIO, NOME_MUNICIPIO, POP_COLETADA, POP_IMPUTADA, POP_TOTAL) values ('PR', '41', '8320', 'Francisco Alves',7874, 242, 8116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8403" calcext:value-type="float">
            <text:p>8403</text:p>
          </table:table-cell>
          <table:table-cell office:value-type="string" calcext:value-type="string">
            <text:p>Francisco Beltrão</text:p>
          </table:table-cell>
          <table:table-cell office:value-type="float" office:value="95294" calcext:value-type="float">
            <text:p>95294</text:p>
          </table:table-cell>
          <table:table-cell office:value-type="float" office:value="1372" calcext:value-type="float">
            <text:p>1372</text:p>
          </table:table-cell>
          <table:table-cell office:value-type="float" office:value="96666" calcext:value-type="float">
            <text:p>96666</text:p>
          </table:table-cell>
          <table:table-cell table:formula="of:=CONCATENATE(&quot;insert into IBGE_MUNICIPIOS (UF, COD_UF, CODIGO_MUNICIPIO, NOME_MUNICIPIO, POP_COLETADA, POP_IMPUTADA, POP_TOTAL) values ('&quot;; [.A122]; &quot;', '&quot;; [.B122]; &quot;', '&quot;; [.C122]; &quot;', '&quot;; [.D122]; &quot;',&quot;; [.E122]; &quot;, &quot;; [.F122]; &quot;, &quot;; [.G122]; &quot;);&quot;)" office:value-type="string" office:string-value="insert into IBGE_MUNICIPIOS (UF, COD_UF, CODIGO_MUNICIPIO, NOME_MUNICIPIO, POP_COLETADA, POP_IMPUTADA, POP_TOTAL) values ('PR', '41', '8403', 'Francisco Beltrão',95294, 1372, 96666);" calcext:value-type="string">
            <text:p>insert into IBGE_MUNICIPIOS (UF, COD_UF, CODIGO_MUNICIPIO, NOME_MUNICIPIO, POP_COLETADA, POP_IMPUTADA, POP_TOTAL) values ('PR', '41', '8403', 'Francisco Beltrão',95294, 1372, 96666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8452" calcext:value-type="float">
            <text:p>8452</text:p>
          </table:table-cell>
          <table:table-cell office:value-type="string" calcext:value-type="string">
            <text:p>Foz do Jordão</text:p>
          </table:table-cell>
          <table:table-cell office:value-type="float" office:value="4888" calcext:value-type="float">
            <text:p>4888</text:p>
          </table:table-cell>
          <table:table-cell office:value-type="float" office:value="38" calcext:value-type="float">
            <text:p>38</text:p>
          </table:table-cell>
          <table:table-cell office:value-type="float" office:value="4926" calcext:value-type="float">
            <text:p>4926</text:p>
          </table:table-cell>
          <table:table-cell table:formula="of:=CONCATENATE(&quot;insert into IBGE_MUNICIPIOS (UF, COD_UF, CODIGO_MUNICIPIO, NOME_MUNICIPIO, POP_COLETADA, POP_IMPUTADA, POP_TOTAL) values ('&quot;; [.A123]; &quot;', '&quot;; [.B123]; &quot;', '&quot;; [.C123]; &quot;', '&quot;; [.D123]; &quot;',&quot;; [.E123]; &quot;, &quot;; [.F123]; &quot;, &quot;; [.G123]; &quot;);&quot;)" office:value-type="string" office:string-value="insert into IBGE_MUNICIPIOS (UF, COD_UF, CODIGO_MUNICIPIO, NOME_MUNICIPIO, POP_COLETADA, POP_IMPUTADA, POP_TOTAL) values ('PR', '41', '8452', 'Foz do Jordão',4888, 38, 4926);" calcext:value-type="string">
            <text:p>insert into IBGE_MUNICIPIOS (UF, COD_UF, CODIGO_MUNICIPIO, NOME_MUNICIPIO, POP_COLETADA, POP_IMPUTADA, POP_TOTAL) values ('PR', '41', '8452', 'Foz do Jordão',4888, 38, 4926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8502" calcext:value-type="float">
            <text:p>8502</text:p>
          </table:table-cell>
          <table:table-cell office:value-type="string" calcext:value-type="string">
            <text:p>General Carneiro</text:p>
          </table:table-cell>
          <table:table-cell office:value-type="float" office:value="10846" calcext:value-type="float">
            <text:p>10846</text:p>
          </table:table-cell>
          <table:table-cell office:value-type="float" office:value="216" calcext:value-type="float">
            <text:p>216</text:p>
          </table:table-cell>
          <table:table-cell office:value-type="float" office:value="11062" calcext:value-type="float">
            <text:p>11062</text:p>
          </table:table-cell>
          <table:table-cell table:formula="of:=CONCATENATE(&quot;insert into IBGE_MUNICIPIOS (UF, COD_UF, CODIGO_MUNICIPIO, NOME_MUNICIPIO, POP_COLETADA, POP_IMPUTADA, POP_TOTAL) values ('&quot;; [.A124]; &quot;', '&quot;; [.B124]; &quot;', '&quot;; [.C124]; &quot;', '&quot;; [.D124]; &quot;',&quot;; [.E124]; &quot;, &quot;; [.F124]; &quot;, &quot;; [.G124]; &quot;);&quot;)" office:value-type="string" office:string-value="insert into IBGE_MUNICIPIOS (UF, COD_UF, CODIGO_MUNICIPIO, NOME_MUNICIPIO, POP_COLETADA, POP_IMPUTADA, POP_TOTAL) values ('PR', '41', '8502', 'General Carneiro',10846, 216, 11062);" calcext:value-type="string">
            <text:p>insert into IBGE_MUNICIPIOS (UF, COD_UF, CODIGO_MUNICIPIO, NOME_MUNICIPIO, POP_COLETADA, POP_IMPUTADA, POP_TOTAL) values ('PR', '41', '8502', 'General Carneiro',10846, 216, 11062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8551" calcext:value-type="float">
            <text:p>8551</text:p>
          </table:table-cell>
          <table:table-cell office:value-type="string" calcext:value-type="string">
            <text:p>Godoy Moreira</text:p>
          </table:table-cell>
          <table:table-cell office:value-type="float" office:value="2970" calcext:value-type="float">
            <text:p>2970</text:p>
          </table:table-cell>
          <table:table-cell office:value-type="float" office:value="7" calcext:value-type="float">
            <text:p>7</text:p>
          </table:table-cell>
          <table:table-cell office:value-type="float" office:value="2977" calcext:value-type="float">
            <text:p>2977</text:p>
          </table:table-cell>
          <table:table-cell table:formula="of:=CONCATENATE(&quot;insert into IBGE_MUNICIPIOS (UF, COD_UF, CODIGO_MUNICIPIO, NOME_MUNICIPIO, POP_COLETADA, POP_IMPUTADA, POP_TOTAL) values ('&quot;; [.A125]; &quot;', '&quot;; [.B125]; &quot;', '&quot;; [.C125]; &quot;', '&quot;; [.D125]; &quot;',&quot;; [.E125]; &quot;, &quot;; [.F125]; &quot;, &quot;; [.G125]; &quot;);&quot;)" office:value-type="string" office:string-value="insert into IBGE_MUNICIPIOS (UF, COD_UF, CODIGO_MUNICIPIO, NOME_MUNICIPIO, POP_COLETADA, POP_IMPUTADA, POP_TOTAL) values ('PR', '41', '8551', 'Godoy Moreira',2970, 7, 2977);" calcext:value-type="string">
            <text:p>insert into IBGE_MUNICIPIOS (UF, COD_UF, CODIGO_MUNICIPIO, NOME_MUNICIPIO, POP_COLETADA, POP_IMPUTADA, POP_TOTAL) values ('PR', '41', '8551', 'Godoy Moreira',2970, 7, 2977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8601" calcext:value-type="float">
            <text:p>8601</text:p>
          </table:table-cell>
          <table:table-cell office:value-type="string" calcext:value-type="string">
            <text:p>Goioerê</text:p>
          </table:table-cell>
          <table:table-cell office:value-type="float" office:value="27166" calcext:value-type="float">
            <text:p>27166</text:p>
          </table:table-cell>
          <table:table-cell office:value-type="float" office:value="1271" calcext:value-type="float">
            <text:p>1271</text:p>
          </table:table-cell>
          <table:table-cell office:value-type="float" office:value="28437" calcext:value-type="float">
            <text:p>28437</text:p>
          </table:table-cell>
          <table:table-cell table:formula="of:=CONCATENATE(&quot;insert into IBGE_MUNICIPIOS (UF, COD_UF, CODIGO_MUNICIPIO, NOME_MUNICIPIO, POP_COLETADA, POP_IMPUTADA, POP_TOTAL) values ('&quot;; [.A126]; &quot;', '&quot;; [.B126]; &quot;', '&quot;; [.C126]; &quot;', '&quot;; [.D126]; &quot;',&quot;; [.E126]; &quot;, &quot;; [.F126]; &quot;, &quot;; [.G126]; &quot;);&quot;)" office:value-type="string" office:string-value="insert into IBGE_MUNICIPIOS (UF, COD_UF, CODIGO_MUNICIPIO, NOME_MUNICIPIO, POP_COLETADA, POP_IMPUTADA, POP_TOTAL) values ('PR', '41', '8601', 'Goioerê',27166, 1271, 28437);" calcext:value-type="string">
            <text:p>insert into IBGE_MUNICIPIOS (UF, COD_UF, CODIGO_MUNICIPIO, NOME_MUNICIPIO, POP_COLETADA, POP_IMPUTADA, POP_TOTAL) values ('PR', '41', '8601', 'Goioerê',27166, 1271, 28437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8650" calcext:value-type="float">
            <text:p>8650</text:p>
          </table:table-cell>
          <table:table-cell office:value-type="string" calcext:value-type="string">
            <text:p>Goioxim</text:p>
          </table:table-cell>
          <table:table-cell office:value-type="float" office:value="6560" calcext:value-type="float">
            <text:p>6560</text:p>
          </table:table-cell>
          <table:table-cell office:value-type="float" office:value="6" calcext:value-type="float">
            <text:p>6</text:p>
          </table:table-cell>
          <table:table-cell office:value-type="float" office:value="6566" calcext:value-type="float">
            <text:p>6566</text:p>
          </table:table-cell>
          <table:table-cell table:formula="of:=CONCATENATE(&quot;insert into IBGE_MUNICIPIOS (UF, COD_UF, CODIGO_MUNICIPIO, NOME_MUNICIPIO, POP_COLETADA, POP_IMPUTADA, POP_TOTAL) values ('&quot;; [.A127]; &quot;', '&quot;; [.B127]; &quot;', '&quot;; [.C127]; &quot;', '&quot;; [.D127]; &quot;',&quot;; [.E127]; &quot;, &quot;; [.F127]; &quot;, &quot;; [.G127]; &quot;);&quot;)" office:value-type="string" office:string-value="insert into IBGE_MUNICIPIOS (UF, COD_UF, CODIGO_MUNICIPIO, NOME_MUNICIPIO, POP_COLETADA, POP_IMPUTADA, POP_TOTAL) values ('PR', '41', '8650', 'Goioxim',6560, 6, 6566);" calcext:value-type="string">
            <text:p>insert into IBGE_MUNICIPIOS (UF, COD_UF, CODIGO_MUNICIPIO, NOME_MUNICIPIO, POP_COLETADA, POP_IMPUTADA, POP_TOTAL) values ('PR', '41', '8650', 'Goioxim',6560, 6, 6566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8700" calcext:value-type="float">
            <text:p>8700</text:p>
          </table:table-cell>
          <table:table-cell office:value-type="string" calcext:value-type="string">
            <text:p>Grandes Rios</text:p>
          </table:table-cell>
          <table:table-cell office:value-type="float" office:value="5625" calcext:value-type="float">
            <text:p>5625</text:p>
          </table:table-cell>
          <table:table-cell office:value-type="float" office:value="16" calcext:value-type="float">
            <text:p>16</text:p>
          </table:table-cell>
          <table:table-cell office:value-type="float" office:value="5641" calcext:value-type="float">
            <text:p>5641</text:p>
          </table:table-cell>
          <table:table-cell table:formula="of:=CONCATENATE(&quot;insert into IBGE_MUNICIPIOS (UF, COD_UF, CODIGO_MUNICIPIO, NOME_MUNICIPIO, POP_COLETADA, POP_IMPUTADA, POP_TOTAL) values ('&quot;; [.A128]; &quot;', '&quot;; [.B128]; &quot;', '&quot;; [.C128]; &quot;', '&quot;; [.D128]; &quot;',&quot;; [.E128]; &quot;, &quot;; [.F128]; &quot;, &quot;; [.G128]; &quot;);&quot;)" office:value-type="string" office:string-value="insert into IBGE_MUNICIPIOS (UF, COD_UF, CODIGO_MUNICIPIO, NOME_MUNICIPIO, POP_COLETADA, POP_IMPUTADA, POP_TOTAL) values ('PR', '41', '8700', 'Grandes Rios',5625, 16, 5641);" calcext:value-type="string">
            <text:p>insert into IBGE_MUNICIPIOS (UF, COD_UF, CODIGO_MUNICIPIO, NOME_MUNICIPIO, POP_COLETADA, POP_IMPUTADA, POP_TOTAL) values ('PR', '41', '8700', 'Grandes Rios',5625, 16, 5641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8809" calcext:value-type="float">
            <text:p>8809</text:p>
          </table:table-cell>
          <table:table-cell office:value-type="string" calcext:value-type="string">
            <text:p>Guaíra</text:p>
          </table:table-cell>
          <table:table-cell office:value-type="float" office:value="30071" calcext:value-type="float">
            <text:p>30071</text:p>
          </table:table-cell>
          <table:table-cell office:value-type="float" office:value="2026" calcext:value-type="float">
            <text:p>2026</text:p>
          </table:table-cell>
          <table:table-cell office:value-type="float" office:value="32097" calcext:value-type="float">
            <text:p>32097</text:p>
          </table:table-cell>
          <table:table-cell table:formula="of:=CONCATENATE(&quot;insert into IBGE_MUNICIPIOS (UF, COD_UF, CODIGO_MUNICIPIO, NOME_MUNICIPIO, POP_COLETADA, POP_IMPUTADA, POP_TOTAL) values ('&quot;; [.A129]; &quot;', '&quot;; [.B129]; &quot;', '&quot;; [.C129]; &quot;', '&quot;; [.D129]; &quot;',&quot;; [.E129]; &quot;, &quot;; [.F129]; &quot;, &quot;; [.G129]; &quot;);&quot;)" office:value-type="string" office:string-value="insert into IBGE_MUNICIPIOS (UF, COD_UF, CODIGO_MUNICIPIO, NOME_MUNICIPIO, POP_COLETADA, POP_IMPUTADA, POP_TOTAL) values ('PR', '41', '8809', 'Guaíra',30071, 2026, 32097);" calcext:value-type="string">
            <text:p>insert into IBGE_MUNICIPIOS (UF, COD_UF, CODIGO_MUNICIPIO, NOME_MUNICIPIO, POP_COLETADA, POP_IMPUTADA, POP_TOTAL) values ('PR', '41', '8809', 'Guaíra',30071, 2026, 32097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8908" calcext:value-type="float">
            <text:p>8908</text:p>
          </table:table-cell>
          <table:table-cell office:value-type="string" calcext:value-type="string">
            <text:p>Guairaçá</text:p>
          </table:table-cell>
          <table:table-cell office:value-type="float" office:value="6478" calcext:value-type="float">
            <text:p>6478</text:p>
          </table:table-cell>
          <table:table-cell office:value-type="float" office:value="109" calcext:value-type="float">
            <text:p>109</text:p>
          </table:table-cell>
          <table:table-cell office:value-type="float" office:value="6587" calcext:value-type="float">
            <text:p>6587</text:p>
          </table:table-cell>
          <table:table-cell table:formula="of:=CONCATENATE(&quot;insert into IBGE_MUNICIPIOS (UF, COD_UF, CODIGO_MUNICIPIO, NOME_MUNICIPIO, POP_COLETADA, POP_IMPUTADA, POP_TOTAL) values ('&quot;; [.A130]; &quot;', '&quot;; [.B130]; &quot;', '&quot;; [.C130]; &quot;', '&quot;; [.D130]; &quot;',&quot;; [.E130]; &quot;, &quot;; [.F130]; &quot;, &quot;; [.G130]; &quot;);&quot;)" office:value-type="string" office:string-value="insert into IBGE_MUNICIPIOS (UF, COD_UF, CODIGO_MUNICIPIO, NOME_MUNICIPIO, POP_COLETADA, POP_IMPUTADA, POP_TOTAL) values ('PR', '41', '8908', 'Guairaçá',6478, 109, 6587);" calcext:value-type="string">
            <text:p>insert into IBGE_MUNICIPIOS (UF, COD_UF, CODIGO_MUNICIPIO, NOME_MUNICIPIO, POP_COLETADA, POP_IMPUTADA, POP_TOTAL) values ('PR', '41', '8908', 'Guairaçá',6478, 109, 6587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8957" calcext:value-type="float">
            <text:p>8957</text:p>
          </table:table-cell>
          <table:table-cell office:value-type="string" calcext:value-type="string">
            <text:p>Guamiranga</text:p>
          </table:table-cell>
          <table:table-cell office:value-type="float" office:value="7856" calcext:value-type="float">
            <text:p>7856</text:p>
          </table:table-cell>
          <table:table-cell office:value-type="float" office:value="0" calcext:value-type="float">
            <text:p>0</text:p>
          </table:table-cell>
          <table:table-cell office:value-type="float" office:value="7856" calcext:value-type="float">
            <text:p>7856</text:p>
          </table:table-cell>
          <table:table-cell table:formula="of:=CONCATENATE(&quot;insert into IBGE_MUNICIPIOS (UF, COD_UF, CODIGO_MUNICIPIO, NOME_MUNICIPIO, POP_COLETADA, POP_IMPUTADA, POP_TOTAL) values ('&quot;; [.A131]; &quot;', '&quot;; [.B131]; &quot;', '&quot;; [.C131]; &quot;', '&quot;; [.D131]; &quot;',&quot;; [.E131]; &quot;, &quot;; [.F131]; &quot;, &quot;; [.G131]; &quot;);&quot;)" office:value-type="string" office:string-value="insert into IBGE_MUNICIPIOS (UF, COD_UF, CODIGO_MUNICIPIO, NOME_MUNICIPIO, POP_COLETADA, POP_IMPUTADA, POP_TOTAL) values ('PR', '41', '8957', 'Guamiranga',7856, 0, 7856);" calcext:value-type="string">
            <text:p>insert into IBGE_MUNICIPIOS (UF, COD_UF, CODIGO_MUNICIPIO, NOME_MUNICIPIO, POP_COLETADA, POP_IMPUTADA, POP_TOTAL) values ('PR', '41', '8957', 'Guamiranga',7856, 0, 7856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9005" calcext:value-type="float">
            <text:p>9005</text:p>
          </table:table-cell>
          <table:table-cell office:value-type="string" calcext:value-type="string">
            <text:p>Guapirama</text:p>
          </table:table-cell>
          <table:table-cell office:value-type="float" office:value="4552" calcext:value-type="float">
            <text:p>4552</text:p>
          </table:table-cell>
          <table:table-cell office:value-type="float" office:value="74" calcext:value-type="float">
            <text:p>74</text:p>
          </table:table-cell>
          <table:table-cell office:value-type="float" office:value="4626" calcext:value-type="float">
            <text:p>4626</text:p>
          </table:table-cell>
          <table:table-cell table:formula="of:=CONCATENATE(&quot;insert into IBGE_MUNICIPIOS (UF, COD_UF, CODIGO_MUNICIPIO, NOME_MUNICIPIO, POP_COLETADA, POP_IMPUTADA, POP_TOTAL) values ('&quot;; [.A132]; &quot;', '&quot;; [.B132]; &quot;', '&quot;; [.C132]; &quot;', '&quot;; [.D132]; &quot;',&quot;; [.E132]; &quot;, &quot;; [.F132]; &quot;, &quot;; [.G132]; &quot;);&quot;)" office:value-type="string" office:string-value="insert into IBGE_MUNICIPIOS (UF, COD_UF, CODIGO_MUNICIPIO, NOME_MUNICIPIO, POP_COLETADA, POP_IMPUTADA, POP_TOTAL) values ('PR', '41', '9005', 'Guapirama',4552, 74, 4626);" calcext:value-type="string">
            <text:p>insert into IBGE_MUNICIPIOS (UF, COD_UF, CODIGO_MUNICIPIO, NOME_MUNICIPIO, POP_COLETADA, POP_IMPUTADA, POP_TOTAL) values ('PR', '41', '9005', 'Guapirama',4552, 74, 4626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9104" calcext:value-type="float">
            <text:p>9104</text:p>
          </table:table-cell>
          <table:table-cell office:value-type="string" calcext:value-type="string">
            <text:p>Guaporema</text:p>
          </table:table-cell>
          <table:table-cell office:value-type="float" office:value="2167" calcext:value-type="float">
            <text:p>2167</text:p>
          </table:table-cell>
          <table:table-cell office:value-type="float" office:value="24" calcext:value-type="float">
            <text:p>24</text:p>
          </table:table-cell>
          <table:table-cell office:value-type="float" office:value="2191" calcext:value-type="float">
            <text:p>2191</text:p>
          </table:table-cell>
          <table:table-cell table:formula="of:=CONCATENATE(&quot;insert into IBGE_MUNICIPIOS (UF, COD_UF, CODIGO_MUNICIPIO, NOME_MUNICIPIO, POP_COLETADA, POP_IMPUTADA, POP_TOTAL) values ('&quot;; [.A133]; &quot;', '&quot;; [.B133]; &quot;', '&quot;; [.C133]; &quot;', '&quot;; [.D133]; &quot;',&quot;; [.E133]; &quot;, &quot;; [.F133]; &quot;, &quot;; [.G133]; &quot;);&quot;)" office:value-type="string" office:string-value="insert into IBGE_MUNICIPIOS (UF, COD_UF, CODIGO_MUNICIPIO, NOME_MUNICIPIO, POP_COLETADA, POP_IMPUTADA, POP_TOTAL) values ('PR', '41', '9104', 'Guaporema',2167, 24, 2191);" calcext:value-type="string">
            <text:p>insert into IBGE_MUNICIPIOS (UF, COD_UF, CODIGO_MUNICIPIO, NOME_MUNICIPIO, POP_COLETADA, POP_IMPUTADA, POP_TOTAL) values ('PR', '41', '9104', 'Guaporema',2167, 24, 2191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9203" calcext:value-type="float">
            <text:p>9203</text:p>
          </table:table-cell>
          <table:table-cell office:value-type="string" calcext:value-type="string">
            <text:p>Guaraci</text:p>
          </table:table-cell>
          <table:table-cell office:value-type="float" office:value="4743" calcext:value-type="float">
            <text:p>4743</text:p>
          </table:table-cell>
          <table:table-cell office:value-type="float" office:value="5" calcext:value-type="float">
            <text:p>5</text:p>
          </table:table-cell>
          <table:table-cell office:value-type="float" office:value="4748" calcext:value-type="float">
            <text:p>4748</text:p>
          </table:table-cell>
          <table:table-cell table:formula="of:=CONCATENATE(&quot;insert into IBGE_MUNICIPIOS (UF, COD_UF, CODIGO_MUNICIPIO, NOME_MUNICIPIO, POP_COLETADA, POP_IMPUTADA, POP_TOTAL) values ('&quot;; [.A134]; &quot;', '&quot;; [.B134]; &quot;', '&quot;; [.C134]; &quot;', '&quot;; [.D134]; &quot;',&quot;; [.E134]; &quot;, &quot;; [.F134]; &quot;, &quot;; [.G134]; &quot;);&quot;)" office:value-type="string" office:string-value="insert into IBGE_MUNICIPIOS (UF, COD_UF, CODIGO_MUNICIPIO, NOME_MUNICIPIO, POP_COLETADA, POP_IMPUTADA, POP_TOTAL) values ('PR', '41', '9203', 'Guaraci',4743, 5, 4748);" calcext:value-type="string">
            <text:p>insert into IBGE_MUNICIPIOS (UF, COD_UF, CODIGO_MUNICIPIO, NOME_MUNICIPIO, POP_COLETADA, POP_IMPUTADA, POP_TOTAL) values ('PR', '41', '9203', 'Guaraci',4743, 5, 4748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9302" calcext:value-type="float">
            <text:p>9302</text:p>
          </table:table-cell>
          <table:table-cell office:value-type="string" calcext:value-type="string">
            <text:p>Guaraniaçu</text:p>
          </table:table-cell>
          <table:table-cell office:value-type="float" office:value="13681" calcext:value-type="float">
            <text:p>13681</text:p>
          </table:table-cell>
          <table:table-cell office:value-type="float" office:value="54" calcext:value-type="float">
            <text:p>54</text:p>
          </table:table-cell>
          <table:table-cell office:value-type="float" office:value="13735" calcext:value-type="float">
            <text:p>13735</text:p>
          </table:table-cell>
          <table:table-cell table:formula="of:=CONCATENATE(&quot;insert into IBGE_MUNICIPIOS (UF, COD_UF, CODIGO_MUNICIPIO, NOME_MUNICIPIO, POP_COLETADA, POP_IMPUTADA, POP_TOTAL) values ('&quot;; [.A135]; &quot;', '&quot;; [.B135]; &quot;', '&quot;; [.C135]; &quot;', '&quot;; [.D135]; &quot;',&quot;; [.E135]; &quot;, &quot;; [.F135]; &quot;, &quot;; [.G135]; &quot;);&quot;)" office:value-type="string" office:string-value="insert into IBGE_MUNICIPIOS (UF, COD_UF, CODIGO_MUNICIPIO, NOME_MUNICIPIO, POP_COLETADA, POP_IMPUTADA, POP_TOTAL) values ('PR', '41', '9302', 'Guaraniaçu',13681, 54, 13735);" calcext:value-type="string">
            <text:p>insert into IBGE_MUNICIPIOS (UF, COD_UF, CODIGO_MUNICIPIO, NOME_MUNICIPIO, POP_COLETADA, POP_IMPUTADA, POP_TOTAL) values ('PR', '41', '9302', 'Guaraniaçu',13681, 54, 13735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9401" calcext:value-type="float">
            <text:p>9401</text:p>
          </table:table-cell>
          <table:table-cell office:value-type="string" calcext:value-type="string">
            <text:p>Guarapuava</text:p>
          </table:table-cell>
          <table:table-cell office:value-type="float" office:value="176444" calcext:value-type="float">
            <text:p>176444</text:p>
          </table:table-cell>
          <table:table-cell office:value-type="float" office:value="5649" calcext:value-type="float">
            <text:p>5649</text:p>
          </table:table-cell>
          <table:table-cell office:value-type="float" office:value="182093" calcext:value-type="float">
            <text:p>182093</text:p>
          </table:table-cell>
          <table:table-cell table:formula="of:=CONCATENATE(&quot;insert into IBGE_MUNICIPIOS (UF, COD_UF, CODIGO_MUNICIPIO, NOME_MUNICIPIO, POP_COLETADA, POP_IMPUTADA, POP_TOTAL) values ('&quot;; [.A136]; &quot;', '&quot;; [.B136]; &quot;', '&quot;; [.C136]; &quot;', '&quot;; [.D136]; &quot;',&quot;; [.E136]; &quot;, &quot;; [.F136]; &quot;, &quot;; [.G136]; &quot;);&quot;)" office:value-type="string" office:string-value="insert into IBGE_MUNICIPIOS (UF, COD_UF, CODIGO_MUNICIPIO, NOME_MUNICIPIO, POP_COLETADA, POP_IMPUTADA, POP_TOTAL) values ('PR', '41', '9401', 'Guarapuava',176444, 5649, 182093);" calcext:value-type="string">
            <text:p>insert into IBGE_MUNICIPIOS (UF, COD_UF, CODIGO_MUNICIPIO, NOME_MUNICIPIO, POP_COLETADA, POP_IMPUTADA, POP_TOTAL) values ('PR', '41', '9401', 'Guarapuava',176444, 5649, 182093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9500" calcext:value-type="float">
            <text:p>9500</text:p>
          </table:table-cell>
          <table:table-cell office:value-type="string" calcext:value-type="string">
            <text:p>Guaraqueçaba</text:p>
          </table:table-cell>
          <table:table-cell office:value-type="float" office:value="7214" calcext:value-type="float">
            <text:p>7214</text:p>
          </table:table-cell>
          <table:table-cell office:value-type="float" office:value="216" calcext:value-type="float">
            <text:p>216</text:p>
          </table:table-cell>
          <table:table-cell office:value-type="float" office:value="7430" calcext:value-type="float">
            <text:p>7430</text:p>
          </table:table-cell>
          <table:table-cell table:formula="of:=CONCATENATE(&quot;insert into IBGE_MUNICIPIOS (UF, COD_UF, CODIGO_MUNICIPIO, NOME_MUNICIPIO, POP_COLETADA, POP_IMPUTADA, POP_TOTAL) values ('&quot;; [.A137]; &quot;', '&quot;; [.B137]; &quot;', '&quot;; [.C137]; &quot;', '&quot;; [.D137]; &quot;',&quot;; [.E137]; &quot;, &quot;; [.F137]; &quot;, &quot;; [.G137]; &quot;);&quot;)" office:value-type="string" office:string-value="insert into IBGE_MUNICIPIOS (UF, COD_UF, CODIGO_MUNICIPIO, NOME_MUNICIPIO, POP_COLETADA, POP_IMPUTADA, POP_TOTAL) values ('PR', '41', '9500', 'Guaraqueçaba',7214, 216, 7430);" calcext:value-type="string">
            <text:p>insert into IBGE_MUNICIPIOS (UF, COD_UF, CODIGO_MUNICIPIO, NOME_MUNICIPIO, POP_COLETADA, POP_IMPUTADA, POP_TOTAL) values ('PR', '41', '9500', 'Guaraqueçaba',7214, 216, 7430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9609" calcext:value-type="float">
            <text:p>9609</text:p>
          </table:table-cell>
          <table:table-cell office:value-type="string" calcext:value-type="string">
            <text:p>Guaratuba</text:p>
          </table:table-cell>
          <table:table-cell office:value-type="float" office:value="39405" calcext:value-type="float">
            <text:p>39405</text:p>
          </table:table-cell>
          <table:table-cell office:value-type="float" office:value="2657" calcext:value-type="float">
            <text:p>2657</text:p>
          </table:table-cell>
          <table:table-cell office:value-type="float" office:value="42062" calcext:value-type="float">
            <text:p>42062</text:p>
          </table:table-cell>
          <table:table-cell table:formula="of:=CONCATENATE(&quot;insert into IBGE_MUNICIPIOS (UF, COD_UF, CODIGO_MUNICIPIO, NOME_MUNICIPIO, POP_COLETADA, POP_IMPUTADA, POP_TOTAL) values ('&quot;; [.A138]; &quot;', '&quot;; [.B138]; &quot;', '&quot;; [.C138]; &quot;', '&quot;; [.D138]; &quot;',&quot;; [.E138]; &quot;, &quot;; [.F138]; &quot;, &quot;; [.G138]; &quot;);&quot;)" office:value-type="string" office:string-value="insert into IBGE_MUNICIPIOS (UF, COD_UF, CODIGO_MUNICIPIO, NOME_MUNICIPIO, POP_COLETADA, POP_IMPUTADA, POP_TOTAL) values ('PR', '41', '9609', 'Guaratuba',39405, 2657, 42062);" calcext:value-type="string">
            <text:p>insert into IBGE_MUNICIPIOS (UF, COD_UF, CODIGO_MUNICIPIO, NOME_MUNICIPIO, POP_COLETADA, POP_IMPUTADA, POP_TOTAL) values ('PR', '41', '9609', 'Guaratuba',39405, 2657, 42062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9658" calcext:value-type="float">
            <text:p>9658</text:p>
          </table:table-cell>
          <table:table-cell office:value-type="string" calcext:value-type="string">
            <text:p>Honório Serpa</text:p>
          </table:table-cell>
          <table:table-cell office:value-type="float" office:value="4941" calcext:value-type="float">
            <text:p>4941</text:p>
          </table:table-cell>
          <table:table-cell office:value-type="float" office:value="0" calcext:value-type="float">
            <text:p>0</text:p>
          </table:table-cell>
          <table:table-cell office:value-type="float" office:value="4941" calcext:value-type="float">
            <text:p>4941</text:p>
          </table:table-cell>
          <table:table-cell table:formula="of:=CONCATENATE(&quot;insert into IBGE_MUNICIPIOS (UF, COD_UF, CODIGO_MUNICIPIO, NOME_MUNICIPIO, POP_COLETADA, POP_IMPUTADA, POP_TOTAL) values ('&quot;; [.A139]; &quot;', '&quot;; [.B139]; &quot;', '&quot;; [.C139]; &quot;', '&quot;; [.D139]; &quot;',&quot;; [.E139]; &quot;, &quot;; [.F139]; &quot;, &quot;; [.G139]; &quot;);&quot;)" office:value-type="string" office:string-value="insert into IBGE_MUNICIPIOS (UF, COD_UF, CODIGO_MUNICIPIO, NOME_MUNICIPIO, POP_COLETADA, POP_IMPUTADA, POP_TOTAL) values ('PR', '41', '9658', 'Honório Serpa',4941, 0, 4941);" calcext:value-type="string">
            <text:p>insert into IBGE_MUNICIPIOS (UF, COD_UF, CODIGO_MUNICIPIO, NOME_MUNICIPIO, POP_COLETADA, POP_IMPUTADA, POP_TOTAL) values ('PR', '41', '9658', 'Honório Serpa',4941, 0, 4941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9708" calcext:value-type="float">
            <text:p>9708</text:p>
          </table:table-cell>
          <table:table-cell office:value-type="string" calcext:value-type="string">
            <text:p>Ibaiti</text:p>
          </table:table-cell>
          <table:table-cell office:value-type="float" office:value="28532" calcext:value-type="float">
            <text:p>28532</text:p>
          </table:table-cell>
          <table:table-cell office:value-type="float" office:value="298" calcext:value-type="float">
            <text:p>298</text:p>
          </table:table-cell>
          <table:table-cell office:value-type="float" office:value="28830" calcext:value-type="float">
            <text:p>28830</text:p>
          </table:table-cell>
          <table:table-cell table:formula="of:=CONCATENATE(&quot;insert into IBGE_MUNICIPIOS (UF, COD_UF, CODIGO_MUNICIPIO, NOME_MUNICIPIO, POP_COLETADA, POP_IMPUTADA, POP_TOTAL) values ('&quot;; [.A140]; &quot;', '&quot;; [.B140]; &quot;', '&quot;; [.C140]; &quot;', '&quot;; [.D140]; &quot;',&quot;; [.E140]; &quot;, &quot;; [.F140]; &quot;, &quot;; [.G140]; &quot;);&quot;)" office:value-type="string" office:string-value="insert into IBGE_MUNICIPIOS (UF, COD_UF, CODIGO_MUNICIPIO, NOME_MUNICIPIO, POP_COLETADA, POP_IMPUTADA, POP_TOTAL) values ('PR', '41', '9708', 'Ibaiti',28532, 298, 28830);" calcext:value-type="string">
            <text:p>insert into IBGE_MUNICIPIOS (UF, COD_UF, CODIGO_MUNICIPIO, NOME_MUNICIPIO, POP_COLETADA, POP_IMPUTADA, POP_TOTAL) values ('PR', '41', '9708', 'Ibaiti',28532, 298, 28830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9757" calcext:value-type="float">
            <text:p>9757</text:p>
          </table:table-cell>
          <table:table-cell office:value-type="string" calcext:value-type="string">
            <text:p>Ibema</text:p>
          </table:table-cell>
          <table:table-cell office:value-type="float" office:value="6218" calcext:value-type="float">
            <text:p>6218</text:p>
          </table:table-cell>
          <table:table-cell office:value-type="float" office:value="0" calcext:value-type="float">
            <text:p>0</text:p>
          </table:table-cell>
          <table:table-cell office:value-type="float" office:value="6218" calcext:value-type="float">
            <text:p>6218</text:p>
          </table:table-cell>
          <table:table-cell table:formula="of:=CONCATENATE(&quot;insert into IBGE_MUNICIPIOS (UF, COD_UF, CODIGO_MUNICIPIO, NOME_MUNICIPIO, POP_COLETADA, POP_IMPUTADA, POP_TOTAL) values ('&quot;; [.A141]; &quot;', '&quot;; [.B141]; &quot;', '&quot;; [.C141]; &quot;', '&quot;; [.D141]; &quot;',&quot;; [.E141]; &quot;, &quot;; [.F141]; &quot;, &quot;; [.G141]; &quot;);&quot;)" office:value-type="string" office:string-value="insert into IBGE_MUNICIPIOS (UF, COD_UF, CODIGO_MUNICIPIO, NOME_MUNICIPIO, POP_COLETADA, POP_IMPUTADA, POP_TOTAL) values ('PR', '41', '9757', 'Ibema',6218, 0, 6218);" calcext:value-type="string">
            <text:p>insert into IBGE_MUNICIPIOS (UF, COD_UF, CODIGO_MUNICIPIO, NOME_MUNICIPIO, POP_COLETADA, POP_IMPUTADA, POP_TOTAL) values ('PR', '41', '9757', 'Ibema',6218, 0, 6218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9807" calcext:value-type="float">
            <text:p>9807</text:p>
          </table:table-cell>
          <table:table-cell office:value-type="string" calcext:value-type="string">
            <text:p>Ibiporã</text:p>
          </table:table-cell>
          <table:table-cell office:value-type="float" office:value="49010" calcext:value-type="float">
            <text:p>49010</text:p>
          </table:table-cell>
          <table:table-cell office:value-type="float" office:value="2593" calcext:value-type="float">
            <text:p>2593</text:p>
          </table:table-cell>
          <table:table-cell office:value-type="float" office:value="51603" calcext:value-type="float">
            <text:p>51603</text:p>
          </table:table-cell>
          <table:table-cell table:formula="of:=CONCATENATE(&quot;insert into IBGE_MUNICIPIOS (UF, COD_UF, CODIGO_MUNICIPIO, NOME_MUNICIPIO, POP_COLETADA, POP_IMPUTADA, POP_TOTAL) values ('&quot;; [.A142]; &quot;', '&quot;; [.B142]; &quot;', '&quot;; [.C142]; &quot;', '&quot;; [.D142]; &quot;',&quot;; [.E142]; &quot;, &quot;; [.F142]; &quot;, &quot;; [.G142]; &quot;);&quot;)" office:value-type="string" office:string-value="insert into IBGE_MUNICIPIOS (UF, COD_UF, CODIGO_MUNICIPIO, NOME_MUNICIPIO, POP_COLETADA, POP_IMPUTADA, POP_TOTAL) values ('PR', '41', '9807', 'Ibiporã',49010, 2593, 51603);" calcext:value-type="string">
            <text:p>insert into IBGE_MUNICIPIOS (UF, COD_UF, CODIGO_MUNICIPIO, NOME_MUNICIPIO, POP_COLETADA, POP_IMPUTADA, POP_TOTAL) values ('PR', '41', '9807', 'Ibiporã',49010, 2593, 51603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9906" calcext:value-type="float">
            <text:p>9906</text:p>
          </table:table-cell>
          <table:table-cell office:value-type="string" calcext:value-type="string">
            <text:p>Icaraíma</text:p>
          </table:table-cell>
          <table:table-cell office:value-type="float" office:value="8935" calcext:value-type="float">
            <text:p>8935</text:p>
          </table:table-cell>
          <table:table-cell office:value-type="float" office:value="56" calcext:value-type="float">
            <text:p>56</text:p>
          </table:table-cell>
          <table:table-cell office:value-type="float" office:value="8991" calcext:value-type="float">
            <text:p>8991</text:p>
          </table:table-cell>
          <table:table-cell table:formula="of:=CONCATENATE(&quot;insert into IBGE_MUNICIPIOS (UF, COD_UF, CODIGO_MUNICIPIO, NOME_MUNICIPIO, POP_COLETADA, POP_IMPUTADA, POP_TOTAL) values ('&quot;; [.A143]; &quot;', '&quot;; [.B143]; &quot;', '&quot;; [.C143]; &quot;', '&quot;; [.D143]; &quot;',&quot;; [.E143]; &quot;, &quot;; [.F143]; &quot;, &quot;; [.G143]; &quot;);&quot;)" office:value-type="string" office:string-value="insert into IBGE_MUNICIPIOS (UF, COD_UF, CODIGO_MUNICIPIO, NOME_MUNICIPIO, POP_COLETADA, POP_IMPUTADA, POP_TOTAL) values ('PR', '41', '9906', 'Icaraíma',8935, 56, 8991);" calcext:value-type="string">
            <text:p>insert into IBGE_MUNICIPIOS (UF, COD_UF, CODIGO_MUNICIPIO, NOME_MUNICIPIO, POP_COLETADA, POP_IMPUTADA, POP_TOTAL) values ('PR', '41', '9906', 'Icaraíma',8935, 56, 8991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10003" calcext:value-type="float">
            <text:p>10003</text:p>
          </table:table-cell>
          <table:table-cell office:value-type="string" calcext:value-type="string">
            <text:p>Iguaraçu</text:p>
          </table:table-cell>
          <table:table-cell office:value-type="float" office:value="4968" calcext:value-type="float">
            <text:p>4968</text:p>
          </table:table-cell>
          <table:table-cell office:value-type="float" office:value="370" calcext:value-type="float">
            <text:p>370</text:p>
          </table:table-cell>
          <table:table-cell office:value-type="float" office:value="5338" calcext:value-type="float">
            <text:p>5338</text:p>
          </table:table-cell>
          <table:table-cell table:formula="of:=CONCATENATE(&quot;insert into IBGE_MUNICIPIOS (UF, COD_UF, CODIGO_MUNICIPIO, NOME_MUNICIPIO, POP_COLETADA, POP_IMPUTADA, POP_TOTAL) values ('&quot;; [.A144]; &quot;', '&quot;; [.B144]; &quot;', '&quot;; [.C144]; &quot;', '&quot;; [.D144]; &quot;',&quot;; [.E144]; &quot;, &quot;; [.F144]; &quot;, &quot;; [.G144]; &quot;);&quot;)" office:value-type="string" office:string-value="insert into IBGE_MUNICIPIOS (UF, COD_UF, CODIGO_MUNICIPIO, NOME_MUNICIPIO, POP_COLETADA, POP_IMPUTADA, POP_TOTAL) values ('PR', '41', '10003', 'Iguaraçu',4968, 370, 5338);" calcext:value-type="string">
            <text:p>insert into IBGE_MUNICIPIOS (UF, COD_UF, CODIGO_MUNICIPIO, NOME_MUNICIPIO, POP_COLETADA, POP_IMPUTADA, POP_TOTAL) values ('PR', '41', '10003', 'Iguaraçu',4968, 370, 5338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10052" calcext:value-type="float">
            <text:p>10052</text:p>
          </table:table-cell>
          <table:table-cell office:value-type="string" calcext:value-type="string">
            <text:p>Iguatu</text:p>
          </table:table-cell>
          <table:table-cell office:value-type="float" office:value="2138" calcext:value-type="float">
            <text:p>2138</text:p>
          </table:table-cell>
          <table:table-cell office:value-type="float" office:value="6" calcext:value-type="float">
            <text:p>6</text:p>
          </table:table-cell>
          <table:table-cell office:value-type="float" office:value="2144" calcext:value-type="float">
            <text:p>2144</text:p>
          </table:table-cell>
          <table:table-cell table:formula="of:=CONCATENATE(&quot;insert into IBGE_MUNICIPIOS (UF, COD_UF, CODIGO_MUNICIPIO, NOME_MUNICIPIO, POP_COLETADA, POP_IMPUTADA, POP_TOTAL) values ('&quot;; [.A145]; &quot;', '&quot;; [.B145]; &quot;', '&quot;; [.C145]; &quot;', '&quot;; [.D145]; &quot;',&quot;; [.E145]; &quot;, &quot;; [.F145]; &quot;, &quot;; [.G145]; &quot;);&quot;)" office:value-type="string" office:string-value="insert into IBGE_MUNICIPIOS (UF, COD_UF, CODIGO_MUNICIPIO, NOME_MUNICIPIO, POP_COLETADA, POP_IMPUTADA, POP_TOTAL) values ('PR', '41', '10052', 'Iguatu',2138, 6, 2144);" calcext:value-type="string">
            <text:p>insert into IBGE_MUNICIPIOS (UF, COD_UF, CODIGO_MUNICIPIO, NOME_MUNICIPIO, POP_COLETADA, POP_IMPUTADA, POP_TOTAL) values ('PR', '41', '10052', 'Iguatu',2138, 6, 2144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10078" calcext:value-type="float">
            <text:p>10078</text:p>
          </table:table-cell>
          <table:table-cell office:value-type="string" calcext:value-type="string">
            <text:p>Imbaú</text:p>
          </table:table-cell>
          <table:table-cell office:value-type="float" office:value="13798" calcext:value-type="float">
            <text:p>13798</text:p>
          </table:table-cell>
          <table:table-cell office:value-type="float" office:value="451" calcext:value-type="float">
            <text:p>451</text:p>
          </table:table-cell>
          <table:table-cell office:value-type="float" office:value="14249" calcext:value-type="float">
            <text:p>14249</text:p>
          </table:table-cell>
          <table:table-cell table:formula="of:=CONCATENATE(&quot;insert into IBGE_MUNICIPIOS (UF, COD_UF, CODIGO_MUNICIPIO, NOME_MUNICIPIO, POP_COLETADA, POP_IMPUTADA, POP_TOTAL) values ('&quot;; [.A146]; &quot;', '&quot;; [.B146]; &quot;', '&quot;; [.C146]; &quot;', '&quot;; [.D146]; &quot;',&quot;; [.E146]; &quot;, &quot;; [.F146]; &quot;, &quot;; [.G146]; &quot;);&quot;)" office:value-type="string" office:string-value="insert into IBGE_MUNICIPIOS (UF, COD_UF, CODIGO_MUNICIPIO, NOME_MUNICIPIO, POP_COLETADA, POP_IMPUTADA, POP_TOTAL) values ('PR', '41', '10078', 'Imbaú',13798, 451, 14249);" calcext:value-type="string">
            <text:p>insert into IBGE_MUNICIPIOS (UF, COD_UF, CODIGO_MUNICIPIO, NOME_MUNICIPIO, POP_COLETADA, POP_IMPUTADA, POP_TOTAL) values ('PR', '41', '10078', 'Imbaú',13798, 451, 14249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10102" calcext:value-type="float">
            <text:p>10102</text:p>
          </table:table-cell>
          <table:table-cell office:value-type="string" calcext:value-type="string">
            <text:p>Imbituva</text:p>
          </table:table-cell>
          <table:table-cell office:value-type="float" office:value="29883" calcext:value-type="float">
            <text:p>29883</text:p>
          </table:table-cell>
          <table:table-cell office:value-type="float" office:value="41" calcext:value-type="float">
            <text:p>41</text:p>
          </table:table-cell>
          <table:table-cell office:value-type="float" office:value="29924" calcext:value-type="float">
            <text:p>29924</text:p>
          </table:table-cell>
          <table:table-cell table:formula="of:=CONCATENATE(&quot;insert into IBGE_MUNICIPIOS (UF, COD_UF, CODIGO_MUNICIPIO, NOME_MUNICIPIO, POP_COLETADA, POP_IMPUTADA, POP_TOTAL) values ('&quot;; [.A147]; &quot;', '&quot;; [.B147]; &quot;', '&quot;; [.C147]; &quot;', '&quot;; [.D147]; &quot;',&quot;; [.E147]; &quot;, &quot;; [.F147]; &quot;, &quot;; [.G147]; &quot;);&quot;)" office:value-type="string" office:string-value="insert into IBGE_MUNICIPIOS (UF, COD_UF, CODIGO_MUNICIPIO, NOME_MUNICIPIO, POP_COLETADA, POP_IMPUTADA, POP_TOTAL) values ('PR', '41', '10102', 'Imbituva',29883, 41, 29924);" calcext:value-type="string">
            <text:p>insert into IBGE_MUNICIPIOS (UF, COD_UF, CODIGO_MUNICIPIO, NOME_MUNICIPIO, POP_COLETADA, POP_IMPUTADA, POP_TOTAL) values ('PR', '41', '10102', 'Imbituva',29883, 41, 29924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10201" calcext:value-type="float">
            <text:p>10201</text:p>
          </table:table-cell>
          <table:table-cell office:value-type="string" calcext:value-type="string">
            <text:p>Inácio Martins</text:p>
          </table:table-cell>
          <table:table-cell office:value-type="float" office:value="9613" calcext:value-type="float">
            <text:p>9613</text:p>
          </table:table-cell>
          <table:table-cell office:value-type="float" office:value="57" calcext:value-type="float">
            <text:p>57</text:p>
          </table:table-cell>
          <table:table-cell office:value-type="float" office:value="9670" calcext:value-type="float">
            <text:p>9670</text:p>
          </table:table-cell>
          <table:table-cell table:formula="of:=CONCATENATE(&quot;insert into IBGE_MUNICIPIOS (UF, COD_UF, CODIGO_MUNICIPIO, NOME_MUNICIPIO, POP_COLETADA, POP_IMPUTADA, POP_TOTAL) values ('&quot;; [.A148]; &quot;', '&quot;; [.B148]; &quot;', '&quot;; [.C148]; &quot;', '&quot;; [.D148]; &quot;',&quot;; [.E148]; &quot;, &quot;; [.F148]; &quot;, &quot;; [.G148]; &quot;);&quot;)" office:value-type="string" office:string-value="insert into IBGE_MUNICIPIOS (UF, COD_UF, CODIGO_MUNICIPIO, NOME_MUNICIPIO, POP_COLETADA, POP_IMPUTADA, POP_TOTAL) values ('PR', '41', '10201', 'Inácio Martins',9613, 57, 9670);" calcext:value-type="string">
            <text:p>insert into IBGE_MUNICIPIOS (UF, COD_UF, CODIGO_MUNICIPIO, NOME_MUNICIPIO, POP_COLETADA, POP_IMPUTADA, POP_TOTAL) values ('PR', '41', '10201', 'Inácio Martins',9613, 57, 9670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10300" calcext:value-type="float">
            <text:p>10300</text:p>
          </table:table-cell>
          <table:table-cell office:value-type="string" calcext:value-type="string">
            <text:p>Inajá</text:p>
          </table:table-cell>
          <table:table-cell office:value-type="float" office:value="2519" calcext:value-type="float">
            <text:p>2519</text:p>
          </table:table-cell>
          <table:table-cell office:value-type="float" office:value="17" calcext:value-type="float">
            <text:p>17</text:p>
          </table:table-cell>
          <table:table-cell office:value-type="float" office:value="2536" calcext:value-type="float">
            <text:p>2536</text:p>
          </table:table-cell>
          <table:table-cell table:formula="of:=CONCATENATE(&quot;insert into IBGE_MUNICIPIOS (UF, COD_UF, CODIGO_MUNICIPIO, NOME_MUNICIPIO, POP_COLETADA, POP_IMPUTADA, POP_TOTAL) values ('&quot;; [.A149]; &quot;', '&quot;; [.B149]; &quot;', '&quot;; [.C149]; &quot;', '&quot;; [.D149]; &quot;',&quot;; [.E149]; &quot;, &quot;; [.F149]; &quot;, &quot;; [.G149]; &quot;);&quot;)" office:value-type="string" office:string-value="insert into IBGE_MUNICIPIOS (UF, COD_UF, CODIGO_MUNICIPIO, NOME_MUNICIPIO, POP_COLETADA, POP_IMPUTADA, POP_TOTAL) values ('PR', '41', '10300', 'Inajá',2519, 17, 2536);" calcext:value-type="string">
            <text:p>insert into IBGE_MUNICIPIOS (UF, COD_UF, CODIGO_MUNICIPIO, NOME_MUNICIPIO, POP_COLETADA, POP_IMPUTADA, POP_TOTAL) values ('PR', '41', '10300', 'Inajá',2519, 17, 2536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10409" calcext:value-type="float">
            <text:p>10409</text:p>
          </table:table-cell>
          <table:table-cell office:value-type="string" calcext:value-type="string">
            <text:p>Indianópolis</text:p>
          </table:table-cell>
          <table:table-cell office:value-type="float" office:value="4397" calcext:value-type="float">
            <text:p>4397</text:p>
          </table:table-cell>
          <table:table-cell office:value-type="float" office:value="51" calcext:value-type="float">
            <text:p>51</text:p>
          </table:table-cell>
          <table:table-cell office:value-type="float" office:value="4448" calcext:value-type="float">
            <text:p>4448</text:p>
          </table:table-cell>
          <table:table-cell table:formula="of:=CONCATENATE(&quot;insert into IBGE_MUNICIPIOS (UF, COD_UF, CODIGO_MUNICIPIO, NOME_MUNICIPIO, POP_COLETADA, POP_IMPUTADA, POP_TOTAL) values ('&quot;; [.A150]; &quot;', '&quot;; [.B150]; &quot;', '&quot;; [.C150]; &quot;', '&quot;; [.D150]; &quot;',&quot;; [.E150]; &quot;, &quot;; [.F150]; &quot;, &quot;; [.G150]; &quot;);&quot;)" office:value-type="string" office:string-value="insert into IBGE_MUNICIPIOS (UF, COD_UF, CODIGO_MUNICIPIO, NOME_MUNICIPIO, POP_COLETADA, POP_IMPUTADA, POP_TOTAL) values ('PR', '41', '10409', 'Indianópolis',4397, 51, 4448);" calcext:value-type="string">
            <text:p>insert into IBGE_MUNICIPIOS (UF, COD_UF, CODIGO_MUNICIPIO, NOME_MUNICIPIO, POP_COLETADA, POP_IMPUTADA, POP_TOTAL) values ('PR', '41', '10409', 'Indianópolis',4397, 51, 4448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10508" calcext:value-type="float">
            <text:p>10508</text:p>
          </table:table-cell>
          <table:table-cell office:value-type="string" calcext:value-type="string">
            <text:p>Ipiranga</text:p>
          </table:table-cell>
          <table:table-cell office:value-type="float" office:value="14078" calcext:value-type="float">
            <text:p>14078</text:p>
          </table:table-cell>
          <table:table-cell office:value-type="float" office:value="64" calcext:value-type="float">
            <text:p>64</text:p>
          </table:table-cell>
          <table:table-cell office:value-type="float" office:value="14142" calcext:value-type="float">
            <text:p>14142</text:p>
          </table:table-cell>
          <table:table-cell table:formula="of:=CONCATENATE(&quot;insert into IBGE_MUNICIPIOS (UF, COD_UF, CODIGO_MUNICIPIO, NOME_MUNICIPIO, POP_COLETADA, POP_IMPUTADA, POP_TOTAL) values ('&quot;; [.A151]; &quot;', '&quot;; [.B151]; &quot;', '&quot;; [.C151]; &quot;', '&quot;; [.D151]; &quot;',&quot;; [.E151]; &quot;, &quot;; [.F151]; &quot;, &quot;; [.G151]; &quot;);&quot;)" office:value-type="string" office:string-value="insert into IBGE_MUNICIPIOS (UF, COD_UF, CODIGO_MUNICIPIO, NOME_MUNICIPIO, POP_COLETADA, POP_IMPUTADA, POP_TOTAL) values ('PR', '41', '10508', 'Ipiranga',14078, 64, 14142);" calcext:value-type="string">
            <text:p>insert into IBGE_MUNICIPIOS (UF, COD_UF, CODIGO_MUNICIPIO, NOME_MUNICIPIO, POP_COLETADA, POP_IMPUTADA, POP_TOTAL) values ('PR', '41', '10508', 'Ipiranga',14078, 64, 14142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10607" calcext:value-type="float">
            <text:p>10607</text:p>
          </table:table-cell>
          <table:table-cell office:value-type="string" calcext:value-type="string">
            <text:p>Iporã</text:p>
          </table:table-cell>
          <table:table-cell office:value-type="float" office:value="15413" calcext:value-type="float">
            <text:p>15413</text:p>
          </table:table-cell>
          <table:table-cell office:value-type="float" office:value="333" calcext:value-type="float">
            <text:p>333</text:p>
          </table:table-cell>
          <table:table-cell office:value-type="float" office:value="15746" calcext:value-type="float">
            <text:p>15746</text:p>
          </table:table-cell>
          <table:table-cell table:formula="of:=CONCATENATE(&quot;insert into IBGE_MUNICIPIOS (UF, COD_UF, CODIGO_MUNICIPIO, NOME_MUNICIPIO, POP_COLETADA, POP_IMPUTADA, POP_TOTAL) values ('&quot;; [.A152]; &quot;', '&quot;; [.B152]; &quot;', '&quot;; [.C152]; &quot;', '&quot;; [.D152]; &quot;',&quot;; [.E152]; &quot;, &quot;; [.F152]; &quot;, &quot;; [.G152]; &quot;);&quot;)" office:value-type="string" office:string-value="insert into IBGE_MUNICIPIOS (UF, COD_UF, CODIGO_MUNICIPIO, NOME_MUNICIPIO, POP_COLETADA, POP_IMPUTADA, POP_TOTAL) values ('PR', '41', '10607', 'Iporã',15413, 333, 15746);" calcext:value-type="string">
            <text:p>insert into IBGE_MUNICIPIOS (UF, COD_UF, CODIGO_MUNICIPIO, NOME_MUNICIPIO, POP_COLETADA, POP_IMPUTADA, POP_TOTAL) values ('PR', '41', '10607', 'Iporã',15413, 333, 15746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10656" calcext:value-type="float">
            <text:p>10656</text:p>
          </table:table-cell>
          <table:table-cell office:value-type="string" calcext:value-type="string">
            <text:p>Iracema do Oeste</text:p>
          </table:table-cell>
          <table:table-cell office:value-type="float" office:value="2333" calcext:value-type="float">
            <text:p>2333</text:p>
          </table:table-cell>
          <table:table-cell office:value-type="float" office:value="10" calcext:value-type="float">
            <text:p>10</text:p>
          </table:table-cell>
          <table:table-cell office:value-type="float" office:value="2343" calcext:value-type="float">
            <text:p>2343</text:p>
          </table:table-cell>
          <table:table-cell table:formula="of:=CONCATENATE(&quot;insert into IBGE_MUNICIPIOS (UF, COD_UF, CODIGO_MUNICIPIO, NOME_MUNICIPIO, POP_COLETADA, POP_IMPUTADA, POP_TOTAL) values ('&quot;; [.A153]; &quot;', '&quot;; [.B153]; &quot;', '&quot;; [.C153]; &quot;', '&quot;; [.D153]; &quot;',&quot;; [.E153]; &quot;, &quot;; [.F153]; &quot;, &quot;; [.G153]; &quot;);&quot;)" office:value-type="string" office:string-value="insert into IBGE_MUNICIPIOS (UF, COD_UF, CODIGO_MUNICIPIO, NOME_MUNICIPIO, POP_COLETADA, POP_IMPUTADA, POP_TOTAL) values ('PR', '41', '10656', 'Iracema do Oeste',2333, 10, 2343);" calcext:value-type="string">
            <text:p>insert into IBGE_MUNICIPIOS (UF, COD_UF, CODIGO_MUNICIPIO, NOME_MUNICIPIO, POP_COLETADA, POP_IMPUTADA, POP_TOTAL) values ('PR', '41', '10656', 'Iracema do Oeste',2333, 10, 2343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10706" calcext:value-type="float">
            <text:p>10706</text:p>
          </table:table-cell>
          <table:table-cell office:value-type="string" calcext:value-type="string">
            <text:p>Irati</text:p>
          </table:table-cell>
          <table:table-cell office:value-type="float" office:value="58184" calcext:value-type="float">
            <text:p>58184</text:p>
          </table:table-cell>
          <table:table-cell office:value-type="float" office:value="1066" calcext:value-type="float">
            <text:p>1066</text:p>
          </table:table-cell>
          <table:table-cell office:value-type="float" office:value="59250" calcext:value-type="float">
            <text:p>59250</text:p>
          </table:table-cell>
          <table:table-cell table:formula="of:=CONCATENATE(&quot;insert into IBGE_MUNICIPIOS (UF, COD_UF, CODIGO_MUNICIPIO, NOME_MUNICIPIO, POP_COLETADA, POP_IMPUTADA, POP_TOTAL) values ('&quot;; [.A154]; &quot;', '&quot;; [.B154]; &quot;', '&quot;; [.C154]; &quot;', '&quot;; [.D154]; &quot;',&quot;; [.E154]; &quot;, &quot;; [.F154]; &quot;, &quot;; [.G154]; &quot;);&quot;)" office:value-type="string" office:string-value="insert into IBGE_MUNICIPIOS (UF, COD_UF, CODIGO_MUNICIPIO, NOME_MUNICIPIO, POP_COLETADA, POP_IMPUTADA, POP_TOTAL) values ('PR', '41', '10706', 'Irati',58184, 1066, 59250);" calcext:value-type="string">
            <text:p>insert into IBGE_MUNICIPIOS (UF, COD_UF, CODIGO_MUNICIPIO, NOME_MUNICIPIO, POP_COLETADA, POP_IMPUTADA, POP_TOTAL) values ('PR', '41', '10706', 'Irati',58184, 1066, 59250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10805" calcext:value-type="float">
            <text:p>10805</text:p>
          </table:table-cell>
          <table:table-cell office:value-type="string" calcext:value-type="string">
            <text:p>Iretama</text:p>
          </table:table-cell>
          <table:table-cell office:value-type="float" office:value="10633" calcext:value-type="float">
            <text:p>10633</text:p>
          </table:table-cell>
          <table:table-cell office:value-type="float" office:value="51" calcext:value-type="float">
            <text:p>51</text:p>
          </table:table-cell>
          <table:table-cell office:value-type="float" office:value="10684" calcext:value-type="float">
            <text:p>10684</text:p>
          </table:table-cell>
          <table:table-cell table:formula="of:=CONCATENATE(&quot;insert into IBGE_MUNICIPIOS (UF, COD_UF, CODIGO_MUNICIPIO, NOME_MUNICIPIO, POP_COLETADA, POP_IMPUTADA, POP_TOTAL) values ('&quot;; [.A155]; &quot;', '&quot;; [.B155]; &quot;', '&quot;; [.C155]; &quot;', '&quot;; [.D155]; &quot;',&quot;; [.E155]; &quot;, &quot;; [.F155]; &quot;, &quot;; [.G155]; &quot;);&quot;)" office:value-type="string" office:string-value="insert into IBGE_MUNICIPIOS (UF, COD_UF, CODIGO_MUNICIPIO, NOME_MUNICIPIO, POP_COLETADA, POP_IMPUTADA, POP_TOTAL) values ('PR', '41', '10805', 'Iretama',10633, 51, 10684);" calcext:value-type="string">
            <text:p>insert into IBGE_MUNICIPIOS (UF, COD_UF, CODIGO_MUNICIPIO, NOME_MUNICIPIO, POP_COLETADA, POP_IMPUTADA, POP_TOTAL) values ('PR', '41', '10805', 'Iretama',10633, 51, 10684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10904" calcext:value-type="float">
            <text:p>10904</text:p>
          </table:table-cell>
          <table:table-cell office:value-type="string" calcext:value-type="string">
            <text:p>Itaguajé</text:p>
          </table:table-cell>
          <table:table-cell office:value-type="float" office:value="4465" calcext:value-type="float">
            <text:p>4465</text:p>
          </table:table-cell>
          <table:table-cell office:value-type="float" office:value="16" calcext:value-type="float">
            <text:p>16</text:p>
          </table:table-cell>
          <table:table-cell office:value-type="float" office:value="4481" calcext:value-type="float">
            <text:p>4481</text:p>
          </table:table-cell>
          <table:table-cell table:formula="of:=CONCATENATE(&quot;insert into IBGE_MUNICIPIOS (UF, COD_UF, CODIGO_MUNICIPIO, NOME_MUNICIPIO, POP_COLETADA, POP_IMPUTADA, POP_TOTAL) values ('&quot;; [.A156]; &quot;', '&quot;; [.B156]; &quot;', '&quot;; [.C156]; &quot;', '&quot;; [.D156]; &quot;',&quot;; [.E156]; &quot;, &quot;; [.F156]; &quot;, &quot;; [.G156]; &quot;);&quot;)" office:value-type="string" office:string-value="insert into IBGE_MUNICIPIOS (UF, COD_UF, CODIGO_MUNICIPIO, NOME_MUNICIPIO, POP_COLETADA, POP_IMPUTADA, POP_TOTAL) values ('PR', '41', '10904', 'Itaguajé',4465, 16, 4481);" calcext:value-type="string">
            <text:p>insert into IBGE_MUNICIPIOS (UF, COD_UF, CODIGO_MUNICIPIO, NOME_MUNICIPIO, POP_COLETADA, POP_IMPUTADA, POP_TOTAL) values ('PR', '41', '10904', 'Itaguajé',4465, 16, 4481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10953" calcext:value-type="float">
            <text:p>10953</text:p>
          </table:table-cell>
          <table:table-cell office:value-type="string" calcext:value-type="string">
            <text:p>Itaipulândia</text:p>
          </table:table-cell>
          <table:table-cell office:value-type="float" office:value="11009" calcext:value-type="float">
            <text:p>11009</text:p>
          </table:table-cell>
          <table:table-cell office:value-type="float" office:value="476" calcext:value-type="float">
            <text:p>476</text:p>
          </table:table-cell>
          <table:table-cell office:value-type="float" office:value="11485" calcext:value-type="float">
            <text:p>11485</text:p>
          </table:table-cell>
          <table:table-cell table:formula="of:=CONCATENATE(&quot;insert into IBGE_MUNICIPIOS (UF, COD_UF, CODIGO_MUNICIPIO, NOME_MUNICIPIO, POP_COLETADA, POP_IMPUTADA, POP_TOTAL) values ('&quot;; [.A157]; &quot;', '&quot;; [.B157]; &quot;', '&quot;; [.C157]; &quot;', '&quot;; [.D157]; &quot;',&quot;; [.E157]; &quot;, &quot;; [.F157]; &quot;, &quot;; [.G157]; &quot;);&quot;)" office:value-type="string" office:string-value="insert into IBGE_MUNICIPIOS (UF, COD_UF, CODIGO_MUNICIPIO, NOME_MUNICIPIO, POP_COLETADA, POP_IMPUTADA, POP_TOTAL) values ('PR', '41', '10953', 'Itaipulândia',11009, 476, 11485);" calcext:value-type="string">
            <text:p>insert into IBGE_MUNICIPIOS (UF, COD_UF, CODIGO_MUNICIPIO, NOME_MUNICIPIO, POP_COLETADA, POP_IMPUTADA, POP_TOTAL) values ('PR', '41', '10953', 'Itaipulândia',11009, 476, 11485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11001" calcext:value-type="float">
            <text:p>11001</text:p>
          </table:table-cell>
          <table:table-cell office:value-type="string" calcext:value-type="string">
            <text:p>Itambaracá</text:p>
          </table:table-cell>
          <table:table-cell office:value-type="float" office:value="5815" calcext:value-type="float">
            <text:p>5815</text:p>
          </table:table-cell>
          <table:table-cell office:value-type="float" office:value="93" calcext:value-type="float">
            <text:p>93</text:p>
          </table:table-cell>
          <table:table-cell office:value-type="float" office:value="5908" calcext:value-type="float">
            <text:p>5908</text:p>
          </table:table-cell>
          <table:table-cell table:formula="of:=CONCATENATE(&quot;insert into IBGE_MUNICIPIOS (UF, COD_UF, CODIGO_MUNICIPIO, NOME_MUNICIPIO, POP_COLETADA, POP_IMPUTADA, POP_TOTAL) values ('&quot;; [.A158]; &quot;', '&quot;; [.B158]; &quot;', '&quot;; [.C158]; &quot;', '&quot;; [.D158]; &quot;',&quot;; [.E158]; &quot;, &quot;; [.F158]; &quot;, &quot;; [.G158]; &quot;);&quot;)" office:value-type="string" office:string-value="insert into IBGE_MUNICIPIOS (UF, COD_UF, CODIGO_MUNICIPIO, NOME_MUNICIPIO, POP_COLETADA, POP_IMPUTADA, POP_TOTAL) values ('PR', '41', '11001', 'Itambaracá',5815, 93, 5908);" calcext:value-type="string">
            <text:p>insert into IBGE_MUNICIPIOS (UF, COD_UF, CODIGO_MUNICIPIO, NOME_MUNICIPIO, POP_COLETADA, POP_IMPUTADA, POP_TOTAL) values ('PR', '41', '11001', 'Itambaracá',5815, 93, 5908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11100" calcext:value-type="float">
            <text:p>11100</text:p>
          </table:table-cell>
          <table:table-cell office:value-type="string" calcext:value-type="string">
            <text:p>Itambé</text:p>
          </table:table-cell>
          <table:table-cell office:value-type="float" office:value="5917" calcext:value-type="float">
            <text:p>5917</text:p>
          </table:table-cell>
          <table:table-cell office:value-type="float" office:value="194" calcext:value-type="float">
            <text:p>194</text:p>
          </table:table-cell>
          <table:table-cell office:value-type="float" office:value="6111" calcext:value-type="float">
            <text:p>6111</text:p>
          </table:table-cell>
          <table:table-cell table:formula="of:=CONCATENATE(&quot;insert into IBGE_MUNICIPIOS (UF, COD_UF, CODIGO_MUNICIPIO, NOME_MUNICIPIO, POP_COLETADA, POP_IMPUTADA, POP_TOTAL) values ('&quot;; [.A159]; &quot;', '&quot;; [.B159]; &quot;', '&quot;; [.C159]; &quot;', '&quot;; [.D159]; &quot;',&quot;; [.E159]; &quot;, &quot;; [.F159]; &quot;, &quot;; [.G159]; &quot;);&quot;)" office:value-type="string" office:string-value="insert into IBGE_MUNICIPIOS (UF, COD_UF, CODIGO_MUNICIPIO, NOME_MUNICIPIO, POP_COLETADA, POP_IMPUTADA, POP_TOTAL) values ('PR', '41', '11100', 'Itambé',5917, 194, 6111);" calcext:value-type="string">
            <text:p>insert into IBGE_MUNICIPIOS (UF, COD_UF, CODIGO_MUNICIPIO, NOME_MUNICIPIO, POP_COLETADA, POP_IMPUTADA, POP_TOTAL) values ('PR', '41', '11100', 'Itambé',5917, 194, 6111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11209" calcext:value-type="float">
            <text:p>11209</text:p>
          </table:table-cell>
          <table:table-cell office:value-type="string" calcext:value-type="string">
            <text:p>Itapejara do Oeste</text:p>
          </table:table-cell>
          <table:table-cell office:value-type="float" office:value="11799" calcext:value-type="float">
            <text:p>11799</text:p>
          </table:table-cell>
          <table:table-cell office:value-type="float" office:value="545" calcext:value-type="float">
            <text:p>545</text:p>
          </table:table-cell>
          <table:table-cell office:value-type="float" office:value="12344" calcext:value-type="float">
            <text:p>12344</text:p>
          </table:table-cell>
          <table:table-cell table:formula="of:=CONCATENATE(&quot;insert into IBGE_MUNICIPIOS (UF, COD_UF, CODIGO_MUNICIPIO, NOME_MUNICIPIO, POP_COLETADA, POP_IMPUTADA, POP_TOTAL) values ('&quot;; [.A160]; &quot;', '&quot;; [.B160]; &quot;', '&quot;; [.C160]; &quot;', '&quot;; [.D160]; &quot;',&quot;; [.E160]; &quot;, &quot;; [.F160]; &quot;, &quot;; [.G160]; &quot;);&quot;)" office:value-type="string" office:string-value="insert into IBGE_MUNICIPIOS (UF, COD_UF, CODIGO_MUNICIPIO, NOME_MUNICIPIO, POP_COLETADA, POP_IMPUTADA, POP_TOTAL) values ('PR', '41', '11209', 'Itapejara do Oeste',11799, 545, 12344);" calcext:value-type="string">
            <text:p>insert into IBGE_MUNICIPIOS (UF, COD_UF, CODIGO_MUNICIPIO, NOME_MUNICIPIO, POP_COLETADA, POP_IMPUTADA, POP_TOTAL) values ('PR', '41', '11209', 'Itapejara do Oeste',11799, 545, 12344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11258" calcext:value-type="float">
            <text:p>11258</text:p>
          </table:table-cell>
          <table:table-cell office:value-type="string" calcext:value-type="string">
            <text:p>Itaperuçu</text:p>
          </table:table-cell>
          <table:table-cell office:value-type="float" office:value="30794" calcext:value-type="float">
            <text:p>30794</text:p>
          </table:table-cell>
          <table:table-cell office:value-type="float" office:value="423" calcext:value-type="float">
            <text:p>423</text:p>
          </table:table-cell>
          <table:table-cell office:value-type="float" office:value="31217" calcext:value-type="float">
            <text:p>31217</text:p>
          </table:table-cell>
          <table:table-cell table:formula="of:=CONCATENATE(&quot;insert into IBGE_MUNICIPIOS (UF, COD_UF, CODIGO_MUNICIPIO, NOME_MUNICIPIO, POP_COLETADA, POP_IMPUTADA, POP_TOTAL) values ('&quot;; [.A161]; &quot;', '&quot;; [.B161]; &quot;', '&quot;; [.C161]; &quot;', '&quot;; [.D161]; &quot;',&quot;; [.E161]; &quot;, &quot;; [.F161]; &quot;, &quot;; [.G161]; &quot;);&quot;)" office:value-type="string" office:string-value="insert into IBGE_MUNICIPIOS (UF, COD_UF, CODIGO_MUNICIPIO, NOME_MUNICIPIO, POP_COLETADA, POP_IMPUTADA, POP_TOTAL) values ('PR', '41', '11258', 'Itaperuçu',30794, 423, 31217);" calcext:value-type="string">
            <text:p>insert into IBGE_MUNICIPIOS (UF, COD_UF, CODIGO_MUNICIPIO, NOME_MUNICIPIO, POP_COLETADA, POP_IMPUTADA, POP_TOTAL) values ('PR', '41', '11258', 'Itaperuçu',30794, 423, 31217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11308" calcext:value-type="float">
            <text:p>11308</text:p>
          </table:table-cell>
          <table:table-cell office:value-type="string" calcext:value-type="string">
            <text:p>Itaúna do Sul</text:p>
          </table:table-cell>
          <table:table-cell office:value-type="float" office:value="3545" calcext:value-type="float">
            <text:p>3545</text:p>
          </table:table-cell>
          <table:table-cell office:value-type="float" office:value="27" calcext:value-type="float">
            <text:p>27</text:p>
          </table:table-cell>
          <table:table-cell office:value-type="float" office:value="3572" calcext:value-type="float">
            <text:p>3572</text:p>
          </table:table-cell>
          <table:table-cell table:formula="of:=CONCATENATE(&quot;insert into IBGE_MUNICIPIOS (UF, COD_UF, CODIGO_MUNICIPIO, NOME_MUNICIPIO, POP_COLETADA, POP_IMPUTADA, POP_TOTAL) values ('&quot;; [.A162]; &quot;', '&quot;; [.B162]; &quot;', '&quot;; [.C162]; &quot;', '&quot;; [.D162]; &quot;',&quot;; [.E162]; &quot;, &quot;; [.F162]; &quot;, &quot;; [.G162]; &quot;);&quot;)" office:value-type="string" office:string-value="insert into IBGE_MUNICIPIOS (UF, COD_UF, CODIGO_MUNICIPIO, NOME_MUNICIPIO, POP_COLETADA, POP_IMPUTADA, POP_TOTAL) values ('PR', '41', '11308', 'Itaúna do Sul',3545, 27, 3572);" calcext:value-type="string">
            <text:p>insert into IBGE_MUNICIPIOS (UF, COD_UF, CODIGO_MUNICIPIO, NOME_MUNICIPIO, POP_COLETADA, POP_IMPUTADA, POP_TOTAL) values ('PR', '41', '11308', 'Itaúna do Sul',3545, 27, 3572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11407" calcext:value-type="float">
            <text:p>11407</text:p>
          </table:table-cell>
          <table:table-cell office:value-type="string" calcext:value-type="string">
            <text:p>Ivaí</text:p>
          </table:table-cell>
          <table:table-cell office:value-type="float" office:value="13151" calcext:value-type="float">
            <text:p>13151</text:p>
          </table:table-cell>
          <table:table-cell office:value-type="float" office:value="78" calcext:value-type="float">
            <text:p>78</text:p>
          </table:table-cell>
          <table:table-cell office:value-type="float" office:value="13229" calcext:value-type="float">
            <text:p>13229</text:p>
          </table:table-cell>
          <table:table-cell table:formula="of:=CONCATENATE(&quot;insert into IBGE_MUNICIPIOS (UF, COD_UF, CODIGO_MUNICIPIO, NOME_MUNICIPIO, POP_COLETADA, POP_IMPUTADA, POP_TOTAL) values ('&quot;; [.A163]; &quot;', '&quot;; [.B163]; &quot;', '&quot;; [.C163]; &quot;', '&quot;; [.D163]; &quot;',&quot;; [.E163]; &quot;, &quot;; [.F163]; &quot;, &quot;; [.G163]; &quot;);&quot;)" office:value-type="string" office:string-value="insert into IBGE_MUNICIPIOS (UF, COD_UF, CODIGO_MUNICIPIO, NOME_MUNICIPIO, POP_COLETADA, POP_IMPUTADA, POP_TOTAL) values ('PR', '41', '11407', 'Ivaí',13151, 78, 13229);" calcext:value-type="string">
            <text:p>insert into IBGE_MUNICIPIOS (UF, COD_UF, CODIGO_MUNICIPIO, NOME_MUNICIPIO, POP_COLETADA, POP_IMPUTADA, POP_TOTAL) values ('PR', '41', '11407', 'Ivaí',13151, 78, 13229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11506" calcext:value-type="float">
            <text:p>11506</text:p>
          </table:table-cell>
          <table:table-cell office:value-type="string" calcext:value-type="string">
            <text:p>Ivaiporã</text:p>
          </table:table-cell>
          <table:table-cell office:value-type="float" office:value="32396" calcext:value-type="float">
            <text:p>32396</text:p>
          </table:table-cell>
          <table:table-cell office:value-type="float" office:value="324" calcext:value-type="float">
            <text:p>324</text:p>
          </table:table-cell>
          <table:table-cell office:value-type="float" office:value="32720" calcext:value-type="float">
            <text:p>32720</text:p>
          </table:table-cell>
          <table:table-cell table:formula="of:=CONCATENATE(&quot;insert into IBGE_MUNICIPIOS (UF, COD_UF, CODIGO_MUNICIPIO, NOME_MUNICIPIO, POP_COLETADA, POP_IMPUTADA, POP_TOTAL) values ('&quot;; [.A164]; &quot;', '&quot;; [.B164]; &quot;', '&quot;; [.C164]; &quot;', '&quot;; [.D164]; &quot;',&quot;; [.E164]; &quot;, &quot;; [.F164]; &quot;, &quot;; [.G164]; &quot;);&quot;)" office:value-type="string" office:string-value="insert into IBGE_MUNICIPIOS (UF, COD_UF, CODIGO_MUNICIPIO, NOME_MUNICIPIO, POP_COLETADA, POP_IMPUTADA, POP_TOTAL) values ('PR', '41', '11506', 'Ivaiporã',32396, 324, 32720);" calcext:value-type="string">
            <text:p>insert into IBGE_MUNICIPIOS (UF, COD_UF, CODIGO_MUNICIPIO, NOME_MUNICIPIO, POP_COLETADA, POP_IMPUTADA, POP_TOTAL) values ('PR', '41', '11506', 'Ivaiporã',32396, 324, 32720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11555" calcext:value-type="float">
            <text:p>11555</text:p>
          </table:table-cell>
          <table:table-cell office:value-type="string" calcext:value-type="string">
            <text:p>Ivaté</text:p>
          </table:table-cell>
          <table:table-cell office:value-type="float" office:value="6735" calcext:value-type="float">
            <text:p>6735</text:p>
          </table:table-cell>
          <table:table-cell office:value-type="float" office:value="96" calcext:value-type="float">
            <text:p>96</text:p>
          </table:table-cell>
          <table:table-cell office:value-type="float" office:value="6831" calcext:value-type="float">
            <text:p>6831</text:p>
          </table:table-cell>
          <table:table-cell table:formula="of:=CONCATENATE(&quot;insert into IBGE_MUNICIPIOS (UF, COD_UF, CODIGO_MUNICIPIO, NOME_MUNICIPIO, POP_COLETADA, POP_IMPUTADA, POP_TOTAL) values ('&quot;; [.A165]; &quot;', '&quot;; [.B165]; &quot;', '&quot;; [.C165]; &quot;', '&quot;; [.D165]; &quot;',&quot;; [.E165]; &quot;, &quot;; [.F165]; &quot;, &quot;; [.G165]; &quot;);&quot;)" office:value-type="string" office:string-value="insert into IBGE_MUNICIPIOS (UF, COD_UF, CODIGO_MUNICIPIO, NOME_MUNICIPIO, POP_COLETADA, POP_IMPUTADA, POP_TOTAL) values ('PR', '41', '11555', 'Ivaté',6735, 96, 6831);" calcext:value-type="string">
            <text:p>insert into IBGE_MUNICIPIOS (UF, COD_UF, CODIGO_MUNICIPIO, NOME_MUNICIPIO, POP_COLETADA, POP_IMPUTADA, POP_TOTAL) values ('PR', '41', '11555', 'Ivaté',6735, 96, 6831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11605" calcext:value-type="float">
            <text:p>11605</text:p>
          </table:table-cell>
          <table:table-cell office:value-type="string" calcext:value-type="string">
            <text:p>Ivatuba</text:p>
          </table:table-cell>
          <table:table-cell office:value-type="float" office:value="2681" calcext:value-type="float">
            <text:p>2681</text:p>
          </table:table-cell>
          <table:table-cell office:value-type="float" office:value="27" calcext:value-type="float">
            <text:p>27</text:p>
          </table:table-cell>
          <table:table-cell office:value-type="float" office:value="2708" calcext:value-type="float">
            <text:p>2708</text:p>
          </table:table-cell>
          <table:table-cell table:formula="of:=CONCATENATE(&quot;insert into IBGE_MUNICIPIOS (UF, COD_UF, CODIGO_MUNICIPIO, NOME_MUNICIPIO, POP_COLETADA, POP_IMPUTADA, POP_TOTAL) values ('&quot;; [.A166]; &quot;', '&quot;; [.B166]; &quot;', '&quot;; [.C166]; &quot;', '&quot;; [.D166]; &quot;',&quot;; [.E166]; &quot;, &quot;; [.F166]; &quot;, &quot;; [.G166]; &quot;);&quot;)" office:value-type="string" office:string-value="insert into IBGE_MUNICIPIOS (UF, COD_UF, CODIGO_MUNICIPIO, NOME_MUNICIPIO, POP_COLETADA, POP_IMPUTADA, POP_TOTAL) values ('PR', '41', '11605', 'Ivatuba',2681, 27, 2708);" calcext:value-type="string">
            <text:p>insert into IBGE_MUNICIPIOS (UF, COD_UF, CODIGO_MUNICIPIO, NOME_MUNICIPIO, POP_COLETADA, POP_IMPUTADA, POP_TOTAL) values ('PR', '41', '11605', 'Ivatuba',2681, 27, 2708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11704" calcext:value-type="float">
            <text:p>11704</text:p>
          </table:table-cell>
          <table:table-cell office:value-type="string" calcext:value-type="string">
            <text:p>Jaboti</text:p>
          </table:table-cell>
          <table:table-cell office:value-type="float" office:value="5298" calcext:value-type="float">
            <text:p>5298</text:p>
          </table:table-cell>
          <table:table-cell office:value-type="float" office:value="129" calcext:value-type="float">
            <text:p>129</text:p>
          </table:table-cell>
          <table:table-cell office:value-type="float" office:value="5427" calcext:value-type="float">
            <text:p>5427</text:p>
          </table:table-cell>
          <table:table-cell table:formula="of:=CONCATENATE(&quot;insert into IBGE_MUNICIPIOS (UF, COD_UF, CODIGO_MUNICIPIO, NOME_MUNICIPIO, POP_COLETADA, POP_IMPUTADA, POP_TOTAL) values ('&quot;; [.A167]; &quot;', '&quot;; [.B167]; &quot;', '&quot;; [.C167]; &quot;', '&quot;; [.D167]; &quot;',&quot;; [.E167]; &quot;, &quot;; [.F167]; &quot;, &quot;; [.G167]; &quot;);&quot;)" office:value-type="string" office:string-value="insert into IBGE_MUNICIPIOS (UF, COD_UF, CODIGO_MUNICIPIO, NOME_MUNICIPIO, POP_COLETADA, POP_IMPUTADA, POP_TOTAL) values ('PR', '41', '11704', 'Jaboti',5298, 129, 5427);" calcext:value-type="string">
            <text:p>insert into IBGE_MUNICIPIOS (UF, COD_UF, CODIGO_MUNICIPIO, NOME_MUNICIPIO, POP_COLETADA, POP_IMPUTADA, POP_TOTAL) values ('PR', '41', '11704', 'Jaboti',5298, 129, 5427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11803" calcext:value-type="float">
            <text:p>11803</text:p>
          </table:table-cell>
          <table:table-cell office:value-type="string" calcext:value-type="string">
            <text:p>Jacarezinho</text:p>
          </table:table-cell>
          <table:table-cell office:value-type="float" office:value="40093" calcext:value-type="float">
            <text:p>40093</text:p>
          </table:table-cell>
          <table:table-cell office:value-type="float" office:value="282" calcext:value-type="float">
            <text:p>282</text:p>
          </table:table-cell>
          <table:table-cell office:value-type="float" office:value="40375" calcext:value-type="float">
            <text:p>40375</text:p>
          </table:table-cell>
          <table:table-cell table:formula="of:=CONCATENATE(&quot;insert into IBGE_MUNICIPIOS (UF, COD_UF, CODIGO_MUNICIPIO, NOME_MUNICIPIO, POP_COLETADA, POP_IMPUTADA, POP_TOTAL) values ('&quot;; [.A168]; &quot;', '&quot;; [.B168]; &quot;', '&quot;; [.C168]; &quot;', '&quot;; [.D168]; &quot;',&quot;; [.E168]; &quot;, &quot;; [.F168]; &quot;, &quot;; [.G168]; &quot;);&quot;)" office:value-type="string" office:string-value="insert into IBGE_MUNICIPIOS (UF, COD_UF, CODIGO_MUNICIPIO, NOME_MUNICIPIO, POP_COLETADA, POP_IMPUTADA, POP_TOTAL) values ('PR', '41', '11803', 'Jacarezinho',40093, 282, 40375);" calcext:value-type="string">
            <text:p>insert into IBGE_MUNICIPIOS (UF, COD_UF, CODIGO_MUNICIPIO, NOME_MUNICIPIO, POP_COLETADA, POP_IMPUTADA, POP_TOTAL) values ('PR', '41', '11803', 'Jacarezinho',40093, 282, 40375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11902" calcext:value-type="float">
            <text:p>11902</text:p>
          </table:table-cell>
          <table:table-cell office:value-type="string" calcext:value-type="string">
            <text:p>Jaguapitã</text:p>
          </table:table-cell>
          <table:table-cell office:value-type="float" office:value="14975" calcext:value-type="float">
            <text:p>14975</text:p>
          </table:table-cell>
          <table:table-cell office:value-type="float" office:value="147" calcext:value-type="float">
            <text:p>147</text:p>
          </table:table-cell>
          <table:table-cell office:value-type="float" office:value="15122" calcext:value-type="float">
            <text:p>15122</text:p>
          </table:table-cell>
          <table:table-cell table:formula="of:=CONCATENATE(&quot;insert into IBGE_MUNICIPIOS (UF, COD_UF, CODIGO_MUNICIPIO, NOME_MUNICIPIO, POP_COLETADA, POP_IMPUTADA, POP_TOTAL) values ('&quot;; [.A169]; &quot;', '&quot;; [.B169]; &quot;', '&quot;; [.C169]; &quot;', '&quot;; [.D169]; &quot;',&quot;; [.E169]; &quot;, &quot;; [.F169]; &quot;, &quot;; [.G169]; &quot;);&quot;)" office:value-type="string" office:string-value="insert into IBGE_MUNICIPIOS (UF, COD_UF, CODIGO_MUNICIPIO, NOME_MUNICIPIO, POP_COLETADA, POP_IMPUTADA, POP_TOTAL) values ('PR', '41', '11902', 'Jaguapitã',14975, 147, 15122);" calcext:value-type="string">
            <text:p>insert into IBGE_MUNICIPIOS (UF, COD_UF, CODIGO_MUNICIPIO, NOME_MUNICIPIO, POP_COLETADA, POP_IMPUTADA, POP_TOTAL) values ('PR', '41', '11902', 'Jaguapitã',14975, 147, 15122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12009" calcext:value-type="float">
            <text:p>12009</text:p>
          </table:table-cell>
          <table:table-cell office:value-type="string" calcext:value-type="string">
            <text:p>Jaguariaíva</text:p>
          </table:table-cell>
          <table:table-cell office:value-type="float" office:value="34998" calcext:value-type="float">
            <text:p>34998</text:p>
          </table:table-cell>
          <table:table-cell office:value-type="float" office:value="143" calcext:value-type="float">
            <text:p>143</text:p>
          </table:table-cell>
          <table:table-cell office:value-type="float" office:value="35141" calcext:value-type="float">
            <text:p>35141</text:p>
          </table:table-cell>
          <table:table-cell table:formula="of:=CONCATENATE(&quot;insert into IBGE_MUNICIPIOS (UF, COD_UF, CODIGO_MUNICIPIO, NOME_MUNICIPIO, POP_COLETADA, POP_IMPUTADA, POP_TOTAL) values ('&quot;; [.A170]; &quot;', '&quot;; [.B170]; &quot;', '&quot;; [.C170]; &quot;', '&quot;; [.D170]; &quot;',&quot;; [.E170]; &quot;, &quot;; [.F170]; &quot;, &quot;; [.G170]; &quot;);&quot;)" office:value-type="string" office:string-value="insert into IBGE_MUNICIPIOS (UF, COD_UF, CODIGO_MUNICIPIO, NOME_MUNICIPIO, POP_COLETADA, POP_IMPUTADA, POP_TOTAL) values ('PR', '41', '12009', 'Jaguariaíva',34998, 143, 35141);" calcext:value-type="string">
            <text:p>insert into IBGE_MUNICIPIOS (UF, COD_UF, CODIGO_MUNICIPIO, NOME_MUNICIPIO, POP_COLETADA, POP_IMPUTADA, POP_TOTAL) values ('PR', '41', '12009', 'Jaguariaíva',34998, 143, 35141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12108" calcext:value-type="float">
            <text:p>12108</text:p>
          </table:table-cell>
          <table:table-cell office:value-type="string" calcext:value-type="string">
            <text:p>Jandaia do Sul</text:p>
          </table:table-cell>
          <table:table-cell office:value-type="float" office:value="21403" calcext:value-type="float">
            <text:p>21403</text:p>
          </table:table-cell>
          <table:table-cell office:value-type="float" office:value="5" calcext:value-type="float">
            <text:p>5</text:p>
          </table:table-cell>
          <table:table-cell office:value-type="float" office:value="21408" calcext:value-type="float">
            <text:p>21408</text:p>
          </table:table-cell>
          <table:table-cell table:formula="of:=CONCATENATE(&quot;insert into IBGE_MUNICIPIOS (UF, COD_UF, CODIGO_MUNICIPIO, NOME_MUNICIPIO, POP_COLETADA, POP_IMPUTADA, POP_TOTAL) values ('&quot;; [.A171]; &quot;', '&quot;; [.B171]; &quot;', '&quot;; [.C171]; &quot;', '&quot;; [.D171]; &quot;',&quot;; [.E171]; &quot;, &quot;; [.F171]; &quot;, &quot;; [.G171]; &quot;);&quot;)" office:value-type="string" office:string-value="insert into IBGE_MUNICIPIOS (UF, COD_UF, CODIGO_MUNICIPIO, NOME_MUNICIPIO, POP_COLETADA, POP_IMPUTADA, POP_TOTAL) values ('PR', '41', '12108', 'Jandaia do Sul',21403, 5, 21408);" calcext:value-type="string">
            <text:p>insert into IBGE_MUNICIPIOS (UF, COD_UF, CODIGO_MUNICIPIO, NOME_MUNICIPIO, POP_COLETADA, POP_IMPUTADA, POP_TOTAL) values ('PR', '41', '12108', 'Jandaia do Sul',21403, 5, 21408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12207" calcext:value-type="float">
            <text:p>12207</text:p>
          </table:table-cell>
          <table:table-cell office:value-type="string" calcext:value-type="string">
            <text:p>Janiópolis</text:p>
          </table:table-cell>
          <table:table-cell office:value-type="float" office:value="5808" calcext:value-type="float">
            <text:p>5808</text:p>
          </table:table-cell>
          <table:table-cell office:value-type="float" office:value="62" calcext:value-type="float">
            <text:p>62</text:p>
          </table:table-cell>
          <table:table-cell office:value-type="float" office:value="5870" calcext:value-type="float">
            <text:p>5870</text:p>
          </table:table-cell>
          <table:table-cell table:formula="of:=CONCATENATE(&quot;insert into IBGE_MUNICIPIOS (UF, COD_UF, CODIGO_MUNICIPIO, NOME_MUNICIPIO, POP_COLETADA, POP_IMPUTADA, POP_TOTAL) values ('&quot;; [.A172]; &quot;', '&quot;; [.B172]; &quot;', '&quot;; [.C172]; &quot;', '&quot;; [.D172]; &quot;',&quot;; [.E172]; &quot;, &quot;; [.F172]; &quot;, &quot;; [.G172]; &quot;);&quot;)" office:value-type="string" office:string-value="insert into IBGE_MUNICIPIOS (UF, COD_UF, CODIGO_MUNICIPIO, NOME_MUNICIPIO, POP_COLETADA, POP_IMPUTADA, POP_TOTAL) values ('PR', '41', '12207', 'Janiópolis',5808, 62, 5870);" calcext:value-type="string">
            <text:p>insert into IBGE_MUNICIPIOS (UF, COD_UF, CODIGO_MUNICIPIO, NOME_MUNICIPIO, POP_COLETADA, POP_IMPUTADA, POP_TOTAL) values ('PR', '41', '12207', 'Janiópolis',5808, 62, 5870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12306" calcext:value-type="float">
            <text:p>12306</text:p>
          </table:table-cell>
          <table:table-cell office:value-type="string" calcext:value-type="string">
            <text:p>Japira</text:p>
          </table:table-cell>
          <table:table-cell office:value-type="float" office:value="4876" calcext:value-type="float">
            <text:p>4876</text:p>
          </table:table-cell>
          <table:table-cell office:value-type="float" office:value="96" calcext:value-type="float">
            <text:p>96</text:p>
          </table:table-cell>
          <table:table-cell office:value-type="float" office:value="4972" calcext:value-type="float">
            <text:p>4972</text:p>
          </table:table-cell>
          <table:table-cell table:formula="of:=CONCATENATE(&quot;insert into IBGE_MUNICIPIOS (UF, COD_UF, CODIGO_MUNICIPIO, NOME_MUNICIPIO, POP_COLETADA, POP_IMPUTADA, POP_TOTAL) values ('&quot;; [.A173]; &quot;', '&quot;; [.B173]; &quot;', '&quot;; [.C173]; &quot;', '&quot;; [.D173]; &quot;',&quot;; [.E173]; &quot;, &quot;; [.F173]; &quot;, &quot;; [.G173]; &quot;);&quot;)" office:value-type="string" office:string-value="insert into IBGE_MUNICIPIOS (UF, COD_UF, CODIGO_MUNICIPIO, NOME_MUNICIPIO, POP_COLETADA, POP_IMPUTADA, POP_TOTAL) values ('PR', '41', '12306', 'Japira',4876, 96, 4972);" calcext:value-type="string">
            <text:p>insert into IBGE_MUNICIPIOS (UF, COD_UF, CODIGO_MUNICIPIO, NOME_MUNICIPIO, POP_COLETADA, POP_IMPUTADA, POP_TOTAL) values ('PR', '41', '12306', 'Japira',4876, 96, 4972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12405" calcext:value-type="float">
            <text:p>12405</text:p>
          </table:table-cell>
          <table:table-cell office:value-type="string" calcext:value-type="string">
            <text:p>Japurá</text:p>
          </table:table-cell>
          <table:table-cell office:value-type="float" office:value="9000" calcext:value-type="float">
            <text:p>9000</text:p>
          </table:table-cell>
          <table:table-cell office:value-type="float" office:value="144" calcext:value-type="float">
            <text:p>144</text:p>
          </table:table-cell>
          <table:table-cell office:value-type="float" office:value="9144" calcext:value-type="float">
            <text:p>9144</text:p>
          </table:table-cell>
          <table:table-cell table:formula="of:=CONCATENATE(&quot;insert into IBGE_MUNICIPIOS (UF, COD_UF, CODIGO_MUNICIPIO, NOME_MUNICIPIO, POP_COLETADA, POP_IMPUTADA, POP_TOTAL) values ('&quot;; [.A174]; &quot;', '&quot;; [.B174]; &quot;', '&quot;; [.C174]; &quot;', '&quot;; [.D174]; &quot;',&quot;; [.E174]; &quot;, &quot;; [.F174]; &quot;, &quot;; [.G174]; &quot;);&quot;)" office:value-type="string" office:string-value="insert into IBGE_MUNICIPIOS (UF, COD_UF, CODIGO_MUNICIPIO, NOME_MUNICIPIO, POP_COLETADA, POP_IMPUTADA, POP_TOTAL) values ('PR', '41', '12405', 'Japurá',9000, 144, 9144);" calcext:value-type="string">
            <text:p>insert into IBGE_MUNICIPIOS (UF, COD_UF, CODIGO_MUNICIPIO, NOME_MUNICIPIO, POP_COLETADA, POP_IMPUTADA, POP_TOTAL) values ('PR', '41', '12405', 'Japurá',9000, 144, 9144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12504" calcext:value-type="float">
            <text:p>12504</text:p>
          </table:table-cell>
          <table:table-cell office:value-type="string" calcext:value-type="string">
            <text:p>Jardim Alegre</text:p>
          </table:table-cell>
          <table:table-cell office:value-type="float" office:value="11952" calcext:value-type="float">
            <text:p>11952</text:p>
          </table:table-cell>
          <table:table-cell office:value-type="float" office:value="52" calcext:value-type="float">
            <text:p>52</text:p>
          </table:table-cell>
          <table:table-cell office:value-type="float" office:value="12004" calcext:value-type="float">
            <text:p>12004</text:p>
          </table:table-cell>
          <table:table-cell table:formula="of:=CONCATENATE(&quot;insert into IBGE_MUNICIPIOS (UF, COD_UF, CODIGO_MUNICIPIO, NOME_MUNICIPIO, POP_COLETADA, POP_IMPUTADA, POP_TOTAL) values ('&quot;; [.A175]; &quot;', '&quot;; [.B175]; &quot;', '&quot;; [.C175]; &quot;', '&quot;; [.D175]; &quot;',&quot;; [.E175]; &quot;, &quot;; [.F175]; &quot;, &quot;; [.G175]; &quot;);&quot;)" office:value-type="string" office:string-value="insert into IBGE_MUNICIPIOS (UF, COD_UF, CODIGO_MUNICIPIO, NOME_MUNICIPIO, POP_COLETADA, POP_IMPUTADA, POP_TOTAL) values ('PR', '41', '12504', 'Jardim Alegre',11952, 52, 12004);" calcext:value-type="string">
            <text:p>insert into IBGE_MUNICIPIOS (UF, COD_UF, CODIGO_MUNICIPIO, NOME_MUNICIPIO, POP_COLETADA, POP_IMPUTADA, POP_TOTAL) values ('PR', '41', '12504', 'Jardim Alegre',11952, 52, 12004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12603" calcext:value-type="float">
            <text:p>12603</text:p>
          </table:table-cell>
          <table:table-cell office:value-type="string" calcext:value-type="string">
            <text:p>Jardim Olinda</text:p>
          </table:table-cell>
          <table:table-cell office:value-type="float" office:value="1328" calcext:value-type="float">
            <text:p>1328</text:p>
          </table:table-cell>
          <table:table-cell office:value-type="float" office:value="15" calcext:value-type="float">
            <text:p>15</text:p>
          </table:table-cell>
          <table:table-cell office:value-type="float" office:value="1343" calcext:value-type="float">
            <text:p>1343</text:p>
          </table:table-cell>
          <table:table-cell table:formula="of:=CONCATENATE(&quot;insert into IBGE_MUNICIPIOS (UF, COD_UF, CODIGO_MUNICIPIO, NOME_MUNICIPIO, POP_COLETADA, POP_IMPUTADA, POP_TOTAL) values ('&quot;; [.A176]; &quot;', '&quot;; [.B176]; &quot;', '&quot;; [.C176]; &quot;', '&quot;; [.D176]; &quot;',&quot;; [.E176]; &quot;, &quot;; [.F176]; &quot;, &quot;; [.G176]; &quot;);&quot;)" office:value-type="string" office:string-value="insert into IBGE_MUNICIPIOS (UF, COD_UF, CODIGO_MUNICIPIO, NOME_MUNICIPIO, POP_COLETADA, POP_IMPUTADA, POP_TOTAL) values ('PR', '41', '12603', 'Jardim Olinda',1328, 15, 1343);" calcext:value-type="string">
            <text:p>insert into IBGE_MUNICIPIOS (UF, COD_UF, CODIGO_MUNICIPIO, NOME_MUNICIPIO, POP_COLETADA, POP_IMPUTADA, POP_TOTAL) values ('PR', '41', '12603', 'Jardim Olinda',1328, 15, 1343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12702" calcext:value-type="float">
            <text:p>12702</text:p>
          </table:table-cell>
          <table:table-cell office:value-type="string" calcext:value-type="string">
            <text:p>Jataizinho</text:p>
          </table:table-cell>
          <table:table-cell office:value-type="float" office:value="11316" calcext:value-type="float">
            <text:p>11316</text:p>
          </table:table-cell>
          <table:table-cell office:value-type="float" office:value="497" calcext:value-type="float">
            <text:p>497</text:p>
          </table:table-cell>
          <table:table-cell office:value-type="float" office:value="11813" calcext:value-type="float">
            <text:p>11813</text:p>
          </table:table-cell>
          <table:table-cell table:formula="of:=CONCATENATE(&quot;insert into IBGE_MUNICIPIOS (UF, COD_UF, CODIGO_MUNICIPIO, NOME_MUNICIPIO, POP_COLETADA, POP_IMPUTADA, POP_TOTAL) values ('&quot;; [.A177]; &quot;', '&quot;; [.B177]; &quot;', '&quot;; [.C177]; &quot;', '&quot;; [.D177]; &quot;',&quot;; [.E177]; &quot;, &quot;; [.F177]; &quot;, &quot;; [.G177]; &quot;);&quot;)" office:value-type="string" office:string-value="insert into IBGE_MUNICIPIOS (UF, COD_UF, CODIGO_MUNICIPIO, NOME_MUNICIPIO, POP_COLETADA, POP_IMPUTADA, POP_TOTAL) values ('PR', '41', '12702', 'Jataizinho',11316, 497, 11813);" calcext:value-type="string">
            <text:p>insert into IBGE_MUNICIPIOS (UF, COD_UF, CODIGO_MUNICIPIO, NOME_MUNICIPIO, POP_COLETADA, POP_IMPUTADA, POP_TOTAL) values ('PR', '41', '12702', 'Jataizinho',11316, 497, 11813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12751" calcext:value-type="float">
            <text:p>12751</text:p>
          </table:table-cell>
          <table:table-cell office:value-type="string" calcext:value-type="string">
            <text:p>Jesuítas</text:p>
          </table:table-cell>
          <table:table-cell office:value-type="float" office:value="10479" calcext:value-type="float">
            <text:p>10479</text:p>
          </table:table-cell>
          <table:table-cell office:value-type="float" office:value="27" calcext:value-type="float">
            <text:p>27</text:p>
          </table:table-cell>
          <table:table-cell office:value-type="float" office:value="10506" calcext:value-type="float">
            <text:p>10506</text:p>
          </table:table-cell>
          <table:table-cell table:formula="of:=CONCATENATE(&quot;insert into IBGE_MUNICIPIOS (UF, COD_UF, CODIGO_MUNICIPIO, NOME_MUNICIPIO, POP_COLETADA, POP_IMPUTADA, POP_TOTAL) values ('&quot;; [.A178]; &quot;', '&quot;; [.B178]; &quot;', '&quot;; [.C178]; &quot;', '&quot;; [.D178]; &quot;',&quot;; [.E178]; &quot;, &quot;; [.F178]; &quot;, &quot;; [.G178]; &quot;);&quot;)" office:value-type="string" office:string-value="insert into IBGE_MUNICIPIOS (UF, COD_UF, CODIGO_MUNICIPIO, NOME_MUNICIPIO, POP_COLETADA, POP_IMPUTADA, POP_TOTAL) values ('PR', '41', '12751', 'Jesuítas',10479, 27, 10506);" calcext:value-type="string">
            <text:p>insert into IBGE_MUNICIPIOS (UF, COD_UF, CODIGO_MUNICIPIO, NOME_MUNICIPIO, POP_COLETADA, POP_IMPUTADA, POP_TOTAL) values ('PR', '41', '12751', 'Jesuítas',10479, 27, 10506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12801" calcext:value-type="float">
            <text:p>12801</text:p>
          </table:table-cell>
          <table:table-cell office:value-type="string" calcext:value-type="string">
            <text:p>Joaquim Távora</text:p>
          </table:table-cell>
          <table:table-cell office:value-type="float" office:value="11566" calcext:value-type="float">
            <text:p>11566</text:p>
          </table:table-cell>
          <table:table-cell office:value-type="float" office:value="379" calcext:value-type="float">
            <text:p>379</text:p>
          </table:table-cell>
          <table:table-cell office:value-type="float" office:value="11945" calcext:value-type="float">
            <text:p>11945</text:p>
          </table:table-cell>
          <table:table-cell table:formula="of:=CONCATENATE(&quot;insert into IBGE_MUNICIPIOS (UF, COD_UF, CODIGO_MUNICIPIO, NOME_MUNICIPIO, POP_COLETADA, POP_IMPUTADA, POP_TOTAL) values ('&quot;; [.A179]; &quot;', '&quot;; [.B179]; &quot;', '&quot;; [.C179]; &quot;', '&quot;; [.D179]; &quot;',&quot;; [.E179]; &quot;, &quot;; [.F179]; &quot;, &quot;; [.G179]; &quot;);&quot;)" office:value-type="string" office:string-value="insert into IBGE_MUNICIPIOS (UF, COD_UF, CODIGO_MUNICIPIO, NOME_MUNICIPIO, POP_COLETADA, POP_IMPUTADA, POP_TOTAL) values ('PR', '41', '12801', 'Joaquim Távora',11566, 379, 11945);" calcext:value-type="string">
            <text:p>insert into IBGE_MUNICIPIOS (UF, COD_UF, CODIGO_MUNICIPIO, NOME_MUNICIPIO, POP_COLETADA, POP_IMPUTADA, POP_TOTAL) values ('PR', '41', '12801', 'Joaquim Távora',11566, 379, 11945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12900" calcext:value-type="float">
            <text:p>12900</text:p>
          </table:table-cell>
          <table:table-cell office:value-type="string" calcext:value-type="string">
            <text:p>Jundiaí do Sul</text:p>
          </table:table-cell>
          <table:table-cell office:value-type="float" office:value="3250" calcext:value-type="float">
            <text:p>3250</text:p>
          </table:table-cell>
          <table:table-cell office:value-type="float" office:value="83" calcext:value-type="float">
            <text:p>83</text:p>
          </table:table-cell>
          <table:table-cell office:value-type="float" office:value="3333" calcext:value-type="float">
            <text:p>3333</text:p>
          </table:table-cell>
          <table:table-cell table:formula="of:=CONCATENATE(&quot;insert into IBGE_MUNICIPIOS (UF, COD_UF, CODIGO_MUNICIPIO, NOME_MUNICIPIO, POP_COLETADA, POP_IMPUTADA, POP_TOTAL) values ('&quot;; [.A180]; &quot;', '&quot;; [.B180]; &quot;', '&quot;; [.C180]; &quot;', '&quot;; [.D180]; &quot;',&quot;; [.E180]; &quot;, &quot;; [.F180]; &quot;, &quot;; [.G180]; &quot;);&quot;)" office:value-type="string" office:string-value="insert into IBGE_MUNICIPIOS (UF, COD_UF, CODIGO_MUNICIPIO, NOME_MUNICIPIO, POP_COLETADA, POP_IMPUTADA, POP_TOTAL) values ('PR', '41', '12900', 'Jundiaí do Sul',3250, 83, 3333);" calcext:value-type="string">
            <text:p>insert into IBGE_MUNICIPIOS (UF, COD_UF, CODIGO_MUNICIPIO, NOME_MUNICIPIO, POP_COLETADA, POP_IMPUTADA, POP_TOTAL) values ('PR', '41', '12900', 'Jundiaí do Sul',3250, 83, 3333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12959" calcext:value-type="float">
            <text:p>12959</text:p>
          </table:table-cell>
          <table:table-cell office:value-type="string" calcext:value-type="string">
            <text:p>Juranda</text:p>
          </table:table-cell>
          <table:table-cell office:value-type="float" office:value="7708" calcext:value-type="float">
            <text:p>7708</text:p>
          </table:table-cell>
          <table:table-cell office:value-type="float" office:value="63" calcext:value-type="float">
            <text:p>63</text:p>
          </table:table-cell>
          <table:table-cell office:value-type="float" office:value="7771" calcext:value-type="float">
            <text:p>7771</text:p>
          </table:table-cell>
          <table:table-cell table:formula="of:=CONCATENATE(&quot;insert into IBGE_MUNICIPIOS (UF, COD_UF, CODIGO_MUNICIPIO, NOME_MUNICIPIO, POP_COLETADA, POP_IMPUTADA, POP_TOTAL) values ('&quot;; [.A181]; &quot;', '&quot;; [.B181]; &quot;', '&quot;; [.C181]; &quot;', '&quot;; [.D181]; &quot;',&quot;; [.E181]; &quot;, &quot;; [.F181]; &quot;, &quot;; [.G181]; &quot;);&quot;)" office:value-type="string" office:string-value="insert into IBGE_MUNICIPIOS (UF, COD_UF, CODIGO_MUNICIPIO, NOME_MUNICIPIO, POP_COLETADA, POP_IMPUTADA, POP_TOTAL) values ('PR', '41', '12959', 'Juranda',7708, 63, 7771);" calcext:value-type="string">
            <text:p>insert into IBGE_MUNICIPIOS (UF, COD_UF, CODIGO_MUNICIPIO, NOME_MUNICIPIO, POP_COLETADA, POP_IMPUTADA, POP_TOTAL) values ('PR', '41', '12959', 'Juranda',7708, 63, 7771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13007" calcext:value-type="float">
            <text:p>13007</text:p>
          </table:table-cell>
          <table:table-cell office:value-type="string" calcext:value-type="string">
            <text:p>Jussara</text:p>
          </table:table-cell>
          <table:table-cell office:value-type="float" office:value="6575" calcext:value-type="float">
            <text:p>6575</text:p>
          </table:table-cell>
          <table:table-cell office:value-type="float" office:value="115" calcext:value-type="float">
            <text:p>115</text:p>
          </table:table-cell>
          <table:table-cell office:value-type="float" office:value="6690" calcext:value-type="float">
            <text:p>6690</text:p>
          </table:table-cell>
          <table:table-cell table:formula="of:=CONCATENATE(&quot;insert into IBGE_MUNICIPIOS (UF, COD_UF, CODIGO_MUNICIPIO, NOME_MUNICIPIO, POP_COLETADA, POP_IMPUTADA, POP_TOTAL) values ('&quot;; [.A182]; &quot;', '&quot;; [.B182]; &quot;', '&quot;; [.C182]; &quot;', '&quot;; [.D182]; &quot;',&quot;; [.E182]; &quot;, &quot;; [.F182]; &quot;, &quot;; [.G182]; &quot;);&quot;)" office:value-type="string" office:string-value="insert into IBGE_MUNICIPIOS (UF, COD_UF, CODIGO_MUNICIPIO, NOME_MUNICIPIO, POP_COLETADA, POP_IMPUTADA, POP_TOTAL) values ('PR', '41', '13007', 'Jussara',6575, 115, 6690);" calcext:value-type="string">
            <text:p>insert into IBGE_MUNICIPIOS (UF, COD_UF, CODIGO_MUNICIPIO, NOME_MUNICIPIO, POP_COLETADA, POP_IMPUTADA, POP_TOTAL) values ('PR', '41', '13007', 'Jussara',6575, 115, 6690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13106" calcext:value-type="float">
            <text:p>13106</text:p>
          </table:table-cell>
          <table:table-cell office:value-type="string" calcext:value-type="string">
            <text:p>Kaloré</text:p>
          </table:table-cell>
          <table:table-cell office:value-type="float" office:value="4579" calcext:value-type="float">
            <text:p>4579</text:p>
          </table:table-cell>
          <table:table-cell office:value-type="float" office:value="3" calcext:value-type="float">
            <text:p>3</text:p>
          </table:table-cell>
          <table:table-cell office:value-type="float" office:value="4582" calcext:value-type="float">
            <text:p>4582</text:p>
          </table:table-cell>
          <table:table-cell table:formula="of:=CONCATENATE(&quot;insert into IBGE_MUNICIPIOS (UF, COD_UF, CODIGO_MUNICIPIO, NOME_MUNICIPIO, POP_COLETADA, POP_IMPUTADA, POP_TOTAL) values ('&quot;; [.A183]; &quot;', '&quot;; [.B183]; &quot;', '&quot;; [.C183]; &quot;', '&quot;; [.D183]; &quot;',&quot;; [.E183]; &quot;, &quot;; [.F183]; &quot;, &quot;; [.G183]; &quot;);&quot;)" office:value-type="string" office:string-value="insert into IBGE_MUNICIPIOS (UF, COD_UF, CODIGO_MUNICIPIO, NOME_MUNICIPIO, POP_COLETADA, POP_IMPUTADA, POP_TOTAL) values ('PR', '41', '13106', 'Kaloré',4579, 3, 4582);" calcext:value-type="string">
            <text:p>insert into IBGE_MUNICIPIOS (UF, COD_UF, CODIGO_MUNICIPIO, NOME_MUNICIPIO, POP_COLETADA, POP_IMPUTADA, POP_TOTAL) values ('PR', '41', '13106', 'Kaloré',4579, 3, 4582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13205" calcext:value-type="float">
            <text:p>13205</text:p>
          </table:table-cell>
          <table:table-cell office:value-type="string" calcext:value-type="string">
            <text:p>Lapa</text:p>
          </table:table-cell>
          <table:table-cell office:value-type="float" office:value="44265" calcext:value-type="float">
            <text:p>44265</text:p>
          </table:table-cell>
          <table:table-cell office:value-type="float" office:value="738" calcext:value-type="float">
            <text:p>738</text:p>
          </table:table-cell>
          <table:table-cell office:value-type="float" office:value="45003" calcext:value-type="float">
            <text:p>45003</text:p>
          </table:table-cell>
          <table:table-cell table:formula="of:=CONCATENATE(&quot;insert into IBGE_MUNICIPIOS (UF, COD_UF, CODIGO_MUNICIPIO, NOME_MUNICIPIO, POP_COLETADA, POP_IMPUTADA, POP_TOTAL) values ('&quot;; [.A184]; &quot;', '&quot;; [.B184]; &quot;', '&quot;; [.C184]; &quot;', '&quot;; [.D184]; &quot;',&quot;; [.E184]; &quot;, &quot;; [.F184]; &quot;, &quot;; [.G184]; &quot;);&quot;)" office:value-type="string" office:string-value="insert into IBGE_MUNICIPIOS (UF, COD_UF, CODIGO_MUNICIPIO, NOME_MUNICIPIO, POP_COLETADA, POP_IMPUTADA, POP_TOTAL) values ('PR', '41', '13205', 'Lapa',44265, 738, 45003);" calcext:value-type="string">
            <text:p>insert into IBGE_MUNICIPIOS (UF, COD_UF, CODIGO_MUNICIPIO, NOME_MUNICIPIO, POP_COLETADA, POP_IMPUTADA, POP_TOTAL) values ('PR', '41', '13205', 'Lapa',44265, 738, 45003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13254" calcext:value-type="float">
            <text:p>13254</text:p>
          </table:table-cell>
          <table:table-cell office:value-type="string" calcext:value-type="string">
            <text:p>Laranjal</text:p>
          </table:table-cell>
          <table:table-cell office:value-type="float" office:value="5416" calcext:value-type="float">
            <text:p>5416</text:p>
          </table:table-cell>
          <table:table-cell office:value-type="float" office:value="184" calcext:value-type="float">
            <text:p>184</text:p>
          </table:table-cell>
          <table:table-cell office:value-type="float" office:value="5600" calcext:value-type="float">
            <text:p>5600</text:p>
          </table:table-cell>
          <table:table-cell table:formula="of:=CONCATENATE(&quot;insert into IBGE_MUNICIPIOS (UF, COD_UF, CODIGO_MUNICIPIO, NOME_MUNICIPIO, POP_COLETADA, POP_IMPUTADA, POP_TOTAL) values ('&quot;; [.A185]; &quot;', '&quot;; [.B185]; &quot;', '&quot;; [.C185]; &quot;', '&quot;; [.D185]; &quot;',&quot;; [.E185]; &quot;, &quot;; [.F185]; &quot;, &quot;; [.G185]; &quot;);&quot;)" office:value-type="string" office:string-value="insert into IBGE_MUNICIPIOS (UF, COD_UF, CODIGO_MUNICIPIO, NOME_MUNICIPIO, POP_COLETADA, POP_IMPUTADA, POP_TOTAL) values ('PR', '41', '13254', 'Laranjal',5416, 184, 5600);" calcext:value-type="string">
            <text:p>insert into IBGE_MUNICIPIOS (UF, COD_UF, CODIGO_MUNICIPIO, NOME_MUNICIPIO, POP_COLETADA, POP_IMPUTADA, POP_TOTAL) values ('PR', '41', '13254', 'Laranjal',5416, 184, 5600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13304" calcext:value-type="float">
            <text:p>13304</text:p>
          </table:table-cell>
          <table:table-cell office:value-type="string" calcext:value-type="string">
            <text:p>Laranjeiras do Sul</text:p>
          </table:table-cell>
          <table:table-cell office:value-type="float" office:value="31796" calcext:value-type="float">
            <text:p>31796</text:p>
          </table:table-cell>
          <table:table-cell office:value-type="float" office:value="431" calcext:value-type="float">
            <text:p>431</text:p>
          </table:table-cell>
          <table:table-cell office:value-type="float" office:value="32227" calcext:value-type="float">
            <text:p>32227</text:p>
          </table:table-cell>
          <table:table-cell table:formula="of:=CONCATENATE(&quot;insert into IBGE_MUNICIPIOS (UF, COD_UF, CODIGO_MUNICIPIO, NOME_MUNICIPIO, POP_COLETADA, POP_IMPUTADA, POP_TOTAL) values ('&quot;; [.A186]; &quot;', '&quot;; [.B186]; &quot;', '&quot;; [.C186]; &quot;', '&quot;; [.D186]; &quot;',&quot;; [.E186]; &quot;, &quot;; [.F186]; &quot;, &quot;; [.G186]; &quot;);&quot;)" office:value-type="string" office:string-value="insert into IBGE_MUNICIPIOS (UF, COD_UF, CODIGO_MUNICIPIO, NOME_MUNICIPIO, POP_COLETADA, POP_IMPUTADA, POP_TOTAL) values ('PR', '41', '13304', 'Laranjeiras do Sul',31796, 431, 32227);" calcext:value-type="string">
            <text:p>insert into IBGE_MUNICIPIOS (UF, COD_UF, CODIGO_MUNICIPIO, NOME_MUNICIPIO, POP_COLETADA, POP_IMPUTADA, POP_TOTAL) values ('PR', '41', '13304', 'Laranjeiras do Sul',31796, 431, 32227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13403" calcext:value-type="float">
            <text:p>13403</text:p>
          </table:table-cell>
          <table:table-cell office:value-type="string" calcext:value-type="string">
            <text:p>Leópolis</text:p>
          </table:table-cell>
          <table:table-cell office:value-type="float" office:value="3747" calcext:value-type="float">
            <text:p>3747</text:p>
          </table:table-cell>
          <table:table-cell office:value-type="float" office:value="5" calcext:value-type="float">
            <text:p>5</text:p>
          </table:table-cell>
          <table:table-cell office:value-type="float" office:value="3752" calcext:value-type="float">
            <text:p>3752</text:p>
          </table:table-cell>
          <table:table-cell table:formula="of:=CONCATENATE(&quot;insert into IBGE_MUNICIPIOS (UF, COD_UF, CODIGO_MUNICIPIO, NOME_MUNICIPIO, POP_COLETADA, POP_IMPUTADA, POP_TOTAL) values ('&quot;; [.A187]; &quot;', '&quot;; [.B187]; &quot;', '&quot;; [.C187]; &quot;', '&quot;; [.D187]; &quot;',&quot;; [.E187]; &quot;, &quot;; [.F187]; &quot;, &quot;; [.G187]; &quot;);&quot;)" office:value-type="string" office:string-value="insert into IBGE_MUNICIPIOS (UF, COD_UF, CODIGO_MUNICIPIO, NOME_MUNICIPIO, POP_COLETADA, POP_IMPUTADA, POP_TOTAL) values ('PR', '41', '13403', 'Leópolis',3747, 5, 3752);" calcext:value-type="string">
            <text:p>insert into IBGE_MUNICIPIOS (UF, COD_UF, CODIGO_MUNICIPIO, NOME_MUNICIPIO, POP_COLETADA, POP_IMPUTADA, POP_TOTAL) values ('PR', '41', '13403', 'Leópolis',3747, 5, 3752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13429" calcext:value-type="float">
            <text:p>13429</text:p>
          </table:table-cell>
          <table:table-cell office:value-type="string" calcext:value-type="string">
            <text:p>Lidianópolis</text:p>
          </table:table-cell>
          <table:table-cell office:value-type="float" office:value="3938" calcext:value-type="float">
            <text:p>3938</text:p>
          </table:table-cell>
          <table:table-cell office:value-type="float" office:value="0" calcext:value-type="float">
            <text:p>0</text:p>
          </table:table-cell>
          <table:table-cell office:value-type="float" office:value="3938" calcext:value-type="float">
            <text:p>3938</text:p>
          </table:table-cell>
          <table:table-cell table:formula="of:=CONCATENATE(&quot;insert into IBGE_MUNICIPIOS (UF, COD_UF, CODIGO_MUNICIPIO, NOME_MUNICIPIO, POP_COLETADA, POP_IMPUTADA, POP_TOTAL) values ('&quot;; [.A188]; &quot;', '&quot;; [.B188]; &quot;', '&quot;; [.C188]; &quot;', '&quot;; [.D188]; &quot;',&quot;; [.E188]; &quot;, &quot;; [.F188]; &quot;, &quot;; [.G188]; &quot;);&quot;)" office:value-type="string" office:string-value="insert into IBGE_MUNICIPIOS (UF, COD_UF, CODIGO_MUNICIPIO, NOME_MUNICIPIO, POP_COLETADA, POP_IMPUTADA, POP_TOTAL) values ('PR', '41', '13429', 'Lidianópolis',3938, 0, 3938);" calcext:value-type="string">
            <text:p>insert into IBGE_MUNICIPIOS (UF, COD_UF, CODIGO_MUNICIPIO, NOME_MUNICIPIO, POP_COLETADA, POP_IMPUTADA, POP_TOTAL) values ('PR', '41', '13429', 'Lidianópolis',3938, 0, 3938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13452" calcext:value-type="float">
            <text:p>13452</text:p>
          </table:table-cell>
          <table:table-cell office:value-type="string" calcext:value-type="string">
            <text:p>Lindoeste</text:p>
          </table:table-cell>
          <table:table-cell office:value-type="float" office:value="4900" calcext:value-type="float">
            <text:p>4900</text:p>
          </table:table-cell>
          <table:table-cell office:value-type="float" office:value="275" calcext:value-type="float">
            <text:p>275</text:p>
          </table:table-cell>
          <table:table-cell office:value-type="float" office:value="5175" calcext:value-type="float">
            <text:p>5175</text:p>
          </table:table-cell>
          <table:table-cell table:formula="of:=CONCATENATE(&quot;insert into IBGE_MUNICIPIOS (UF, COD_UF, CODIGO_MUNICIPIO, NOME_MUNICIPIO, POP_COLETADA, POP_IMPUTADA, POP_TOTAL) values ('&quot;; [.A189]; &quot;', '&quot;; [.B189]; &quot;', '&quot;; [.C189]; &quot;', '&quot;; [.D189]; &quot;',&quot;; [.E189]; &quot;, &quot;; [.F189]; &quot;, &quot;; [.G189]; &quot;);&quot;)" office:value-type="string" office:string-value="insert into IBGE_MUNICIPIOS (UF, COD_UF, CODIGO_MUNICIPIO, NOME_MUNICIPIO, POP_COLETADA, POP_IMPUTADA, POP_TOTAL) values ('PR', '41', '13452', 'Lindoeste',4900, 275, 5175);" calcext:value-type="string">
            <text:p>insert into IBGE_MUNICIPIOS (UF, COD_UF, CODIGO_MUNICIPIO, NOME_MUNICIPIO, POP_COLETADA, POP_IMPUTADA, POP_TOTAL) values ('PR', '41', '13452', 'Lindoeste',4900, 275, 5175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13502" calcext:value-type="float">
            <text:p>13502</text:p>
          </table:table-cell>
          <table:table-cell office:value-type="string" calcext:value-type="string">
            <text:p>Loanda</text:p>
          </table:table-cell>
          <table:table-cell office:value-type="float" office:value="22245" calcext:value-type="float">
            <text:p>22245</text:p>
          </table:table-cell>
          <table:table-cell office:value-type="float" office:value="980" calcext:value-type="float">
            <text:p>980</text:p>
          </table:table-cell>
          <table:table-cell office:value-type="float" office:value="23225" calcext:value-type="float">
            <text:p>23225</text:p>
          </table:table-cell>
          <table:table-cell table:formula="of:=CONCATENATE(&quot;insert into IBGE_MUNICIPIOS (UF, COD_UF, CODIGO_MUNICIPIO, NOME_MUNICIPIO, POP_COLETADA, POP_IMPUTADA, POP_TOTAL) values ('&quot;; [.A190]; &quot;', '&quot;; [.B190]; &quot;', '&quot;; [.C190]; &quot;', '&quot;; [.D190]; &quot;',&quot;; [.E190]; &quot;, &quot;; [.F190]; &quot;, &quot;; [.G190]; &quot;);&quot;)" office:value-type="string" office:string-value="insert into IBGE_MUNICIPIOS (UF, COD_UF, CODIGO_MUNICIPIO, NOME_MUNICIPIO, POP_COLETADA, POP_IMPUTADA, POP_TOTAL) values ('PR', '41', '13502', 'Loanda',22245, 980, 23225);" calcext:value-type="string">
            <text:p>insert into IBGE_MUNICIPIOS (UF, COD_UF, CODIGO_MUNICIPIO, NOME_MUNICIPIO, POP_COLETADA, POP_IMPUTADA, POP_TOTAL) values ('PR', '41', '13502', 'Loanda',22245, 980, 23225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13601" calcext:value-type="float">
            <text:p>13601</text:p>
          </table:table-cell>
          <table:table-cell office:value-type="string" calcext:value-type="string">
            <text:p>Lobato</text:p>
          </table:table-cell>
          <table:table-cell office:value-type="float" office:value="4591" calcext:value-type="float">
            <text:p>4591</text:p>
          </table:table-cell>
          <table:table-cell office:value-type="float" office:value="10" calcext:value-type="float">
            <text:p>10</text:p>
          </table:table-cell>
          <table:table-cell office:value-type="float" office:value="4601" calcext:value-type="float">
            <text:p>4601</text:p>
          </table:table-cell>
          <table:table-cell table:formula="of:=CONCATENATE(&quot;insert into IBGE_MUNICIPIOS (UF, COD_UF, CODIGO_MUNICIPIO, NOME_MUNICIPIO, POP_COLETADA, POP_IMPUTADA, POP_TOTAL) values ('&quot;; [.A191]; &quot;', '&quot;; [.B191]; &quot;', '&quot;; [.C191]; &quot;', '&quot;; [.D191]; &quot;',&quot;; [.E191]; &quot;, &quot;; [.F191]; &quot;, &quot;; [.G191]; &quot;);&quot;)" office:value-type="string" office:string-value="insert into IBGE_MUNICIPIOS (UF, COD_UF, CODIGO_MUNICIPIO, NOME_MUNICIPIO, POP_COLETADA, POP_IMPUTADA, POP_TOTAL) values ('PR', '41', '13601', 'Lobato',4591, 10, 4601);" calcext:value-type="string">
            <text:p>insert into IBGE_MUNICIPIOS (UF, COD_UF, CODIGO_MUNICIPIO, NOME_MUNICIPIO, POP_COLETADA, POP_IMPUTADA, POP_TOTAL) values ('PR', '41', '13601', 'Lobato',4591, 10, 4601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13700" calcext:value-type="float">
            <text:p>13700</text:p>
          </table:table-cell>
          <table:table-cell office:value-type="string" calcext:value-type="string">
            <text:p>Londrina</text:p>
          </table:table-cell>
          <table:table-cell office:value-type="float" office:value="529027" calcext:value-type="float">
            <text:p>529027</text:p>
          </table:table-cell>
          <table:table-cell office:value-type="float" office:value="26938" calcext:value-type="float">
            <text:p>26938</text:p>
          </table:table-cell>
          <table:table-cell office:value-type="float" office:value="555965" calcext:value-type="float">
            <text:p>555965</text:p>
          </table:table-cell>
          <table:table-cell table:formula="of:=CONCATENATE(&quot;insert into IBGE_MUNICIPIOS (UF, COD_UF, CODIGO_MUNICIPIO, NOME_MUNICIPIO, POP_COLETADA, POP_IMPUTADA, POP_TOTAL) values ('&quot;; [.A192]; &quot;', '&quot;; [.B192]; &quot;', '&quot;; [.C192]; &quot;', '&quot;; [.D192]; &quot;',&quot;; [.E192]; &quot;, &quot;; [.F192]; &quot;, &quot;; [.G192]; &quot;);&quot;)" office:value-type="string" office:string-value="insert into IBGE_MUNICIPIOS (UF, COD_UF, CODIGO_MUNICIPIO, NOME_MUNICIPIO, POP_COLETADA, POP_IMPUTADA, POP_TOTAL) values ('PR', '41', '13700', 'Londrina',529027, 26938, 555965);" calcext:value-type="string">
            <text:p>insert into IBGE_MUNICIPIOS (UF, COD_UF, CODIGO_MUNICIPIO, NOME_MUNICIPIO, POP_COLETADA, POP_IMPUTADA, POP_TOTAL) values ('PR', '41', '13700', 'Londrina',529027, 26938, 555965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13734" calcext:value-type="float">
            <text:p>13734</text:p>
          </table:table-cell>
          <table:table-cell office:value-type="string" calcext:value-type="string">
            <text:p>Luiziana</text:p>
          </table:table-cell>
          <table:table-cell office:value-type="float" office:value="6346" calcext:value-type="float">
            <text:p>6346</text:p>
          </table:table-cell>
          <table:table-cell office:value-type="float" office:value="344" calcext:value-type="float">
            <text:p>344</text:p>
          </table:table-cell>
          <table:table-cell office:value-type="float" office:value="6690" calcext:value-type="float">
            <text:p>6690</text:p>
          </table:table-cell>
          <table:table-cell table:formula="of:=CONCATENATE(&quot;insert into IBGE_MUNICIPIOS (UF, COD_UF, CODIGO_MUNICIPIO, NOME_MUNICIPIO, POP_COLETADA, POP_IMPUTADA, POP_TOTAL) values ('&quot;; [.A193]; &quot;', '&quot;; [.B193]; &quot;', '&quot;; [.C193]; &quot;', '&quot;; [.D193]; &quot;',&quot;; [.E193]; &quot;, &quot;; [.F193]; &quot;, &quot;; [.G193]; &quot;);&quot;)" office:value-type="string" office:string-value="insert into IBGE_MUNICIPIOS (UF, COD_UF, CODIGO_MUNICIPIO, NOME_MUNICIPIO, POP_COLETADA, POP_IMPUTADA, POP_TOTAL) values ('PR', '41', '13734', 'Luiziana',6346, 344, 6690);" calcext:value-type="string">
            <text:p>insert into IBGE_MUNICIPIOS (UF, COD_UF, CODIGO_MUNICIPIO, NOME_MUNICIPIO, POP_COLETADA, POP_IMPUTADA, POP_TOTAL) values ('PR', '41', '13734', 'Luiziana',6346, 344, 6690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13759" calcext:value-type="float">
            <text:p>13759</text:p>
          </table:table-cell>
          <table:table-cell office:value-type="string" calcext:value-type="string">
            <text:p>Lunardelli</text:p>
          </table:table-cell>
          <table:table-cell office:value-type="float" office:value="4845" calcext:value-type="float">
            <text:p>4845</text:p>
          </table:table-cell>
          <table:table-cell office:value-type="float" office:value="27" calcext:value-type="float">
            <text:p>27</text:p>
          </table:table-cell>
          <table:table-cell office:value-type="float" office:value="4872" calcext:value-type="float">
            <text:p>4872</text:p>
          </table:table-cell>
          <table:table-cell table:formula="of:=CONCATENATE(&quot;insert into IBGE_MUNICIPIOS (UF, COD_UF, CODIGO_MUNICIPIO, NOME_MUNICIPIO, POP_COLETADA, POP_IMPUTADA, POP_TOTAL) values ('&quot;; [.A194]; &quot;', '&quot;; [.B194]; &quot;', '&quot;; [.C194]; &quot;', '&quot;; [.D194]; &quot;',&quot;; [.E194]; &quot;, &quot;; [.F194]; &quot;, &quot;; [.G194]; &quot;);&quot;)" office:value-type="string" office:string-value="insert into IBGE_MUNICIPIOS (UF, COD_UF, CODIGO_MUNICIPIO, NOME_MUNICIPIO, POP_COLETADA, POP_IMPUTADA, POP_TOTAL) values ('PR', '41', '13759', 'Lunardelli',4845, 27, 4872);" calcext:value-type="string">
            <text:p>insert into IBGE_MUNICIPIOS (UF, COD_UF, CODIGO_MUNICIPIO, NOME_MUNICIPIO, POP_COLETADA, POP_IMPUTADA, POP_TOTAL) values ('PR', '41', '13759', 'Lunardelli',4845, 27, 4872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13809" calcext:value-type="float">
            <text:p>13809</text:p>
          </table:table-cell>
          <table:table-cell office:value-type="string" calcext:value-type="string">
            <text:p>Lupionópolis</text:p>
          </table:table-cell>
          <table:table-cell office:value-type="float" office:value="4776" calcext:value-type="float">
            <text:p>4776</text:p>
          </table:table-cell>
          <table:table-cell office:value-type="float" office:value="37" calcext:value-type="float">
            <text:p>37</text:p>
          </table:table-cell>
          <table:table-cell office:value-type="float" office:value="4813" calcext:value-type="float">
            <text:p>4813</text:p>
          </table:table-cell>
          <table:table-cell table:formula="of:=CONCATENATE(&quot;insert into IBGE_MUNICIPIOS (UF, COD_UF, CODIGO_MUNICIPIO, NOME_MUNICIPIO, POP_COLETADA, POP_IMPUTADA, POP_TOTAL) values ('&quot;; [.A195]; &quot;', '&quot;; [.B195]; &quot;', '&quot;; [.C195]; &quot;', '&quot;; [.D195]; &quot;',&quot;; [.E195]; &quot;, &quot;; [.F195]; &quot;, &quot;; [.G195]; &quot;);&quot;)" office:value-type="string" office:string-value="insert into IBGE_MUNICIPIOS (UF, COD_UF, CODIGO_MUNICIPIO, NOME_MUNICIPIO, POP_COLETADA, POP_IMPUTADA, POP_TOTAL) values ('PR', '41', '13809', 'Lupionópolis',4776, 37, 4813);" calcext:value-type="string">
            <text:p>insert into IBGE_MUNICIPIOS (UF, COD_UF, CODIGO_MUNICIPIO, NOME_MUNICIPIO, POP_COLETADA, POP_IMPUTADA, POP_TOTAL) values ('PR', '41', '13809', 'Lupionópolis',4776, 37, 4813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13908" calcext:value-type="float">
            <text:p>13908</text:p>
          </table:table-cell>
          <table:table-cell office:value-type="string" calcext:value-type="string">
            <text:p>Mallet</text:p>
          </table:table-cell>
          <table:table-cell office:value-type="float" office:value="13252" calcext:value-type="float">
            <text:p>13252</text:p>
          </table:table-cell>
          <table:table-cell office:value-type="float" office:value="176" calcext:value-type="float">
            <text:p>176</text:p>
          </table:table-cell>
          <table:table-cell office:value-type="float" office:value="13428" calcext:value-type="float">
            <text:p>13428</text:p>
          </table:table-cell>
          <table:table-cell table:formula="of:=CONCATENATE(&quot;insert into IBGE_MUNICIPIOS (UF, COD_UF, CODIGO_MUNICIPIO, NOME_MUNICIPIO, POP_COLETADA, POP_IMPUTADA, POP_TOTAL) values ('&quot;; [.A196]; &quot;', '&quot;; [.B196]; &quot;', '&quot;; [.C196]; &quot;', '&quot;; [.D196]; &quot;',&quot;; [.E196]; &quot;, &quot;; [.F196]; &quot;, &quot;; [.G196]; &quot;);&quot;)" office:value-type="string" office:string-value="insert into IBGE_MUNICIPIOS (UF, COD_UF, CODIGO_MUNICIPIO, NOME_MUNICIPIO, POP_COLETADA, POP_IMPUTADA, POP_TOTAL) values ('PR', '41', '13908', 'Mallet',13252, 176, 13428);" calcext:value-type="string">
            <text:p>insert into IBGE_MUNICIPIOS (UF, COD_UF, CODIGO_MUNICIPIO, NOME_MUNICIPIO, POP_COLETADA, POP_IMPUTADA, POP_TOTAL) values ('PR', '41', '13908', 'Mallet',13252, 176, 13428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14005" calcext:value-type="float">
            <text:p>14005</text:p>
          </table:table-cell>
          <table:table-cell office:value-type="string" calcext:value-type="string">
            <text:p>Mamborê</text:p>
          </table:table-cell>
          <table:table-cell office:value-type="float" office:value="13080" calcext:value-type="float">
            <text:p>13080</text:p>
          </table:table-cell>
          <table:table-cell office:value-type="float" office:value="372" calcext:value-type="float">
            <text:p>372</text:p>
          </table:table-cell>
          <table:table-cell office:value-type="float" office:value="13452" calcext:value-type="float">
            <text:p>13452</text:p>
          </table:table-cell>
          <table:table-cell table:formula="of:=CONCATENATE(&quot;insert into IBGE_MUNICIPIOS (UF, COD_UF, CODIGO_MUNICIPIO, NOME_MUNICIPIO, POP_COLETADA, POP_IMPUTADA, POP_TOTAL) values ('&quot;; [.A197]; &quot;', '&quot;; [.B197]; &quot;', '&quot;; [.C197]; &quot;', '&quot;; [.D197]; &quot;',&quot;; [.E197]; &quot;, &quot;; [.F197]; &quot;, &quot;; [.G197]; &quot;);&quot;)" office:value-type="string" office:string-value="insert into IBGE_MUNICIPIOS (UF, COD_UF, CODIGO_MUNICIPIO, NOME_MUNICIPIO, POP_COLETADA, POP_IMPUTADA, POP_TOTAL) values ('PR', '41', '14005', 'Mamborê',13080, 372, 13452);" calcext:value-type="string">
            <text:p>insert into IBGE_MUNICIPIOS (UF, COD_UF, CODIGO_MUNICIPIO, NOME_MUNICIPIO, POP_COLETADA, POP_IMPUTADA, POP_TOTAL) values ('PR', '41', '14005', 'Mamborê',13080, 372, 13452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14104" calcext:value-type="float">
            <text:p>14104</text:p>
          </table:table-cell>
          <table:table-cell office:value-type="string" calcext:value-type="string">
            <text:p>Mandaguaçu</text:p>
          </table:table-cell>
          <table:table-cell office:value-type="float" office:value="30104" calcext:value-type="float">
            <text:p>30104</text:p>
          </table:table-cell>
          <table:table-cell office:value-type="float" office:value="1353" calcext:value-type="float">
            <text:p>1353</text:p>
          </table:table-cell>
          <table:table-cell office:value-type="float" office:value="31457" calcext:value-type="float">
            <text:p>31457</text:p>
          </table:table-cell>
          <table:table-cell table:formula="of:=CONCATENATE(&quot;insert into IBGE_MUNICIPIOS (UF, COD_UF, CODIGO_MUNICIPIO, NOME_MUNICIPIO, POP_COLETADA, POP_IMPUTADA, POP_TOTAL) values ('&quot;; [.A198]; &quot;', '&quot;; [.B198]; &quot;', '&quot;; [.C198]; &quot;', '&quot;; [.D198]; &quot;',&quot;; [.E198]; &quot;, &quot;; [.F198]; &quot;, &quot;; [.G198]; &quot;);&quot;)" office:value-type="string" office:string-value="insert into IBGE_MUNICIPIOS (UF, COD_UF, CODIGO_MUNICIPIO, NOME_MUNICIPIO, POP_COLETADA, POP_IMPUTADA, POP_TOTAL) values ('PR', '41', '14104', 'Mandaguaçu',30104, 1353, 31457);" calcext:value-type="string">
            <text:p>insert into IBGE_MUNICIPIOS (UF, COD_UF, CODIGO_MUNICIPIO, NOME_MUNICIPIO, POP_COLETADA, POP_IMPUTADA, POP_TOTAL) values ('PR', '41', '14104', 'Mandaguaçu',30104, 1353, 31457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14203" calcext:value-type="float">
            <text:p>14203</text:p>
          </table:table-cell>
          <table:table-cell office:value-type="string" calcext:value-type="string">
            <text:p>Mandaguari</text:p>
          </table:table-cell>
          <table:table-cell office:value-type="float" office:value="34713" calcext:value-type="float">
            <text:p>34713</text:p>
          </table:table-cell>
          <table:table-cell office:value-type="float" office:value="2003" calcext:value-type="float">
            <text:p>2003</text:p>
          </table:table-cell>
          <table:table-cell office:value-type="float" office:value="36716" calcext:value-type="float">
            <text:p>36716</text:p>
          </table:table-cell>
          <table:table-cell table:formula="of:=CONCATENATE(&quot;insert into IBGE_MUNICIPIOS (UF, COD_UF, CODIGO_MUNICIPIO, NOME_MUNICIPIO, POP_COLETADA, POP_IMPUTADA, POP_TOTAL) values ('&quot;; [.A199]; &quot;', '&quot;; [.B199]; &quot;', '&quot;; [.C199]; &quot;', '&quot;; [.D199]; &quot;',&quot;; [.E199]; &quot;, &quot;; [.F199]; &quot;, &quot;; [.G199]; &quot;);&quot;)" office:value-type="string" office:string-value="insert into IBGE_MUNICIPIOS (UF, COD_UF, CODIGO_MUNICIPIO, NOME_MUNICIPIO, POP_COLETADA, POP_IMPUTADA, POP_TOTAL) values ('PR', '41', '14203', 'Mandaguari',34713, 2003, 36716);" calcext:value-type="string">
            <text:p>insert into IBGE_MUNICIPIOS (UF, COD_UF, CODIGO_MUNICIPIO, NOME_MUNICIPIO, POP_COLETADA, POP_IMPUTADA, POP_TOTAL) values ('PR', '41', '14203', 'Mandaguari',34713, 2003, 36716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14302" calcext:value-type="float">
            <text:p>14302</text:p>
          </table:table-cell>
          <table:table-cell office:value-type="string" calcext:value-type="string">
            <text:p>Mandirituba</text:p>
          </table:table-cell>
          <table:table-cell office:value-type="float" office:value="26607" calcext:value-type="float">
            <text:p>26607</text:p>
          </table:table-cell>
          <table:table-cell office:value-type="float" office:value="832" calcext:value-type="float">
            <text:p>832</text:p>
          </table:table-cell>
          <table:table-cell office:value-type="float" office:value="27439" calcext:value-type="float">
            <text:p>27439</text:p>
          </table:table-cell>
          <table:table-cell table:formula="of:=CONCATENATE(&quot;insert into IBGE_MUNICIPIOS (UF, COD_UF, CODIGO_MUNICIPIO, NOME_MUNICIPIO, POP_COLETADA, POP_IMPUTADA, POP_TOTAL) values ('&quot;; [.A200]; &quot;', '&quot;; [.B200]; &quot;', '&quot;; [.C200]; &quot;', '&quot;; [.D200]; &quot;',&quot;; [.E200]; &quot;, &quot;; [.F200]; &quot;, &quot;; [.G200]; &quot;);&quot;)" office:value-type="string" office:string-value="insert into IBGE_MUNICIPIOS (UF, COD_UF, CODIGO_MUNICIPIO, NOME_MUNICIPIO, POP_COLETADA, POP_IMPUTADA, POP_TOTAL) values ('PR', '41', '14302', 'Mandirituba',26607, 832, 27439);" calcext:value-type="string">
            <text:p>insert into IBGE_MUNICIPIOS (UF, COD_UF, CODIGO_MUNICIPIO, NOME_MUNICIPIO, POP_COLETADA, POP_IMPUTADA, POP_TOTAL) values ('PR', '41', '14302', 'Mandirituba',26607, 832, 27439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14351" calcext:value-type="float">
            <text:p>14351</text:p>
          </table:table-cell>
          <table:table-cell office:value-type="string" calcext:value-type="string">
            <text:p>Manfrinópolis</text:p>
          </table:table-cell>
          <table:table-cell office:value-type="float" office:value="2770" calcext:value-type="float">
            <text:p>2770</text:p>
          </table:table-cell>
          <table:table-cell office:value-type="float" office:value="0" calcext:value-type="float">
            <text:p>0</text:p>
          </table:table-cell>
          <table:table-cell office:value-type="float" office:value="2770" calcext:value-type="float">
            <text:p>2770</text:p>
          </table:table-cell>
          <table:table-cell table:formula="of:=CONCATENATE(&quot;insert into IBGE_MUNICIPIOS (UF, COD_UF, CODIGO_MUNICIPIO, NOME_MUNICIPIO, POP_COLETADA, POP_IMPUTADA, POP_TOTAL) values ('&quot;; [.A201]; &quot;', '&quot;; [.B201]; &quot;', '&quot;; [.C201]; &quot;', '&quot;; [.D201]; &quot;',&quot;; [.E201]; &quot;, &quot;; [.F201]; &quot;, &quot;; [.G201]; &quot;);&quot;)" office:value-type="string" office:string-value="insert into IBGE_MUNICIPIOS (UF, COD_UF, CODIGO_MUNICIPIO, NOME_MUNICIPIO, POP_COLETADA, POP_IMPUTADA, POP_TOTAL) values ('PR', '41', '14351', 'Manfrinópolis',2770, 0, 2770);" calcext:value-type="string">
            <text:p>insert into IBGE_MUNICIPIOS (UF, COD_UF, CODIGO_MUNICIPIO, NOME_MUNICIPIO, POP_COLETADA, POP_IMPUTADA, POP_TOTAL) values ('PR', '41', '14351', 'Manfrinópolis',2770, 0, 2770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14401" calcext:value-type="float">
            <text:p>14401</text:p>
          </table:table-cell>
          <table:table-cell office:value-type="string" calcext:value-type="string">
            <text:p>Mangueirinha</text:p>
          </table:table-cell>
          <table:table-cell office:value-type="float" office:value="15880" calcext:value-type="float">
            <text:p>15880</text:p>
          </table:table-cell>
          <table:table-cell office:value-type="float" office:value="723" calcext:value-type="float">
            <text:p>723</text:p>
          </table:table-cell>
          <table:table-cell office:value-type="float" office:value="16603" calcext:value-type="float">
            <text:p>16603</text:p>
          </table:table-cell>
          <table:table-cell table:formula="of:=CONCATENATE(&quot;insert into IBGE_MUNICIPIOS (UF, COD_UF, CODIGO_MUNICIPIO, NOME_MUNICIPIO, POP_COLETADA, POP_IMPUTADA, POP_TOTAL) values ('&quot;; [.A202]; &quot;', '&quot;; [.B202]; &quot;', '&quot;; [.C202]; &quot;', '&quot;; [.D202]; &quot;',&quot;; [.E202]; &quot;, &quot;; [.F202]; &quot;, &quot;; [.G202]; &quot;);&quot;)" office:value-type="string" office:string-value="insert into IBGE_MUNICIPIOS (UF, COD_UF, CODIGO_MUNICIPIO, NOME_MUNICIPIO, POP_COLETADA, POP_IMPUTADA, POP_TOTAL) values ('PR', '41', '14401', 'Mangueirinha',15880, 723, 16603);" calcext:value-type="string">
            <text:p>insert into IBGE_MUNICIPIOS (UF, COD_UF, CODIGO_MUNICIPIO, NOME_MUNICIPIO, POP_COLETADA, POP_IMPUTADA, POP_TOTAL) values ('PR', '41', '14401', 'Mangueirinha',15880, 723, 16603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14500" calcext:value-type="float">
            <text:p>14500</text:p>
          </table:table-cell>
          <table:table-cell office:value-type="string" calcext:value-type="string">
            <text:p>Manoel Ribas</text:p>
          </table:table-cell>
          <table:table-cell office:value-type="float" office:value="13596" calcext:value-type="float">
            <text:p>13596</text:p>
          </table:table-cell>
          <table:table-cell office:value-type="float" office:value="644" calcext:value-type="float">
            <text:p>644</text:p>
          </table:table-cell>
          <table:table-cell office:value-type="float" office:value="14240" calcext:value-type="float">
            <text:p>14240</text:p>
          </table:table-cell>
          <table:table-cell table:formula="of:=CONCATENATE(&quot;insert into IBGE_MUNICIPIOS (UF, COD_UF, CODIGO_MUNICIPIO, NOME_MUNICIPIO, POP_COLETADA, POP_IMPUTADA, POP_TOTAL) values ('&quot;; [.A203]; &quot;', '&quot;; [.B203]; &quot;', '&quot;; [.C203]; &quot;', '&quot;; [.D203]; &quot;',&quot;; [.E203]; &quot;, &quot;; [.F203]; &quot;, &quot;; [.G203]; &quot;);&quot;)" office:value-type="string" office:string-value="insert into IBGE_MUNICIPIOS (UF, COD_UF, CODIGO_MUNICIPIO, NOME_MUNICIPIO, POP_COLETADA, POP_IMPUTADA, POP_TOTAL) values ('PR', '41', '14500', 'Manoel Ribas',13596, 644, 14240);" calcext:value-type="string">
            <text:p>insert into IBGE_MUNICIPIOS (UF, COD_UF, CODIGO_MUNICIPIO, NOME_MUNICIPIO, POP_COLETADA, POP_IMPUTADA, POP_TOTAL) values ('PR', '41', '14500', 'Manoel Ribas',13596, 644, 14240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14609" calcext:value-type="float">
            <text:p>14609</text:p>
          </table:table-cell>
          <table:table-cell office:value-type="string" calcext:value-type="string">
            <text:p>Marechal Cândido Rondon</text:p>
          </table:table-cell>
          <table:table-cell office:value-type="float" office:value="53664" calcext:value-type="float">
            <text:p>53664</text:p>
          </table:table-cell>
          <table:table-cell office:value-type="float" office:value="2172" calcext:value-type="float">
            <text:p>2172</text:p>
          </table:table-cell>
          <table:table-cell office:value-type="float" office:value="55836" calcext:value-type="float">
            <text:p>55836</text:p>
          </table:table-cell>
          <table:table-cell table:formula="of:=CONCATENATE(&quot;insert into IBGE_MUNICIPIOS (UF, COD_UF, CODIGO_MUNICIPIO, NOME_MUNICIPIO, POP_COLETADA, POP_IMPUTADA, POP_TOTAL) values ('&quot;; [.A204]; &quot;', '&quot;; [.B204]; &quot;', '&quot;; [.C204]; &quot;', '&quot;; [.D204]; &quot;',&quot;; [.E204]; &quot;, &quot;; [.F204]; &quot;, &quot;; [.G204]; &quot;);&quot;)" office:value-type="string" office:string-value="insert into IBGE_MUNICIPIOS (UF, COD_UF, CODIGO_MUNICIPIO, NOME_MUNICIPIO, POP_COLETADA, POP_IMPUTADA, POP_TOTAL) values ('PR', '41', '14609', 'Marechal Cândido Rondon',53664, 2172, 55836);" calcext:value-type="string">
            <text:p>insert into IBGE_MUNICIPIOS (UF, COD_UF, CODIGO_MUNICIPIO, NOME_MUNICIPIO, POP_COLETADA, POP_IMPUTADA, POP_TOTAL) values ('PR', '41', '14609', 'Marechal Cândido Rondon',53664, 2172, 55836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14708" calcext:value-type="float">
            <text:p>14708</text:p>
          </table:table-cell>
          <table:table-cell office:value-type="string" calcext:value-type="string">
            <text:p>Maria Helena</text:p>
          </table:table-cell>
          <table:table-cell office:value-type="float" office:value="5805" calcext:value-type="float">
            <text:p>5805</text:p>
          </table:table-cell>
          <table:table-cell office:value-type="float" office:value="60" calcext:value-type="float">
            <text:p>60</text:p>
          </table:table-cell>
          <table:table-cell office:value-type="float" office:value="5865" calcext:value-type="float">
            <text:p>5865</text:p>
          </table:table-cell>
          <table:table-cell table:formula="of:=CONCATENATE(&quot;insert into IBGE_MUNICIPIOS (UF, COD_UF, CODIGO_MUNICIPIO, NOME_MUNICIPIO, POP_COLETADA, POP_IMPUTADA, POP_TOTAL) values ('&quot;; [.A205]; &quot;', '&quot;; [.B205]; &quot;', '&quot;; [.C205]; &quot;', '&quot;; [.D205]; &quot;',&quot;; [.E205]; &quot;, &quot;; [.F205]; &quot;, &quot;; [.G205]; &quot;);&quot;)" office:value-type="string" office:string-value="insert into IBGE_MUNICIPIOS (UF, COD_UF, CODIGO_MUNICIPIO, NOME_MUNICIPIO, POP_COLETADA, POP_IMPUTADA, POP_TOTAL) values ('PR', '41', '14708', 'Maria Helena',5805, 60, 5865);" calcext:value-type="string">
            <text:p>insert into IBGE_MUNICIPIOS (UF, COD_UF, CODIGO_MUNICIPIO, NOME_MUNICIPIO, POP_COLETADA, POP_IMPUTADA, POP_TOTAL) values ('PR', '41', '14708', 'Maria Helena',5805, 60, 5865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14807" calcext:value-type="float">
            <text:p>14807</text:p>
          </table:table-cell>
          <table:table-cell office:value-type="string" calcext:value-type="string">
            <text:p>Marialva</text:p>
          </table:table-cell>
          <table:table-cell office:value-type="float" office:value="40318" calcext:value-type="float">
            <text:p>40318</text:p>
          </table:table-cell>
          <table:table-cell office:value-type="float" office:value="1533" calcext:value-type="float">
            <text:p>1533</text:p>
          </table:table-cell>
          <table:table-cell office:value-type="float" office:value="41851" calcext:value-type="float">
            <text:p>41851</text:p>
          </table:table-cell>
          <table:table-cell table:formula="of:=CONCATENATE(&quot;insert into IBGE_MUNICIPIOS (UF, COD_UF, CODIGO_MUNICIPIO, NOME_MUNICIPIO, POP_COLETADA, POP_IMPUTADA, POP_TOTAL) values ('&quot;; [.A206]; &quot;', '&quot;; [.B206]; &quot;', '&quot;; [.C206]; &quot;', '&quot;; [.D206]; &quot;',&quot;; [.E206]; &quot;, &quot;; [.F206]; &quot;, &quot;; [.G206]; &quot;);&quot;)" office:value-type="string" office:string-value="insert into IBGE_MUNICIPIOS (UF, COD_UF, CODIGO_MUNICIPIO, NOME_MUNICIPIO, POP_COLETADA, POP_IMPUTADA, POP_TOTAL) values ('PR', '41', '14807', 'Marialva',40318, 1533, 41851);" calcext:value-type="string">
            <text:p>insert into IBGE_MUNICIPIOS (UF, COD_UF, CODIGO_MUNICIPIO, NOME_MUNICIPIO, POP_COLETADA, POP_IMPUTADA, POP_TOTAL) values ('PR', '41', '14807', 'Marialva',40318, 1533, 41851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14906" calcext:value-type="float">
            <text:p>14906</text:p>
          </table:table-cell>
          <table:table-cell office:value-type="string" calcext:value-type="string">
            <text:p>Marilândia do Sul</text:p>
          </table:table-cell>
          <table:table-cell office:value-type="float" office:value="8677" calcext:value-type="float">
            <text:p>8677</text:p>
          </table:table-cell>
          <table:table-cell office:value-type="float" office:value="0" calcext:value-type="float">
            <text:p>0</text:p>
          </table:table-cell>
          <table:table-cell office:value-type="float" office:value="8677" calcext:value-type="float">
            <text:p>8677</text:p>
          </table:table-cell>
          <table:table-cell table:formula="of:=CONCATENATE(&quot;insert into IBGE_MUNICIPIOS (UF, COD_UF, CODIGO_MUNICIPIO, NOME_MUNICIPIO, POP_COLETADA, POP_IMPUTADA, POP_TOTAL) values ('&quot;; [.A207]; &quot;', '&quot;; [.B207]; &quot;', '&quot;; [.C207]; &quot;', '&quot;; [.D207]; &quot;',&quot;; [.E207]; &quot;, &quot;; [.F207]; &quot;, &quot;; [.G207]; &quot;);&quot;)" office:value-type="string" office:string-value="insert into IBGE_MUNICIPIOS (UF, COD_UF, CODIGO_MUNICIPIO, NOME_MUNICIPIO, POP_COLETADA, POP_IMPUTADA, POP_TOTAL) values ('PR', '41', '14906', 'Marilândia do Sul',8677, 0, 8677);" calcext:value-type="string">
            <text:p>insert into IBGE_MUNICIPIOS (UF, COD_UF, CODIGO_MUNICIPIO, NOME_MUNICIPIO, POP_COLETADA, POP_IMPUTADA, POP_TOTAL) values ('PR', '41', '14906', 'Marilândia do Sul',8677, 0, 8677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15002" calcext:value-type="float">
            <text:p>15002</text:p>
          </table:table-cell>
          <table:table-cell office:value-type="string" calcext:value-type="string">
            <text:p>Marilena</text:p>
          </table:table-cell>
          <table:table-cell office:value-type="float" office:value="7164" calcext:value-type="float">
            <text:p>7164</text:p>
          </table:table-cell>
          <table:table-cell office:value-type="float" office:value="89" calcext:value-type="float">
            <text:p>89</text:p>
          </table:table-cell>
          <table:table-cell office:value-type="float" office:value="7253" calcext:value-type="float">
            <text:p>7253</text:p>
          </table:table-cell>
          <table:table-cell table:formula="of:=CONCATENATE(&quot;insert into IBGE_MUNICIPIOS (UF, COD_UF, CODIGO_MUNICIPIO, NOME_MUNICIPIO, POP_COLETADA, POP_IMPUTADA, POP_TOTAL) values ('&quot;; [.A208]; &quot;', '&quot;; [.B208]; &quot;', '&quot;; [.C208]; &quot;', '&quot;; [.D208]; &quot;',&quot;; [.E208]; &quot;, &quot;; [.F208]; &quot;, &quot;; [.G208]; &quot;);&quot;)" office:value-type="string" office:string-value="insert into IBGE_MUNICIPIOS (UF, COD_UF, CODIGO_MUNICIPIO, NOME_MUNICIPIO, POP_COLETADA, POP_IMPUTADA, POP_TOTAL) values ('PR', '41', '15002', 'Marilena',7164, 89, 7253);" calcext:value-type="string">
            <text:p>insert into IBGE_MUNICIPIOS (UF, COD_UF, CODIGO_MUNICIPIO, NOME_MUNICIPIO, POP_COLETADA, POP_IMPUTADA, POP_TOTAL) values ('PR', '41', '15002', 'Marilena',7164, 89, 7253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15101" calcext:value-type="float">
            <text:p>15101</text:p>
          </table:table-cell>
          <table:table-cell office:value-type="string" calcext:value-type="string">
            <text:p>Mariluz</text:p>
          </table:table-cell>
          <table:table-cell office:value-type="float" office:value="9817" calcext:value-type="float">
            <text:p>9817</text:p>
          </table:table-cell>
          <table:table-cell office:value-type="float" office:value="30" calcext:value-type="float">
            <text:p>30</text:p>
          </table:table-cell>
          <table:table-cell office:value-type="float" office:value="9847" calcext:value-type="float">
            <text:p>9847</text:p>
          </table:table-cell>
          <table:table-cell table:formula="of:=CONCATENATE(&quot;insert into IBGE_MUNICIPIOS (UF, COD_UF, CODIGO_MUNICIPIO, NOME_MUNICIPIO, POP_COLETADA, POP_IMPUTADA, POP_TOTAL) values ('&quot;; [.A209]; &quot;', '&quot;; [.B209]; &quot;', '&quot;; [.C209]; &quot;', '&quot;; [.D209]; &quot;',&quot;; [.E209]; &quot;, &quot;; [.F209]; &quot;, &quot;; [.G209]; &quot;);&quot;)" office:value-type="string" office:string-value="insert into IBGE_MUNICIPIOS (UF, COD_UF, CODIGO_MUNICIPIO, NOME_MUNICIPIO, POP_COLETADA, POP_IMPUTADA, POP_TOTAL) values ('PR', '41', '15101', 'Mariluz',9817, 30, 9847);" calcext:value-type="string">
            <text:p>insert into IBGE_MUNICIPIOS (UF, COD_UF, CODIGO_MUNICIPIO, NOME_MUNICIPIO, POP_COLETADA, POP_IMPUTADA, POP_TOTAL) values ('PR', '41', '15101', 'Mariluz',9817, 30, 9847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15200" calcext:value-type="float">
            <text:p>15200</text:p>
          </table:table-cell>
          <table:table-cell office:value-type="string" calcext:value-type="string">
            <text:p>Maringá</text:p>
          </table:table-cell>
          <table:table-cell office:value-type="float" office:value="376530" calcext:value-type="float">
            <text:p>376530</text:p>
          </table:table-cell>
          <table:table-cell office:value-type="float" office:value="33127" calcext:value-type="float">
            <text:p>33127</text:p>
          </table:table-cell>
          <table:table-cell office:value-type="float" office:value="409657" calcext:value-type="float">
            <text:p>409657</text:p>
          </table:table-cell>
          <table:table-cell table:formula="of:=CONCATENATE(&quot;insert into IBGE_MUNICIPIOS (UF, COD_UF, CODIGO_MUNICIPIO, NOME_MUNICIPIO, POP_COLETADA, POP_IMPUTADA, POP_TOTAL) values ('&quot;; [.A210]; &quot;', '&quot;; [.B210]; &quot;', '&quot;; [.C210]; &quot;', '&quot;; [.D210]; &quot;',&quot;; [.E210]; &quot;, &quot;; [.F210]; &quot;, &quot;; [.G210]; &quot;);&quot;)" office:value-type="string" office:string-value="insert into IBGE_MUNICIPIOS (UF, COD_UF, CODIGO_MUNICIPIO, NOME_MUNICIPIO, POP_COLETADA, POP_IMPUTADA, POP_TOTAL) values ('PR', '41', '15200', 'Maringá',376530, 33127, 409657);" calcext:value-type="string">
            <text:p>insert into IBGE_MUNICIPIOS (UF, COD_UF, CODIGO_MUNICIPIO, NOME_MUNICIPIO, POP_COLETADA, POP_IMPUTADA, POP_TOTAL) values ('PR', '41', '15200', 'Maringá',376530, 33127, 409657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15309" calcext:value-type="float">
            <text:p>15309</text:p>
          </table:table-cell>
          <table:table-cell office:value-type="string" calcext:value-type="string">
            <text:p>Mariópolis</text:p>
          </table:table-cell>
          <table:table-cell office:value-type="float" office:value="6214" calcext:value-type="float">
            <text:p>6214</text:p>
          </table:table-cell>
          <table:table-cell office:value-type="float" office:value="157" calcext:value-type="float">
            <text:p>157</text:p>
          </table:table-cell>
          <table:table-cell office:value-type="float" office:value="6371" calcext:value-type="float">
            <text:p>6371</text:p>
          </table:table-cell>
          <table:table-cell table:formula="of:=CONCATENATE(&quot;insert into IBGE_MUNICIPIOS (UF, COD_UF, CODIGO_MUNICIPIO, NOME_MUNICIPIO, POP_COLETADA, POP_IMPUTADA, POP_TOTAL) values ('&quot;; [.A211]; &quot;', '&quot;; [.B211]; &quot;', '&quot;; [.C211]; &quot;', '&quot;; [.D211]; &quot;',&quot;; [.E211]; &quot;, &quot;; [.F211]; &quot;, &quot;; [.G211]; &quot;);&quot;)" office:value-type="string" office:string-value="insert into IBGE_MUNICIPIOS (UF, COD_UF, CODIGO_MUNICIPIO, NOME_MUNICIPIO, POP_COLETADA, POP_IMPUTADA, POP_TOTAL) values ('PR', '41', '15309', 'Mariópolis',6214, 157, 6371);" calcext:value-type="string">
            <text:p>insert into IBGE_MUNICIPIOS (UF, COD_UF, CODIGO_MUNICIPIO, NOME_MUNICIPIO, POP_COLETADA, POP_IMPUTADA, POP_TOTAL) values ('PR', '41', '15309', 'Mariópolis',6214, 157, 6371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15358" calcext:value-type="float">
            <text:p>15358</text:p>
          </table:table-cell>
          <table:table-cell office:value-type="string" calcext:value-type="string">
            <text:p>Maripá</text:p>
          </table:table-cell>
          <table:table-cell office:value-type="float" office:value="6263" calcext:value-type="float">
            <text:p>6263</text:p>
          </table:table-cell>
          <table:table-cell office:value-type="float" office:value="292" calcext:value-type="float">
            <text:p>292</text:p>
          </table:table-cell>
          <table:table-cell office:value-type="float" office:value="6555" calcext:value-type="float">
            <text:p>6555</text:p>
          </table:table-cell>
          <table:table-cell table:formula="of:=CONCATENATE(&quot;insert into IBGE_MUNICIPIOS (UF, COD_UF, CODIGO_MUNICIPIO, NOME_MUNICIPIO, POP_COLETADA, POP_IMPUTADA, POP_TOTAL) values ('&quot;; [.A212]; &quot;', '&quot;; [.B212]; &quot;', '&quot;; [.C212]; &quot;', '&quot;; [.D212]; &quot;',&quot;; [.E212]; &quot;, &quot;; [.F212]; &quot;, &quot;; [.G212]; &quot;);&quot;)" office:value-type="string" office:string-value="insert into IBGE_MUNICIPIOS (UF, COD_UF, CODIGO_MUNICIPIO, NOME_MUNICIPIO, POP_COLETADA, POP_IMPUTADA, POP_TOTAL) values ('PR', '41', '15358', 'Maripá',6263, 292, 6555);" calcext:value-type="string">
            <text:p>insert into IBGE_MUNICIPIOS (UF, COD_UF, CODIGO_MUNICIPIO, NOME_MUNICIPIO, POP_COLETADA, POP_IMPUTADA, POP_TOTAL) values ('PR', '41', '15358', 'Maripá',6263, 292, 6555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15408" calcext:value-type="float">
            <text:p>15408</text:p>
          </table:table-cell>
          <table:table-cell office:value-type="string" calcext:value-type="string">
            <text:p>Marmeleiro</text:p>
          </table:table-cell>
          <table:table-cell office:value-type="float" office:value="15792" calcext:value-type="float">
            <text:p>15792</text:p>
          </table:table-cell>
          <table:table-cell office:value-type="float" office:value="109" calcext:value-type="float">
            <text:p>109</text:p>
          </table:table-cell>
          <table:table-cell office:value-type="float" office:value="15901" calcext:value-type="float">
            <text:p>15901</text:p>
          </table:table-cell>
          <table:table-cell table:formula="of:=CONCATENATE(&quot;insert into IBGE_MUNICIPIOS (UF, COD_UF, CODIGO_MUNICIPIO, NOME_MUNICIPIO, POP_COLETADA, POP_IMPUTADA, POP_TOTAL) values ('&quot;; [.A213]; &quot;', '&quot;; [.B213]; &quot;', '&quot;; [.C213]; &quot;', '&quot;; [.D213]; &quot;',&quot;; [.E213]; &quot;, &quot;; [.F213]; &quot;, &quot;; [.G213]; &quot;);&quot;)" office:value-type="string" office:string-value="insert into IBGE_MUNICIPIOS (UF, COD_UF, CODIGO_MUNICIPIO, NOME_MUNICIPIO, POP_COLETADA, POP_IMPUTADA, POP_TOTAL) values ('PR', '41', '15408', 'Marmeleiro',15792, 109, 15901);" calcext:value-type="string">
            <text:p>insert into IBGE_MUNICIPIOS (UF, COD_UF, CODIGO_MUNICIPIO, NOME_MUNICIPIO, POP_COLETADA, POP_IMPUTADA, POP_TOTAL) values ('PR', '41', '15408', 'Marmeleiro',15792, 109, 15901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15457" calcext:value-type="float">
            <text:p>15457</text:p>
          </table:table-cell>
          <table:table-cell office:value-type="string" calcext:value-type="string">
            <text:p>Marquinho</text:p>
          </table:table-cell>
          <table:table-cell office:value-type="float" office:value="4499" calcext:value-type="float">
            <text:p>4499</text:p>
          </table:table-cell>
          <table:table-cell office:value-type="float" office:value="5" calcext:value-type="float">
            <text:p>5</text:p>
          </table:table-cell>
          <table:table-cell office:value-type="float" office:value="4504" calcext:value-type="float">
            <text:p>4504</text:p>
          </table:table-cell>
          <table:table-cell table:formula="of:=CONCATENATE(&quot;insert into IBGE_MUNICIPIOS (UF, COD_UF, CODIGO_MUNICIPIO, NOME_MUNICIPIO, POP_COLETADA, POP_IMPUTADA, POP_TOTAL) values ('&quot;; [.A214]; &quot;', '&quot;; [.B214]; &quot;', '&quot;; [.C214]; &quot;', '&quot;; [.D214]; &quot;',&quot;; [.E214]; &quot;, &quot;; [.F214]; &quot;, &quot;; [.G214]; &quot;);&quot;)" office:value-type="string" office:string-value="insert into IBGE_MUNICIPIOS (UF, COD_UF, CODIGO_MUNICIPIO, NOME_MUNICIPIO, POP_COLETADA, POP_IMPUTADA, POP_TOTAL) values ('PR', '41', '15457', 'Marquinho',4499, 5, 4504);" calcext:value-type="string">
            <text:p>insert into IBGE_MUNICIPIOS (UF, COD_UF, CODIGO_MUNICIPIO, NOME_MUNICIPIO, POP_COLETADA, POP_IMPUTADA, POP_TOTAL) values ('PR', '41', '15457', 'Marquinho',4499, 5, 4504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15507" calcext:value-type="float">
            <text:p>15507</text:p>
          </table:table-cell>
          <table:table-cell office:value-type="string" calcext:value-type="string">
            <text:p>Marumbi</text:p>
          </table:table-cell>
          <table:table-cell office:value-type="float" office:value="4679" calcext:value-type="float">
            <text:p>4679</text:p>
          </table:table-cell>
          <table:table-cell office:value-type="float" office:value="20" calcext:value-type="float">
            <text:p>20</text:p>
          </table:table-cell>
          <table:table-cell office:value-type="float" office:value="4699" calcext:value-type="float">
            <text:p>4699</text:p>
          </table:table-cell>
          <table:table-cell table:formula="of:=CONCATENATE(&quot;insert into IBGE_MUNICIPIOS (UF, COD_UF, CODIGO_MUNICIPIO, NOME_MUNICIPIO, POP_COLETADA, POP_IMPUTADA, POP_TOTAL) values ('&quot;; [.A215]; &quot;', '&quot;; [.B215]; &quot;', '&quot;; [.C215]; &quot;', '&quot;; [.D215]; &quot;',&quot;; [.E215]; &quot;, &quot;; [.F215]; &quot;, &quot;; [.G215]; &quot;);&quot;)" office:value-type="string" office:string-value="insert into IBGE_MUNICIPIOS (UF, COD_UF, CODIGO_MUNICIPIO, NOME_MUNICIPIO, POP_COLETADA, POP_IMPUTADA, POP_TOTAL) values ('PR', '41', '15507', 'Marumbi',4679, 20, 4699);" calcext:value-type="string">
            <text:p>insert into IBGE_MUNICIPIOS (UF, COD_UF, CODIGO_MUNICIPIO, NOME_MUNICIPIO, POP_COLETADA, POP_IMPUTADA, POP_TOTAL) values ('PR', '41', '15507', 'Marumbi',4679, 20, 4699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15606" calcext:value-type="float">
            <text:p>15606</text:p>
          </table:table-cell>
          <table:table-cell office:value-type="string" calcext:value-type="string">
            <text:p>Matelândia</text:p>
          </table:table-cell>
          <table:table-cell office:value-type="float" office:value="18221" calcext:value-type="float">
            <text:p>18221</text:p>
          </table:table-cell>
          <table:table-cell office:value-type="float" office:value="229" calcext:value-type="float">
            <text:p>229</text:p>
          </table:table-cell>
          <table:table-cell office:value-type="float" office:value="18450" calcext:value-type="float">
            <text:p>18450</text:p>
          </table:table-cell>
          <table:table-cell table:formula="of:=CONCATENATE(&quot;insert into IBGE_MUNICIPIOS (UF, COD_UF, CODIGO_MUNICIPIO, NOME_MUNICIPIO, POP_COLETADA, POP_IMPUTADA, POP_TOTAL) values ('&quot;; [.A216]; &quot;', '&quot;; [.B216]; &quot;', '&quot;; [.C216]; &quot;', '&quot;; [.D216]; &quot;',&quot;; [.E216]; &quot;, &quot;; [.F216]; &quot;, &quot;; [.G216]; &quot;);&quot;)" office:value-type="string" office:string-value="insert into IBGE_MUNICIPIOS (UF, COD_UF, CODIGO_MUNICIPIO, NOME_MUNICIPIO, POP_COLETADA, POP_IMPUTADA, POP_TOTAL) values ('PR', '41', '15606', 'Matelândia',18221, 229, 18450);" calcext:value-type="string">
            <text:p>insert into IBGE_MUNICIPIOS (UF, COD_UF, CODIGO_MUNICIPIO, NOME_MUNICIPIO, POP_COLETADA, POP_IMPUTADA, POP_TOTAL) values ('PR', '41', '15606', 'Matelândia',18221, 229, 18450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15705" calcext:value-type="float">
            <text:p>15705</text:p>
          </table:table-cell>
          <table:table-cell office:value-type="string" calcext:value-type="string">
            <text:p>Matinhos</text:p>
          </table:table-cell>
          <table:table-cell office:value-type="float" office:value="36970" calcext:value-type="float">
            <text:p>36970</text:p>
          </table:table-cell>
          <table:table-cell office:value-type="float" office:value="2289" calcext:value-type="float">
            <text:p>2289</text:p>
          </table:table-cell>
          <table:table-cell office:value-type="float" office:value="39259" calcext:value-type="float">
            <text:p>39259</text:p>
          </table:table-cell>
          <table:table-cell table:formula="of:=CONCATENATE(&quot;insert into IBGE_MUNICIPIOS (UF, COD_UF, CODIGO_MUNICIPIO, NOME_MUNICIPIO, POP_COLETADA, POP_IMPUTADA, POP_TOTAL) values ('&quot;; [.A217]; &quot;', '&quot;; [.B217]; &quot;', '&quot;; [.C217]; &quot;', '&quot;; [.D217]; &quot;',&quot;; [.E217]; &quot;, &quot;; [.F217]; &quot;, &quot;; [.G217]; &quot;);&quot;)" office:value-type="string" office:string-value="insert into IBGE_MUNICIPIOS (UF, COD_UF, CODIGO_MUNICIPIO, NOME_MUNICIPIO, POP_COLETADA, POP_IMPUTADA, POP_TOTAL) values ('PR', '41', '15705', 'Matinhos',36970, 2289, 39259);" calcext:value-type="string">
            <text:p>insert into IBGE_MUNICIPIOS (UF, COD_UF, CODIGO_MUNICIPIO, NOME_MUNICIPIO, POP_COLETADA, POP_IMPUTADA, POP_TOTAL) values ('PR', '41', '15705', 'Matinhos',36970, 2289, 39259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15739" calcext:value-type="float">
            <text:p>15739</text:p>
          </table:table-cell>
          <table:table-cell office:value-type="string" calcext:value-type="string">
            <text:p>Mato Rico</text:p>
          </table:table-cell>
          <table:table-cell office:value-type="float" office:value="3165" calcext:value-type="float">
            <text:p>3165</text:p>
          </table:table-cell>
          <table:table-cell office:value-type="float" office:value="102" calcext:value-type="float">
            <text:p>102</text:p>
          </table:table-cell>
          <table:table-cell office:value-type="float" office:value="3267" calcext:value-type="float">
            <text:p>3267</text:p>
          </table:table-cell>
          <table:table-cell table:formula="of:=CONCATENATE(&quot;insert into IBGE_MUNICIPIOS (UF, COD_UF, CODIGO_MUNICIPIO, NOME_MUNICIPIO, POP_COLETADA, POP_IMPUTADA, POP_TOTAL) values ('&quot;; [.A218]; &quot;', '&quot;; [.B218]; &quot;', '&quot;; [.C218]; &quot;', '&quot;; [.D218]; &quot;',&quot;; [.E218]; &quot;, &quot;; [.F218]; &quot;, &quot;; [.G218]; &quot;);&quot;)" office:value-type="string" office:string-value="insert into IBGE_MUNICIPIOS (UF, COD_UF, CODIGO_MUNICIPIO, NOME_MUNICIPIO, POP_COLETADA, POP_IMPUTADA, POP_TOTAL) values ('PR', '41', '15739', 'Mato Rico',3165, 102, 3267);" calcext:value-type="string">
            <text:p>insert into IBGE_MUNICIPIOS (UF, COD_UF, CODIGO_MUNICIPIO, NOME_MUNICIPIO, POP_COLETADA, POP_IMPUTADA, POP_TOTAL) values ('PR', '41', '15739', 'Mato Rico',3165, 102, 3267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15754" calcext:value-type="float">
            <text:p>15754</text:p>
          </table:table-cell>
          <table:table-cell office:value-type="string" calcext:value-type="string">
            <text:p>Mauá da Serra</text:p>
          </table:table-cell>
          <table:table-cell office:value-type="float" office:value="9055" calcext:value-type="float">
            <text:p>9055</text:p>
          </table:table-cell>
          <table:table-cell office:value-type="float" office:value="328" calcext:value-type="float">
            <text:p>328</text:p>
          </table:table-cell>
          <table:table-cell office:value-type="float" office:value="9383" calcext:value-type="float">
            <text:p>9383</text:p>
          </table:table-cell>
          <table:table-cell table:formula="of:=CONCATENATE(&quot;insert into IBGE_MUNICIPIOS (UF, COD_UF, CODIGO_MUNICIPIO, NOME_MUNICIPIO, POP_COLETADA, POP_IMPUTADA, POP_TOTAL) values ('&quot;; [.A219]; &quot;', '&quot;; [.B219]; &quot;', '&quot;; [.C219]; &quot;', '&quot;; [.D219]; &quot;',&quot;; [.E219]; &quot;, &quot;; [.F219]; &quot;, &quot;; [.G219]; &quot;);&quot;)" office:value-type="string" office:string-value="insert into IBGE_MUNICIPIOS (UF, COD_UF, CODIGO_MUNICIPIO, NOME_MUNICIPIO, POP_COLETADA, POP_IMPUTADA, POP_TOTAL) values ('PR', '41', '15754', 'Mauá da Serra',9055, 328, 9383);" calcext:value-type="string">
            <text:p>insert into IBGE_MUNICIPIOS (UF, COD_UF, CODIGO_MUNICIPIO, NOME_MUNICIPIO, POP_COLETADA, POP_IMPUTADA, POP_TOTAL) values ('PR', '41', '15754', 'Mauá da Serra',9055, 328, 9383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15804" calcext:value-type="float">
            <text:p>15804</text:p>
          </table:table-cell>
          <table:table-cell office:value-type="string" calcext:value-type="string">
            <text:p>Medianeira</text:p>
          </table:table-cell>
          <table:table-cell office:value-type="float" office:value="52020" calcext:value-type="float">
            <text:p>52020</text:p>
          </table:table-cell>
          <table:table-cell office:value-type="float" office:value="2349" calcext:value-type="float">
            <text:p>2349</text:p>
          </table:table-cell>
          <table:table-cell office:value-type="float" office:value="54369" calcext:value-type="float">
            <text:p>54369</text:p>
          </table:table-cell>
          <table:table-cell table:formula="of:=CONCATENATE(&quot;insert into IBGE_MUNICIPIOS (UF, COD_UF, CODIGO_MUNICIPIO, NOME_MUNICIPIO, POP_COLETADA, POP_IMPUTADA, POP_TOTAL) values ('&quot;; [.A220]; &quot;', '&quot;; [.B220]; &quot;', '&quot;; [.C220]; &quot;', '&quot;; [.D220]; &quot;',&quot;; [.E220]; &quot;, &quot;; [.F220]; &quot;, &quot;; [.G220]; &quot;);&quot;)" office:value-type="string" office:string-value="insert into IBGE_MUNICIPIOS (UF, COD_UF, CODIGO_MUNICIPIO, NOME_MUNICIPIO, POP_COLETADA, POP_IMPUTADA, POP_TOTAL) values ('PR', '41', '15804', 'Medianeira',52020, 2349, 54369);" calcext:value-type="string">
            <text:p>insert into IBGE_MUNICIPIOS (UF, COD_UF, CODIGO_MUNICIPIO, NOME_MUNICIPIO, POP_COLETADA, POP_IMPUTADA, POP_TOTAL) values ('PR', '41', '15804', 'Medianeira',52020, 2349, 54369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15853" calcext:value-type="float">
            <text:p>15853</text:p>
          </table:table-cell>
          <table:table-cell office:value-type="string" calcext:value-type="string">
            <text:p>Mercedes</text:p>
          </table:table-cell>
          <table:table-cell office:value-type="float" office:value="5647" calcext:value-type="float">
            <text:p>5647</text:p>
          </table:table-cell>
          <table:table-cell office:value-type="float" office:value="284" calcext:value-type="float">
            <text:p>284</text:p>
          </table:table-cell>
          <table:table-cell office:value-type="float" office:value="5931" calcext:value-type="float">
            <text:p>5931</text:p>
          </table:table-cell>
          <table:table-cell table:formula="of:=CONCATENATE(&quot;insert into IBGE_MUNICIPIOS (UF, COD_UF, CODIGO_MUNICIPIO, NOME_MUNICIPIO, POP_COLETADA, POP_IMPUTADA, POP_TOTAL) values ('&quot;; [.A221]; &quot;', '&quot;; [.B221]; &quot;', '&quot;; [.C221]; &quot;', '&quot;; [.D221]; &quot;',&quot;; [.E221]; &quot;, &quot;; [.F221]; &quot;, &quot;; [.G221]; &quot;);&quot;)" office:value-type="string" office:string-value="insert into IBGE_MUNICIPIOS (UF, COD_UF, CODIGO_MUNICIPIO, NOME_MUNICIPIO, POP_COLETADA, POP_IMPUTADA, POP_TOTAL) values ('PR', '41', '15853', 'Mercedes',5647, 284, 5931);" calcext:value-type="string">
            <text:p>insert into IBGE_MUNICIPIOS (UF, COD_UF, CODIGO_MUNICIPIO, NOME_MUNICIPIO, POP_COLETADA, POP_IMPUTADA, POP_TOTAL) values ('PR', '41', '15853', 'Mercedes',5647, 284, 5931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15903" calcext:value-type="float">
            <text:p>15903</text:p>
          </table:table-cell>
          <table:table-cell office:value-type="string" calcext:value-type="string">
            <text:p>Mirador</text:p>
          </table:table-cell>
          <table:table-cell office:value-type="float" office:value="2238" calcext:value-type="float">
            <text:p>2238</text:p>
          </table:table-cell>
          <table:table-cell office:value-type="float" office:value="0" calcext:value-type="float">
            <text:p>0</text:p>
          </table:table-cell>
          <table:table-cell office:value-type="float" office:value="2238" calcext:value-type="float">
            <text:p>2238</text:p>
          </table:table-cell>
          <table:table-cell table:formula="of:=CONCATENATE(&quot;insert into IBGE_MUNICIPIOS (UF, COD_UF, CODIGO_MUNICIPIO, NOME_MUNICIPIO, POP_COLETADA, POP_IMPUTADA, POP_TOTAL) values ('&quot;; [.A222]; &quot;', '&quot;; [.B222]; &quot;', '&quot;; [.C222]; &quot;', '&quot;; [.D222]; &quot;',&quot;; [.E222]; &quot;, &quot;; [.F222]; &quot;, &quot;; [.G222]; &quot;);&quot;)" office:value-type="string" office:string-value="insert into IBGE_MUNICIPIOS (UF, COD_UF, CODIGO_MUNICIPIO, NOME_MUNICIPIO, POP_COLETADA, POP_IMPUTADA, POP_TOTAL) values ('PR', '41', '15903', 'Mirador',2238, 0, 2238);" calcext:value-type="string">
            <text:p>insert into IBGE_MUNICIPIOS (UF, COD_UF, CODIGO_MUNICIPIO, NOME_MUNICIPIO, POP_COLETADA, POP_IMPUTADA, POP_TOTAL) values ('PR', '41', '15903', 'Mirador',2238, 0, 2238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Miraselva</text:p>
          </table:table-cell>
          <table:table-cell office:value-type="float" office:value="1928" calcext:value-type="float">
            <text:p>1928</text:p>
          </table:table-cell>
          <table:table-cell office:value-type="float" office:value="38" calcext:value-type="float">
            <text:p>38</text:p>
          </table:table-cell>
          <table:table-cell office:value-type="float" office:value="1966" calcext:value-type="float">
            <text:p>1966</text:p>
          </table:table-cell>
          <table:table-cell table:formula="of:=CONCATENATE(&quot;insert into IBGE_MUNICIPIOS (UF, COD_UF, CODIGO_MUNICIPIO, NOME_MUNICIPIO, POP_COLETADA, POP_IMPUTADA, POP_TOTAL) values ('&quot;; [.A223]; &quot;', '&quot;; [.B223]; &quot;', '&quot;; [.C223]; &quot;', '&quot;; [.D223]; &quot;',&quot;; [.E223]; &quot;, &quot;; [.F223]; &quot;, &quot;; [.G223]; &quot;);&quot;)" office:value-type="string" office:string-value="insert into IBGE_MUNICIPIOS (UF, COD_UF, CODIGO_MUNICIPIO, NOME_MUNICIPIO, POP_COLETADA, POP_IMPUTADA, POP_TOTAL) values ('PR', '41', '16000', 'Miraselva',1928, 38, 1966);" calcext:value-type="string">
            <text:p>insert into IBGE_MUNICIPIOS (UF, COD_UF, CODIGO_MUNICIPIO, NOME_MUNICIPIO, POP_COLETADA, POP_IMPUTADA, POP_TOTAL) values ('PR', '41', '16000', 'Miraselva',1928, 38, 1966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16059" calcext:value-type="float">
            <text:p>16059</text:p>
          </table:table-cell>
          <table:table-cell office:value-type="string" calcext:value-type="string">
            <text:p>Missal</text:p>
          </table:table-cell>
          <table:table-cell office:value-type="float" office:value="10451" calcext:value-type="float">
            <text:p>10451</text:p>
          </table:table-cell>
          <table:table-cell office:value-type="float" office:value="613" calcext:value-type="float">
            <text:p>613</text:p>
          </table:table-cell>
          <table:table-cell office:value-type="float" office:value="11064" calcext:value-type="float">
            <text:p>11064</text:p>
          </table:table-cell>
          <table:table-cell table:formula="of:=CONCATENATE(&quot;insert into IBGE_MUNICIPIOS (UF, COD_UF, CODIGO_MUNICIPIO, NOME_MUNICIPIO, POP_COLETADA, POP_IMPUTADA, POP_TOTAL) values ('&quot;; [.A224]; &quot;', '&quot;; [.B224]; &quot;', '&quot;; [.C224]; &quot;', '&quot;; [.D224]; &quot;',&quot;; [.E224]; &quot;, &quot;; [.F224]; &quot;, &quot;; [.G224]; &quot;);&quot;)" office:value-type="string" office:string-value="insert into IBGE_MUNICIPIOS (UF, COD_UF, CODIGO_MUNICIPIO, NOME_MUNICIPIO, POP_COLETADA, POP_IMPUTADA, POP_TOTAL) values ('PR', '41', '16059', 'Missal',10451, 613, 11064);" calcext:value-type="string">
            <text:p>insert into IBGE_MUNICIPIOS (UF, COD_UF, CODIGO_MUNICIPIO, NOME_MUNICIPIO, POP_COLETADA, POP_IMPUTADA, POP_TOTAL) values ('PR', '41', '16059', 'Missal',10451, 613, 11064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16109" calcext:value-type="float">
            <text:p>16109</text:p>
          </table:table-cell>
          <table:table-cell office:value-type="string" calcext:value-type="string">
            <text:p>Moreira Sales</text:p>
          </table:table-cell>
          <table:table-cell office:value-type="float" office:value="11020" calcext:value-type="float">
            <text:p>11020</text:p>
          </table:table-cell>
          <table:table-cell office:value-type="float" office:value="155" calcext:value-type="float">
            <text:p>155</text:p>
          </table:table-cell>
          <table:table-cell office:value-type="float" office:value="11175" calcext:value-type="float">
            <text:p>11175</text:p>
          </table:table-cell>
          <table:table-cell table:formula="of:=CONCATENATE(&quot;insert into IBGE_MUNICIPIOS (UF, COD_UF, CODIGO_MUNICIPIO, NOME_MUNICIPIO, POP_COLETADA, POP_IMPUTADA, POP_TOTAL) values ('&quot;; [.A225]; &quot;', '&quot;; [.B225]; &quot;', '&quot;; [.C225]; &quot;', '&quot;; [.D225]; &quot;',&quot;; [.E225]; &quot;, &quot;; [.F225]; &quot;, &quot;; [.G225]; &quot;);&quot;)" office:value-type="string" office:string-value="insert into IBGE_MUNICIPIOS (UF, COD_UF, CODIGO_MUNICIPIO, NOME_MUNICIPIO, POP_COLETADA, POP_IMPUTADA, POP_TOTAL) values ('PR', '41', '16109', 'Moreira Sales',11020, 155, 11175);" calcext:value-type="string">
            <text:p>insert into IBGE_MUNICIPIOS (UF, COD_UF, CODIGO_MUNICIPIO, NOME_MUNICIPIO, POP_COLETADA, POP_IMPUTADA, POP_TOTAL) values ('PR', '41', '16109', 'Moreira Sales',11020, 155, 11175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16208" calcext:value-type="float">
            <text:p>16208</text:p>
          </table:table-cell>
          <table:table-cell office:value-type="string" calcext:value-type="string">
            <text:p>Morretes</text:p>
          </table:table-cell>
          <table:table-cell office:value-type="float" office:value="17552" calcext:value-type="float">
            <text:p>17552</text:p>
          </table:table-cell>
          <table:table-cell office:value-type="float" office:value="757" calcext:value-type="float">
            <text:p>757</text:p>
          </table:table-cell>
          <table:table-cell office:value-type="float" office:value="18309" calcext:value-type="float">
            <text:p>18309</text:p>
          </table:table-cell>
          <table:table-cell table:formula="of:=CONCATENATE(&quot;insert into IBGE_MUNICIPIOS (UF, COD_UF, CODIGO_MUNICIPIO, NOME_MUNICIPIO, POP_COLETADA, POP_IMPUTADA, POP_TOTAL) values ('&quot;; [.A226]; &quot;', '&quot;; [.B226]; &quot;', '&quot;; [.C226]; &quot;', '&quot;; [.D226]; &quot;',&quot;; [.E226]; &quot;, &quot;; [.F226]; &quot;, &quot;; [.G226]; &quot;);&quot;)" office:value-type="string" office:string-value="insert into IBGE_MUNICIPIOS (UF, COD_UF, CODIGO_MUNICIPIO, NOME_MUNICIPIO, POP_COLETADA, POP_IMPUTADA, POP_TOTAL) values ('PR', '41', '16208', 'Morretes',17552, 757, 18309);" calcext:value-type="string">
            <text:p>insert into IBGE_MUNICIPIOS (UF, COD_UF, CODIGO_MUNICIPIO, NOME_MUNICIPIO, POP_COLETADA, POP_IMPUTADA, POP_TOTAL) values ('PR', '41', '16208', 'Morretes',17552, 757, 18309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16307" calcext:value-type="float">
            <text:p>16307</text:p>
          </table:table-cell>
          <table:table-cell office:value-type="string" calcext:value-type="string">
            <text:p>Munhoz de Melo</text:p>
          </table:table-cell>
          <table:table-cell office:value-type="float" office:value="3951" calcext:value-type="float">
            <text:p>3951</text:p>
          </table:table-cell>
          <table:table-cell office:value-type="float" office:value="0" calcext:value-type="float">
            <text:p>0</text:p>
          </table:table-cell>
          <table:table-cell office:value-type="float" office:value="3951" calcext:value-type="float">
            <text:p>3951</text:p>
          </table:table-cell>
          <table:table-cell table:formula="of:=CONCATENATE(&quot;insert into IBGE_MUNICIPIOS (UF, COD_UF, CODIGO_MUNICIPIO, NOME_MUNICIPIO, POP_COLETADA, POP_IMPUTADA, POP_TOTAL) values ('&quot;; [.A227]; &quot;', '&quot;; [.B227]; &quot;', '&quot;; [.C227]; &quot;', '&quot;; [.D227]; &quot;',&quot;; [.E227]; &quot;, &quot;; [.F227]; &quot;, &quot;; [.G227]; &quot;);&quot;)" office:value-type="string" office:string-value="insert into IBGE_MUNICIPIOS (UF, COD_UF, CODIGO_MUNICIPIO, NOME_MUNICIPIO, POP_COLETADA, POP_IMPUTADA, POP_TOTAL) values ('PR', '41', '16307', 'Munhoz de Melo',3951, 0, 3951);" calcext:value-type="string">
            <text:p>insert into IBGE_MUNICIPIOS (UF, COD_UF, CODIGO_MUNICIPIO, NOME_MUNICIPIO, POP_COLETADA, POP_IMPUTADA, POP_TOTAL) values ('PR', '41', '16307', 'Munhoz de Melo',3951, 0, 3951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16406" calcext:value-type="float">
            <text:p>16406</text:p>
          </table:table-cell>
          <table:table-cell office:value-type="string" calcext:value-type="string">
            <text:p>Nossa Senhora das Graças</text:p>
          </table:table-cell>
          <table:table-cell office:value-type="float" office:value="3657" calcext:value-type="float">
            <text:p>3657</text:p>
          </table:table-cell>
          <table:table-cell office:value-type="float" office:value="12" calcext:value-type="float">
            <text:p>12</text:p>
          </table:table-cell>
          <table:table-cell office:value-type="float" office:value="3669" calcext:value-type="float">
            <text:p>3669</text:p>
          </table:table-cell>
          <table:table-cell table:formula="of:=CONCATENATE(&quot;insert into IBGE_MUNICIPIOS (UF, COD_UF, CODIGO_MUNICIPIO, NOME_MUNICIPIO, POP_COLETADA, POP_IMPUTADA, POP_TOTAL) values ('&quot;; [.A228]; &quot;', '&quot;; [.B228]; &quot;', '&quot;; [.C228]; &quot;', '&quot;; [.D228]; &quot;',&quot;; [.E228]; &quot;, &quot;; [.F228]; &quot;, &quot;; [.G228]; &quot;);&quot;)" office:value-type="string" office:string-value="insert into IBGE_MUNICIPIOS (UF, COD_UF, CODIGO_MUNICIPIO, NOME_MUNICIPIO, POP_COLETADA, POP_IMPUTADA, POP_TOTAL) values ('PR', '41', '16406', 'Nossa Senhora das Graças',3657, 12, 3669);" calcext:value-type="string">
            <text:p>insert into IBGE_MUNICIPIOS (UF, COD_UF, CODIGO_MUNICIPIO, NOME_MUNICIPIO, POP_COLETADA, POP_IMPUTADA, POP_TOTAL) values ('PR', '41', '16406', 'Nossa Senhora das Graças',3657, 12, 3669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16505" calcext:value-type="float">
            <text:p>16505</text:p>
          </table:table-cell>
          <table:table-cell office:value-type="string" calcext:value-type="string">
            <text:p>Nova Aliança do Ivaí</text:p>
          </table:table-cell>
          <table:table-cell office:value-type="float" office:value="1312" calcext:value-type="float">
            <text:p>1312</text:p>
          </table:table-cell>
          <table:table-cell office:value-type="float" office:value="11" calcext:value-type="float">
            <text:p>11</text:p>
          </table:table-cell>
          <table:table-cell office:value-type="float" office:value="1323" calcext:value-type="float">
            <text:p>1323</text:p>
          </table:table-cell>
          <table:table-cell table:formula="of:=CONCATENATE(&quot;insert into IBGE_MUNICIPIOS (UF, COD_UF, CODIGO_MUNICIPIO, NOME_MUNICIPIO, POP_COLETADA, POP_IMPUTADA, POP_TOTAL) values ('&quot;; [.A229]; &quot;', '&quot;; [.B229]; &quot;', '&quot;; [.C229]; &quot;', '&quot;; [.D229]; &quot;',&quot;; [.E229]; &quot;, &quot;; [.F229]; &quot;, &quot;; [.G229]; &quot;);&quot;)" office:value-type="string" office:string-value="insert into IBGE_MUNICIPIOS (UF, COD_UF, CODIGO_MUNICIPIO, NOME_MUNICIPIO, POP_COLETADA, POP_IMPUTADA, POP_TOTAL) values ('PR', '41', '16505', 'Nova Aliança do Ivaí',1312, 11, 1323);" calcext:value-type="string">
            <text:p>insert into IBGE_MUNICIPIOS (UF, COD_UF, CODIGO_MUNICIPIO, NOME_MUNICIPIO, POP_COLETADA, POP_IMPUTADA, POP_TOTAL) values ('PR', '41', '16505', 'Nova Aliança do Ivaí',1312, 11, 1323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16604" calcext:value-type="float">
            <text:p>16604</text:p>
          </table:table-cell>
          <table:table-cell office:value-type="string" calcext:value-type="string">
            <text:p>Nova América da Colina</text:p>
          </table:table-cell>
          <table:table-cell office:value-type="float" office:value="3260" calcext:value-type="float">
            <text:p>3260</text:p>
          </table:table-cell>
          <table:table-cell office:value-type="float" office:value="20" calcext:value-type="float">
            <text:p>20</text:p>
          </table:table-cell>
          <table:table-cell office:value-type="float" office:value="3280" calcext:value-type="float">
            <text:p>3280</text:p>
          </table:table-cell>
          <table:table-cell table:formula="of:=CONCATENATE(&quot;insert into IBGE_MUNICIPIOS (UF, COD_UF, CODIGO_MUNICIPIO, NOME_MUNICIPIO, POP_COLETADA, POP_IMPUTADA, POP_TOTAL) values ('&quot;; [.A230]; &quot;', '&quot;; [.B230]; &quot;', '&quot;; [.C230]; &quot;', '&quot;; [.D230]; &quot;',&quot;; [.E230]; &quot;, &quot;; [.F230]; &quot;, &quot;; [.G230]; &quot;);&quot;)" office:value-type="string" office:string-value="insert into IBGE_MUNICIPIOS (UF, COD_UF, CODIGO_MUNICIPIO, NOME_MUNICIPIO, POP_COLETADA, POP_IMPUTADA, POP_TOTAL) values ('PR', '41', '16604', 'Nova América da Colina',3260, 20, 3280);" calcext:value-type="string">
            <text:p>insert into IBGE_MUNICIPIOS (UF, COD_UF, CODIGO_MUNICIPIO, NOME_MUNICIPIO, POP_COLETADA, POP_IMPUTADA, POP_TOTAL) values ('PR', '41', '16604', 'Nova América da Colina',3260, 20, 3280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16703" calcext:value-type="float">
            <text:p>16703</text:p>
          </table:table-cell>
          <table:table-cell office:value-type="string" calcext:value-type="string">
            <text:p>Nova Aurora</text:p>
          </table:table-cell>
          <table:table-cell office:value-type="float" office:value="13691" calcext:value-type="float">
            <text:p>13691</text:p>
          </table:table-cell>
          <table:table-cell office:value-type="float" office:value="74" calcext:value-type="float">
            <text:p>74</text:p>
          </table:table-cell>
          <table:table-cell office:value-type="float" office:value="13765" calcext:value-type="float">
            <text:p>13765</text:p>
          </table:table-cell>
          <table:table-cell table:formula="of:=CONCATENATE(&quot;insert into IBGE_MUNICIPIOS (UF, COD_UF, CODIGO_MUNICIPIO, NOME_MUNICIPIO, POP_COLETADA, POP_IMPUTADA, POP_TOTAL) values ('&quot;; [.A231]; &quot;', '&quot;; [.B231]; &quot;', '&quot;; [.C231]; &quot;', '&quot;; [.D231]; &quot;',&quot;; [.E231]; &quot;, &quot;; [.F231]; &quot;, &quot;; [.G231]; &quot;);&quot;)" office:value-type="string" office:string-value="insert into IBGE_MUNICIPIOS (UF, COD_UF, CODIGO_MUNICIPIO, NOME_MUNICIPIO, POP_COLETADA, POP_IMPUTADA, POP_TOTAL) values ('PR', '41', '16703', 'Nova Aurora',13691, 74, 13765);" calcext:value-type="string">
            <text:p>insert into IBGE_MUNICIPIOS (UF, COD_UF, CODIGO_MUNICIPIO, NOME_MUNICIPIO, POP_COLETADA, POP_IMPUTADA, POP_TOTAL) values ('PR', '41', '16703', 'Nova Aurora',13691, 74, 13765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16802" calcext:value-type="float">
            <text:p>16802</text:p>
          </table:table-cell>
          <table:table-cell office:value-type="string" calcext:value-type="string">
            <text:p>Nova Cantu</text:p>
          </table:table-cell>
          <table:table-cell office:value-type="float" office:value="6723" calcext:value-type="float">
            <text:p>6723</text:p>
          </table:table-cell>
          <table:table-cell office:value-type="float" office:value="67" calcext:value-type="float">
            <text:p>67</text:p>
          </table:table-cell>
          <table:table-cell office:value-type="float" office:value="6790" calcext:value-type="float">
            <text:p>6790</text:p>
          </table:table-cell>
          <table:table-cell table:formula="of:=CONCATENATE(&quot;insert into IBGE_MUNICIPIOS (UF, COD_UF, CODIGO_MUNICIPIO, NOME_MUNICIPIO, POP_COLETADA, POP_IMPUTADA, POP_TOTAL) values ('&quot;; [.A232]; &quot;', '&quot;; [.B232]; &quot;', '&quot;; [.C232]; &quot;', '&quot;; [.D232]; &quot;',&quot;; [.E232]; &quot;, &quot;; [.F232]; &quot;, &quot;; [.G232]; &quot;);&quot;)" office:value-type="string" office:string-value="insert into IBGE_MUNICIPIOS (UF, COD_UF, CODIGO_MUNICIPIO, NOME_MUNICIPIO, POP_COLETADA, POP_IMPUTADA, POP_TOTAL) values ('PR', '41', '16802', 'Nova Cantu',6723, 67, 6790);" calcext:value-type="string">
            <text:p>insert into IBGE_MUNICIPIOS (UF, COD_UF, CODIGO_MUNICIPIO, NOME_MUNICIPIO, POP_COLETADA, POP_IMPUTADA, POP_TOTAL) values ('PR', '41', '16802', 'Nova Cantu',6723, 67, 6790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16901" calcext:value-type="float">
            <text:p>16901</text:p>
          </table:table-cell>
          <table:table-cell office:value-type="string" calcext:value-type="string">
            <text:p>Nova Esperança</text:p>
          </table:table-cell>
          <table:table-cell office:value-type="float" office:value="25746" calcext:value-type="float">
            <text:p>25746</text:p>
          </table:table-cell>
          <table:table-cell office:value-type="float" office:value="839" calcext:value-type="float">
            <text:p>839</text:p>
          </table:table-cell>
          <table:table-cell office:value-type="float" office:value="26585" calcext:value-type="float">
            <text:p>26585</text:p>
          </table:table-cell>
          <table:table-cell table:formula="of:=CONCATENATE(&quot;insert into IBGE_MUNICIPIOS (UF, COD_UF, CODIGO_MUNICIPIO, NOME_MUNICIPIO, POP_COLETADA, POP_IMPUTADA, POP_TOTAL) values ('&quot;; [.A233]; &quot;', '&quot;; [.B233]; &quot;', '&quot;; [.C233]; &quot;', '&quot;; [.D233]; &quot;',&quot;; [.E233]; &quot;, &quot;; [.F233]; &quot;, &quot;; [.G233]; &quot;);&quot;)" office:value-type="string" office:string-value="insert into IBGE_MUNICIPIOS (UF, COD_UF, CODIGO_MUNICIPIO, NOME_MUNICIPIO, POP_COLETADA, POP_IMPUTADA, POP_TOTAL) values ('PR', '41', '16901', 'Nova Esperança',25746, 839, 26585);" calcext:value-type="string">
            <text:p>insert into IBGE_MUNICIPIOS (UF, COD_UF, CODIGO_MUNICIPIO, NOME_MUNICIPIO, POP_COLETADA, POP_IMPUTADA, POP_TOTAL) values ('PR', '41', '16901', 'Nova Esperança',25746, 839, 26585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16950" calcext:value-type="float">
            <text:p>16950</text:p>
          </table:table-cell>
          <table:table-cell office:value-type="string" calcext:value-type="string">
            <text:p>Nova Esperança do Sudoeste</text:p>
          </table:table-cell>
          <table:table-cell office:value-type="float" office:value="5586" calcext:value-type="float">
            <text:p>5586</text:p>
          </table:table-cell>
          <table:table-cell office:value-type="float" office:value="11" calcext:value-type="float">
            <text:p>11</text:p>
          </table:table-cell>
          <table:table-cell office:value-type="float" office:value="5597" calcext:value-type="float">
            <text:p>5597</text:p>
          </table:table-cell>
          <table:table-cell table:formula="of:=CONCATENATE(&quot;insert into IBGE_MUNICIPIOS (UF, COD_UF, CODIGO_MUNICIPIO, NOME_MUNICIPIO, POP_COLETADA, POP_IMPUTADA, POP_TOTAL) values ('&quot;; [.A234]; &quot;', '&quot;; [.B234]; &quot;', '&quot;; [.C234]; &quot;', '&quot;; [.D234]; &quot;',&quot;; [.E234]; &quot;, &quot;; [.F234]; &quot;, &quot;; [.G234]; &quot;);&quot;)" office:value-type="string" office:string-value="insert into IBGE_MUNICIPIOS (UF, COD_UF, CODIGO_MUNICIPIO, NOME_MUNICIPIO, POP_COLETADA, POP_IMPUTADA, POP_TOTAL) values ('PR', '41', '16950', 'Nova Esperança do Sudoeste',5586, 11, 5597);" calcext:value-type="string">
            <text:p>insert into IBGE_MUNICIPIOS (UF, COD_UF, CODIGO_MUNICIPIO, NOME_MUNICIPIO, POP_COLETADA, POP_IMPUTADA, POP_TOTAL) values ('PR', '41', '16950', 'Nova Esperança do Sudoeste',5586, 11, 5597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17008" calcext:value-type="float">
            <text:p>17008</text:p>
          </table:table-cell>
          <table:table-cell office:value-type="string" calcext:value-type="string">
            <text:p>Nova Fátima</text:p>
          </table:table-cell>
          <table:table-cell office:value-type="float" office:value="7210" calcext:value-type="float">
            <text:p>7210</text:p>
          </table:table-cell>
          <table:table-cell office:value-type="float" office:value="15" calcext:value-type="float">
            <text:p>15</text:p>
          </table:table-cell>
          <table:table-cell office:value-type="float" office:value="7225" calcext:value-type="float">
            <text:p>7225</text:p>
          </table:table-cell>
          <table:table-cell table:formula="of:=CONCATENATE(&quot;insert into IBGE_MUNICIPIOS (UF, COD_UF, CODIGO_MUNICIPIO, NOME_MUNICIPIO, POP_COLETADA, POP_IMPUTADA, POP_TOTAL) values ('&quot;; [.A235]; &quot;', '&quot;; [.B235]; &quot;', '&quot;; [.C235]; &quot;', '&quot;; [.D235]; &quot;',&quot;; [.E235]; &quot;, &quot;; [.F235]; &quot;, &quot;; [.G235]; &quot;);&quot;)" office:value-type="string" office:string-value="insert into IBGE_MUNICIPIOS (UF, COD_UF, CODIGO_MUNICIPIO, NOME_MUNICIPIO, POP_COLETADA, POP_IMPUTADA, POP_TOTAL) values ('PR', '41', '17008', 'Nova Fátima',7210, 15, 7225);" calcext:value-type="string">
            <text:p>insert into IBGE_MUNICIPIOS (UF, COD_UF, CODIGO_MUNICIPIO, NOME_MUNICIPIO, POP_COLETADA, POP_IMPUTADA, POP_TOTAL) values ('PR', '41', '17008', 'Nova Fátima',7210, 15, 7225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17057" calcext:value-type="float">
            <text:p>17057</text:p>
          </table:table-cell>
          <table:table-cell office:value-type="string" calcext:value-type="string">
            <text:p>Nova Laranjeiras</text:p>
          </table:table-cell>
          <table:table-cell office:value-type="float" office:value="12029" calcext:value-type="float">
            <text:p>12029</text:p>
          </table:table-cell>
          <table:table-cell office:value-type="float" office:value="45" calcext:value-type="float">
            <text:p>45</text:p>
          </table:table-cell>
          <table:table-cell office:value-type="float" office:value="12074" calcext:value-type="float">
            <text:p>12074</text:p>
          </table:table-cell>
          <table:table-cell table:formula="of:=CONCATENATE(&quot;insert into IBGE_MUNICIPIOS (UF, COD_UF, CODIGO_MUNICIPIO, NOME_MUNICIPIO, POP_COLETADA, POP_IMPUTADA, POP_TOTAL) values ('&quot;; [.A236]; &quot;', '&quot;; [.B236]; &quot;', '&quot;; [.C236]; &quot;', '&quot;; [.D236]; &quot;',&quot;; [.E236]; &quot;, &quot;; [.F236]; &quot;, &quot;; [.G236]; &quot;);&quot;)" office:value-type="string" office:string-value="insert into IBGE_MUNICIPIOS (UF, COD_UF, CODIGO_MUNICIPIO, NOME_MUNICIPIO, POP_COLETADA, POP_IMPUTADA, POP_TOTAL) values ('PR', '41', '17057', 'Nova Laranjeiras',12029, 45, 12074);" calcext:value-type="string">
            <text:p>insert into IBGE_MUNICIPIOS (UF, COD_UF, CODIGO_MUNICIPIO, NOME_MUNICIPIO, POP_COLETADA, POP_IMPUTADA, POP_TOTAL) values ('PR', '41', '17057', 'Nova Laranjeiras',12029, 45, 12074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17107" calcext:value-type="float">
            <text:p>17107</text:p>
          </table:table-cell>
          <table:table-cell office:value-type="string" calcext:value-type="string">
            <text:p>Nova Londrina</text:p>
          </table:table-cell>
          <table:table-cell office:value-type="float" office:value="12752" calcext:value-type="float">
            <text:p>12752</text:p>
          </table:table-cell>
          <table:table-cell office:value-type="float" office:value="171" calcext:value-type="float">
            <text:p>171</text:p>
          </table:table-cell>
          <table:table-cell office:value-type="float" office:value="12923" calcext:value-type="float">
            <text:p>12923</text:p>
          </table:table-cell>
          <table:table-cell table:formula="of:=CONCATENATE(&quot;insert into IBGE_MUNICIPIOS (UF, COD_UF, CODIGO_MUNICIPIO, NOME_MUNICIPIO, POP_COLETADA, POP_IMPUTADA, POP_TOTAL) values ('&quot;; [.A237]; &quot;', '&quot;; [.B237]; &quot;', '&quot;; [.C237]; &quot;', '&quot;; [.D237]; &quot;',&quot;; [.E237]; &quot;, &quot;; [.F237]; &quot;, &quot;; [.G237]; &quot;);&quot;)" office:value-type="string" office:string-value="insert into IBGE_MUNICIPIOS (UF, COD_UF, CODIGO_MUNICIPIO, NOME_MUNICIPIO, POP_COLETADA, POP_IMPUTADA, POP_TOTAL) values ('PR', '41', '17107', 'Nova Londrina',12752, 171, 12923);" calcext:value-type="string">
            <text:p>insert into IBGE_MUNICIPIOS (UF, COD_UF, CODIGO_MUNICIPIO, NOME_MUNICIPIO, POP_COLETADA, POP_IMPUTADA, POP_TOTAL) values ('PR', '41', '17107', 'Nova Londrina',12752, 171, 12923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17206" calcext:value-type="float">
            <text:p>17206</text:p>
          </table:table-cell>
          <table:table-cell office:value-type="string" calcext:value-type="string">
            <text:p>Nova Olímpia</text:p>
          </table:table-cell>
          <table:table-cell office:value-type="float" office:value="5827" calcext:value-type="float">
            <text:p>5827</text:p>
          </table:table-cell>
          <table:table-cell office:value-type="float" office:value="6" calcext:value-type="float">
            <text:p>6</text:p>
          </table:table-cell>
          <table:table-cell office:value-type="float" office:value="5833" calcext:value-type="float">
            <text:p>5833</text:p>
          </table:table-cell>
          <table:table-cell table:formula="of:=CONCATENATE(&quot;insert into IBGE_MUNICIPIOS (UF, COD_UF, CODIGO_MUNICIPIO, NOME_MUNICIPIO, POP_COLETADA, POP_IMPUTADA, POP_TOTAL) values ('&quot;; [.A238]; &quot;', '&quot;; [.B238]; &quot;', '&quot;; [.C238]; &quot;', '&quot;; [.D238]; &quot;',&quot;; [.E238]; &quot;, &quot;; [.F238]; &quot;, &quot;; [.G238]; &quot;);&quot;)" office:value-type="string" office:string-value="insert into IBGE_MUNICIPIOS (UF, COD_UF, CODIGO_MUNICIPIO, NOME_MUNICIPIO, POP_COLETADA, POP_IMPUTADA, POP_TOTAL) values ('PR', '41', '17206', 'Nova Olímpia',5827, 6, 5833);" calcext:value-type="string">
            <text:p>insert into IBGE_MUNICIPIOS (UF, COD_UF, CODIGO_MUNICIPIO, NOME_MUNICIPIO, POP_COLETADA, POP_IMPUTADA, POP_TOTAL) values ('PR', '41', '17206', 'Nova Olímpia',5827, 6, 5833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17214" calcext:value-type="float">
            <text:p>17214</text:p>
          </table:table-cell>
          <table:table-cell office:value-type="string" calcext:value-type="string">
            <text:p>Nova Santa Bárbara</text:p>
          </table:table-cell>
          <table:table-cell office:value-type="float" office:value="4167" calcext:value-type="float">
            <text:p>4167</text:p>
          </table:table-cell>
          <table:table-cell office:value-type="float" office:value="17" calcext:value-type="float">
            <text:p>17</text:p>
          </table:table-cell>
          <table:table-cell office:value-type="float" office:value="4184" calcext:value-type="float">
            <text:p>4184</text:p>
          </table:table-cell>
          <table:table-cell table:formula="of:=CONCATENATE(&quot;insert into IBGE_MUNICIPIOS (UF, COD_UF, CODIGO_MUNICIPIO, NOME_MUNICIPIO, POP_COLETADA, POP_IMPUTADA, POP_TOTAL) values ('&quot;; [.A239]; &quot;', '&quot;; [.B239]; &quot;', '&quot;; [.C239]; &quot;', '&quot;; [.D239]; &quot;',&quot;; [.E239]; &quot;, &quot;; [.F239]; &quot;, &quot;; [.G239]; &quot;);&quot;)" office:value-type="string" office:string-value="insert into IBGE_MUNICIPIOS (UF, COD_UF, CODIGO_MUNICIPIO, NOME_MUNICIPIO, POP_COLETADA, POP_IMPUTADA, POP_TOTAL) values ('PR', '41', '17214', 'Nova Santa Bárbara',4167, 17, 4184);" calcext:value-type="string">
            <text:p>insert into IBGE_MUNICIPIOS (UF, COD_UF, CODIGO_MUNICIPIO, NOME_MUNICIPIO, POP_COLETADA, POP_IMPUTADA, POP_TOTAL) values ('PR', '41', '17214', 'Nova Santa Bárbara',4167, 17, 4184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17222" calcext:value-type="float">
            <text:p>17222</text:p>
          </table:table-cell>
          <table:table-cell office:value-type="string" calcext:value-type="string">
            <text:p>Nova Santa Rosa</text:p>
          </table:table-cell>
          <table:table-cell office:value-type="float" office:value="8017" calcext:value-type="float">
            <text:p>8017</text:p>
          </table:table-cell>
          <table:table-cell office:value-type="float" office:value="305" calcext:value-type="float">
            <text:p>305</text:p>
          </table:table-cell>
          <table:table-cell office:value-type="float" office:value="8322" calcext:value-type="float">
            <text:p>8322</text:p>
          </table:table-cell>
          <table:table-cell table:formula="of:=CONCATENATE(&quot;insert into IBGE_MUNICIPIOS (UF, COD_UF, CODIGO_MUNICIPIO, NOME_MUNICIPIO, POP_COLETADA, POP_IMPUTADA, POP_TOTAL) values ('&quot;; [.A240]; &quot;', '&quot;; [.B240]; &quot;', '&quot;; [.C240]; &quot;', '&quot;; [.D240]; &quot;',&quot;; [.E240]; &quot;, &quot;; [.F240]; &quot;, &quot;; [.G240]; &quot;);&quot;)" office:value-type="string" office:string-value="insert into IBGE_MUNICIPIOS (UF, COD_UF, CODIGO_MUNICIPIO, NOME_MUNICIPIO, POP_COLETADA, POP_IMPUTADA, POP_TOTAL) values ('PR', '41', '17222', 'Nova Santa Rosa',8017, 305, 8322);" calcext:value-type="string">
            <text:p>insert into IBGE_MUNICIPIOS (UF, COD_UF, CODIGO_MUNICIPIO, NOME_MUNICIPIO, POP_COLETADA, POP_IMPUTADA, POP_TOTAL) values ('PR', '41', '17222', 'Nova Santa Rosa',8017, 305, 8322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17255" calcext:value-type="float">
            <text:p>17255</text:p>
          </table:table-cell>
          <table:table-cell office:value-type="string" calcext:value-type="string">
            <text:p>Nova Prata do Iguaçu</text:p>
          </table:table-cell>
          <table:table-cell office:value-type="float" office:value="12633" calcext:value-type="float">
            <text:p>12633</text:p>
          </table:table-cell>
          <table:table-cell office:value-type="float" office:value="66" calcext:value-type="float">
            <text:p>66</text:p>
          </table:table-cell>
          <table:table-cell office:value-type="float" office:value="12699" calcext:value-type="float">
            <text:p>12699</text:p>
          </table:table-cell>
          <table:table-cell table:formula="of:=CONCATENATE(&quot;insert into IBGE_MUNICIPIOS (UF, COD_UF, CODIGO_MUNICIPIO, NOME_MUNICIPIO, POP_COLETADA, POP_IMPUTADA, POP_TOTAL) values ('&quot;; [.A241]; &quot;', '&quot;; [.B241]; &quot;', '&quot;; [.C241]; &quot;', '&quot;; [.D241]; &quot;',&quot;; [.E241]; &quot;, &quot;; [.F241]; &quot;, &quot;; [.G241]; &quot;);&quot;)" office:value-type="string" office:string-value="insert into IBGE_MUNICIPIOS (UF, COD_UF, CODIGO_MUNICIPIO, NOME_MUNICIPIO, POP_COLETADA, POP_IMPUTADA, POP_TOTAL) values ('PR', '41', '17255', 'Nova Prata do Iguaçu',12633, 66, 12699);" calcext:value-type="string">
            <text:p>insert into IBGE_MUNICIPIOS (UF, COD_UF, CODIGO_MUNICIPIO, NOME_MUNICIPIO, POP_COLETADA, POP_IMPUTADA, POP_TOTAL) values ('PR', '41', '17255', 'Nova Prata do Iguaçu',12633, 66, 12699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17271" calcext:value-type="float">
            <text:p>17271</text:p>
          </table:table-cell>
          <table:table-cell office:value-type="string" calcext:value-type="string">
            <text:p>Nova Tebas</text:p>
          </table:table-cell>
          <table:table-cell office:value-type="float" office:value="6837" calcext:value-type="float">
            <text:p>6837</text:p>
          </table:table-cell>
          <table:table-cell office:value-type="float" office:value="11" calcext:value-type="float">
            <text:p>11</text:p>
          </table:table-cell>
          <table:table-cell office:value-type="float" office:value="6848" calcext:value-type="float">
            <text:p>6848</text:p>
          </table:table-cell>
          <table:table-cell table:formula="of:=CONCATENATE(&quot;insert into IBGE_MUNICIPIOS (UF, COD_UF, CODIGO_MUNICIPIO, NOME_MUNICIPIO, POP_COLETADA, POP_IMPUTADA, POP_TOTAL) values ('&quot;; [.A242]; &quot;', '&quot;; [.B242]; &quot;', '&quot;; [.C242]; &quot;', '&quot;; [.D242]; &quot;',&quot;; [.E242]; &quot;, &quot;; [.F242]; &quot;, &quot;; [.G242]; &quot;);&quot;)" office:value-type="string" office:string-value="insert into IBGE_MUNICIPIOS (UF, COD_UF, CODIGO_MUNICIPIO, NOME_MUNICIPIO, POP_COLETADA, POP_IMPUTADA, POP_TOTAL) values ('PR', '41', '17271', 'Nova Tebas',6837, 11, 6848);" calcext:value-type="string">
            <text:p>insert into IBGE_MUNICIPIOS (UF, COD_UF, CODIGO_MUNICIPIO, NOME_MUNICIPIO, POP_COLETADA, POP_IMPUTADA, POP_TOTAL) values ('PR', '41', '17271', 'Nova Tebas',6837, 11, 6848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17297" calcext:value-type="float">
            <text:p>17297</text:p>
          </table:table-cell>
          <table:table-cell office:value-type="string" calcext:value-type="string">
            <text:p>Novo Itacolomi</text:p>
          </table:table-cell>
          <table:table-cell office:value-type="float" office:value="3104" calcext:value-type="float">
            <text:p>3104</text:p>
          </table:table-cell>
          <table:table-cell office:value-type="float" office:value="21" calcext:value-type="float">
            <text:p>21</text:p>
          </table:table-cell>
          <table:table-cell office:value-type="float" office:value="3125" calcext:value-type="float">
            <text:p>3125</text:p>
          </table:table-cell>
          <table:table-cell table:formula="of:=CONCATENATE(&quot;insert into IBGE_MUNICIPIOS (UF, COD_UF, CODIGO_MUNICIPIO, NOME_MUNICIPIO, POP_COLETADA, POP_IMPUTADA, POP_TOTAL) values ('&quot;; [.A243]; &quot;', '&quot;; [.B243]; &quot;', '&quot;; [.C243]; &quot;', '&quot;; [.D243]; &quot;',&quot;; [.E243]; &quot;, &quot;; [.F243]; &quot;, &quot;; [.G243]; &quot;);&quot;)" office:value-type="string" office:string-value="insert into IBGE_MUNICIPIOS (UF, COD_UF, CODIGO_MUNICIPIO, NOME_MUNICIPIO, POP_COLETADA, POP_IMPUTADA, POP_TOTAL) values ('PR', '41', '17297', 'Novo Itacolomi',3104, 21, 3125);" calcext:value-type="string">
            <text:p>insert into IBGE_MUNICIPIOS (UF, COD_UF, CODIGO_MUNICIPIO, NOME_MUNICIPIO, POP_COLETADA, POP_IMPUTADA, POP_TOTAL) values ('PR', '41', '17297', 'Novo Itacolomi',3104, 21, 3125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17305" calcext:value-type="float">
            <text:p>17305</text:p>
          </table:table-cell>
          <table:table-cell office:value-type="string" calcext:value-type="string">
            <text:p>Ortigueira</text:p>
          </table:table-cell>
          <table:table-cell office:value-type="float" office:value="22066" calcext:value-type="float">
            <text:p>22066</text:p>
          </table:table-cell>
          <table:table-cell office:value-type="float" office:value="2126" calcext:value-type="float">
            <text:p>2126</text:p>
          </table:table-cell>
          <table:table-cell office:value-type="float" office:value="24192" calcext:value-type="float">
            <text:p>24192</text:p>
          </table:table-cell>
          <table:table-cell table:formula="of:=CONCATENATE(&quot;insert into IBGE_MUNICIPIOS (UF, COD_UF, CODIGO_MUNICIPIO, NOME_MUNICIPIO, POP_COLETADA, POP_IMPUTADA, POP_TOTAL) values ('&quot;; [.A244]; &quot;', '&quot;; [.B244]; &quot;', '&quot;; [.C244]; &quot;', '&quot;; [.D244]; &quot;',&quot;; [.E244]; &quot;, &quot;; [.F244]; &quot;, &quot;; [.G244]; &quot;);&quot;)" office:value-type="string" office:string-value="insert into IBGE_MUNICIPIOS (UF, COD_UF, CODIGO_MUNICIPIO, NOME_MUNICIPIO, POP_COLETADA, POP_IMPUTADA, POP_TOTAL) values ('PR', '41', '17305', 'Ortigueira',22066, 2126, 24192);" calcext:value-type="string">
            <text:p>insert into IBGE_MUNICIPIOS (UF, COD_UF, CODIGO_MUNICIPIO, NOME_MUNICIPIO, POP_COLETADA, POP_IMPUTADA, POP_TOTAL) values ('PR', '41', '17305', 'Ortigueira',22066, 2126, 24192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17404" calcext:value-type="float">
            <text:p>17404</text:p>
          </table:table-cell>
          <table:table-cell office:value-type="string" calcext:value-type="string">
            <text:p>Ourizona</text:p>
          </table:table-cell>
          <table:table-cell office:value-type="float" office:value="3093" calcext:value-type="float">
            <text:p>3093</text:p>
          </table:table-cell>
          <table:table-cell office:value-type="float" office:value="94" calcext:value-type="float">
            <text:p>94</text:p>
          </table:table-cell>
          <table:table-cell office:value-type="float" office:value="3187" calcext:value-type="float">
            <text:p>3187</text:p>
          </table:table-cell>
          <table:table-cell table:formula="of:=CONCATENATE(&quot;insert into IBGE_MUNICIPIOS (UF, COD_UF, CODIGO_MUNICIPIO, NOME_MUNICIPIO, POP_COLETADA, POP_IMPUTADA, POP_TOTAL) values ('&quot;; [.A245]; &quot;', '&quot;; [.B245]; &quot;', '&quot;; [.C245]; &quot;', '&quot;; [.D245]; &quot;',&quot;; [.E245]; &quot;, &quot;; [.F245]; &quot;, &quot;; [.G245]; &quot;);&quot;)" office:value-type="string" office:string-value="insert into IBGE_MUNICIPIOS (UF, COD_UF, CODIGO_MUNICIPIO, NOME_MUNICIPIO, POP_COLETADA, POP_IMPUTADA, POP_TOTAL) values ('PR', '41', '17404', 'Ourizona',3093, 94, 3187);" calcext:value-type="string">
            <text:p>insert into IBGE_MUNICIPIOS (UF, COD_UF, CODIGO_MUNICIPIO, NOME_MUNICIPIO, POP_COLETADA, POP_IMPUTADA, POP_TOTAL) values ('PR', '41', '17404', 'Ourizona',3093, 94, 3187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17453" calcext:value-type="float">
            <text:p>17453</text:p>
          </table:table-cell>
          <table:table-cell office:value-type="string" calcext:value-type="string">
            <text:p>Ouro Verde do Oeste</text:p>
          </table:table-cell>
          <table:table-cell office:value-type="float" office:value="6439" calcext:value-type="float">
            <text:p>6439</text:p>
          </table:table-cell>
          <table:table-cell office:value-type="float" office:value="346" calcext:value-type="float">
            <text:p>346</text:p>
          </table:table-cell>
          <table:table-cell office:value-type="float" office:value="6785" calcext:value-type="float">
            <text:p>6785</text:p>
          </table:table-cell>
          <table:table-cell table:formula="of:=CONCATENATE(&quot;insert into IBGE_MUNICIPIOS (UF, COD_UF, CODIGO_MUNICIPIO, NOME_MUNICIPIO, POP_COLETADA, POP_IMPUTADA, POP_TOTAL) values ('&quot;; [.A246]; &quot;', '&quot;; [.B246]; &quot;', '&quot;; [.C246]; &quot;', '&quot;; [.D246]; &quot;',&quot;; [.E246]; &quot;, &quot;; [.F246]; &quot;, &quot;; [.G246]; &quot;);&quot;)" office:value-type="string" office:string-value="insert into IBGE_MUNICIPIOS (UF, COD_UF, CODIGO_MUNICIPIO, NOME_MUNICIPIO, POP_COLETADA, POP_IMPUTADA, POP_TOTAL) values ('PR', '41', '17453', 'Ouro Verde do Oeste',6439, 346, 6785);" calcext:value-type="string">
            <text:p>insert into IBGE_MUNICIPIOS (UF, COD_UF, CODIGO_MUNICIPIO, NOME_MUNICIPIO, POP_COLETADA, POP_IMPUTADA, POP_TOTAL) values ('PR', '41', '17453', 'Ouro Verde do Oeste',6439, 346, 6785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17503" calcext:value-type="float">
            <text:p>17503</text:p>
          </table:table-cell>
          <table:table-cell office:value-type="string" calcext:value-type="string">
            <text:p>Paiçandu</text:p>
          </table:table-cell>
          <table:table-cell office:value-type="float" office:value="43506" calcext:value-type="float">
            <text:p>43506</text:p>
          </table:table-cell>
          <table:table-cell office:value-type="float" office:value="2456" calcext:value-type="float">
            <text:p>2456</text:p>
          </table:table-cell>
          <table:table-cell office:value-type="float" office:value="45962" calcext:value-type="float">
            <text:p>45962</text:p>
          </table:table-cell>
          <table:table-cell table:formula="of:=CONCATENATE(&quot;insert into IBGE_MUNICIPIOS (UF, COD_UF, CODIGO_MUNICIPIO, NOME_MUNICIPIO, POP_COLETADA, POP_IMPUTADA, POP_TOTAL) values ('&quot;; [.A247]; &quot;', '&quot;; [.B247]; &quot;', '&quot;; [.C247]; &quot;', '&quot;; [.D247]; &quot;',&quot;; [.E247]; &quot;, &quot;; [.F247]; &quot;, &quot;; [.G247]; &quot;);&quot;)" office:value-type="string" office:string-value="insert into IBGE_MUNICIPIOS (UF, COD_UF, CODIGO_MUNICIPIO, NOME_MUNICIPIO, POP_COLETADA, POP_IMPUTADA, POP_TOTAL) values ('PR', '41', '17503', 'Paiçandu',43506, 2456, 45962);" calcext:value-type="string">
            <text:p>insert into IBGE_MUNICIPIOS (UF, COD_UF, CODIGO_MUNICIPIO, NOME_MUNICIPIO, POP_COLETADA, POP_IMPUTADA, POP_TOTAL) values ('PR', '41', '17503', 'Paiçandu',43506, 2456, 45962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17602" calcext:value-type="float">
            <text:p>17602</text:p>
          </table:table-cell>
          <table:table-cell office:value-type="string" calcext:value-type="string">
            <text:p>Palmas</text:p>
          </table:table-cell>
          <table:table-cell office:value-type="float" office:value="47970" calcext:value-type="float">
            <text:p>47970</text:p>
          </table:table-cell>
          <table:table-cell office:value-type="float" office:value="277" calcext:value-type="float">
            <text:p>277</text:p>
          </table:table-cell>
          <table:table-cell office:value-type="float" office:value="48247" calcext:value-type="float">
            <text:p>48247</text:p>
          </table:table-cell>
          <table:table-cell table:formula="of:=CONCATENATE(&quot;insert into IBGE_MUNICIPIOS (UF, COD_UF, CODIGO_MUNICIPIO, NOME_MUNICIPIO, POP_COLETADA, POP_IMPUTADA, POP_TOTAL) values ('&quot;; [.A248]; &quot;', '&quot;; [.B248]; &quot;', '&quot;; [.C248]; &quot;', '&quot;; [.D248]; &quot;',&quot;; [.E248]; &quot;, &quot;; [.F248]; &quot;, &quot;; [.G248]; &quot;);&quot;)" office:value-type="string" office:string-value="insert into IBGE_MUNICIPIOS (UF, COD_UF, CODIGO_MUNICIPIO, NOME_MUNICIPIO, POP_COLETADA, POP_IMPUTADA, POP_TOTAL) values ('PR', '41', '17602', 'Palmas',47970, 277, 48247);" calcext:value-type="string">
            <text:p>insert into IBGE_MUNICIPIOS (UF, COD_UF, CODIGO_MUNICIPIO, NOME_MUNICIPIO, POP_COLETADA, POP_IMPUTADA, POP_TOTAL) values ('PR', '41', '17602', 'Palmas',47970, 277, 48247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17701" calcext:value-type="float">
            <text:p>17701</text:p>
          </table:table-cell>
          <table:table-cell office:value-type="string" calcext:value-type="string">
            <text:p>Palmeira</text:p>
          </table:table-cell>
          <table:table-cell office:value-type="float" office:value="31480" calcext:value-type="float">
            <text:p>31480</text:p>
          </table:table-cell>
          <table:table-cell office:value-type="float" office:value="2375" calcext:value-type="float">
            <text:p>2375</text:p>
          </table:table-cell>
          <table:table-cell office:value-type="float" office:value="33855" calcext:value-type="float">
            <text:p>33855</text:p>
          </table:table-cell>
          <table:table-cell table:formula="of:=CONCATENATE(&quot;insert into IBGE_MUNICIPIOS (UF, COD_UF, CODIGO_MUNICIPIO, NOME_MUNICIPIO, POP_COLETADA, POP_IMPUTADA, POP_TOTAL) values ('&quot;; [.A249]; &quot;', '&quot;; [.B249]; &quot;', '&quot;; [.C249]; &quot;', '&quot;; [.D249]; &quot;',&quot;; [.E249]; &quot;, &quot;; [.F249]; &quot;, &quot;; [.G249]; &quot;);&quot;)" office:value-type="string" office:string-value="insert into IBGE_MUNICIPIOS (UF, COD_UF, CODIGO_MUNICIPIO, NOME_MUNICIPIO, POP_COLETADA, POP_IMPUTADA, POP_TOTAL) values ('PR', '41', '17701', 'Palmeira',31480, 2375, 33855);" calcext:value-type="string">
            <text:p>insert into IBGE_MUNICIPIOS (UF, COD_UF, CODIGO_MUNICIPIO, NOME_MUNICIPIO, POP_COLETADA, POP_IMPUTADA, POP_TOTAL) values ('PR', '41', '17701', 'Palmeira',31480, 2375, 33855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17800" calcext:value-type="float">
            <text:p>17800</text:p>
          </table:table-cell>
          <table:table-cell office:value-type="string" calcext:value-type="string">
            <text:p>Palmital</text:p>
          </table:table-cell>
          <table:table-cell office:value-type="float" office:value="12706" calcext:value-type="float">
            <text:p>12706</text:p>
          </table:table-cell>
          <table:table-cell office:value-type="float" office:value="327" calcext:value-type="float">
            <text:p>327</text:p>
          </table:table-cell>
          <table:table-cell office:value-type="float" office:value="13033" calcext:value-type="float">
            <text:p>13033</text:p>
          </table:table-cell>
          <table:table-cell table:formula="of:=CONCATENATE(&quot;insert into IBGE_MUNICIPIOS (UF, COD_UF, CODIGO_MUNICIPIO, NOME_MUNICIPIO, POP_COLETADA, POP_IMPUTADA, POP_TOTAL) values ('&quot;; [.A250]; &quot;', '&quot;; [.B250]; &quot;', '&quot;; [.C250]; &quot;', '&quot;; [.D250]; &quot;',&quot;; [.E250]; &quot;, &quot;; [.F250]; &quot;, &quot;; [.G250]; &quot;);&quot;)" office:value-type="string" office:string-value="insert into IBGE_MUNICIPIOS (UF, COD_UF, CODIGO_MUNICIPIO, NOME_MUNICIPIO, POP_COLETADA, POP_IMPUTADA, POP_TOTAL) values ('PR', '41', '17800', 'Palmital',12706, 327, 13033);" calcext:value-type="string">
            <text:p>insert into IBGE_MUNICIPIOS (UF, COD_UF, CODIGO_MUNICIPIO, NOME_MUNICIPIO, POP_COLETADA, POP_IMPUTADA, POP_TOTAL) values ('PR', '41', '17800', 'Palmital',12706, 327, 13033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17909" calcext:value-type="float">
            <text:p>17909</text:p>
          </table:table-cell>
          <table:table-cell office:value-type="string" calcext:value-type="string">
            <text:p>Palotina</text:p>
          </table:table-cell>
          <table:table-cell office:value-type="float" office:value="33564" calcext:value-type="float">
            <text:p>33564</text:p>
          </table:table-cell>
          <table:table-cell office:value-type="float" office:value="1447" calcext:value-type="float">
            <text:p>1447</text:p>
          </table:table-cell>
          <table:table-cell office:value-type="float" office:value="35011" calcext:value-type="float">
            <text:p>35011</text:p>
          </table:table-cell>
          <table:table-cell table:formula="of:=CONCATENATE(&quot;insert into IBGE_MUNICIPIOS (UF, COD_UF, CODIGO_MUNICIPIO, NOME_MUNICIPIO, POP_COLETADA, POP_IMPUTADA, POP_TOTAL) values ('&quot;; [.A251]; &quot;', '&quot;; [.B251]; &quot;', '&quot;; [.C251]; &quot;', '&quot;; [.D251]; &quot;',&quot;; [.E251]; &quot;, &quot;; [.F251]; &quot;, &quot;; [.G251]; &quot;);&quot;)" office:value-type="string" office:string-value="insert into IBGE_MUNICIPIOS (UF, COD_UF, CODIGO_MUNICIPIO, NOME_MUNICIPIO, POP_COLETADA, POP_IMPUTADA, POP_TOTAL) values ('PR', '41', '17909', 'Palotina',33564, 1447, 35011);" calcext:value-type="string">
            <text:p>insert into IBGE_MUNICIPIOS (UF, COD_UF, CODIGO_MUNICIPIO, NOME_MUNICIPIO, POP_COLETADA, POP_IMPUTADA, POP_TOTAL) values ('PR', '41', '17909', 'Palotina',33564, 1447, 35011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18006" calcext:value-type="float">
            <text:p>18006</text:p>
          </table:table-cell>
          <table:table-cell office:value-type="string" calcext:value-type="string">
            <text:p>Paraíso do Norte</text:p>
          </table:table-cell>
          <table:table-cell office:value-type="float" office:value="13243" calcext:value-type="float">
            <text:p>13243</text:p>
          </table:table-cell>
          <table:table-cell office:value-type="float" office:value="2" calcext:value-type="float">
            <text:p>2</text:p>
          </table:table-cell>
          <table:table-cell office:value-type="float" office:value="13245" calcext:value-type="float">
            <text:p>13245</text:p>
          </table:table-cell>
          <table:table-cell table:formula="of:=CONCATENATE(&quot;insert into IBGE_MUNICIPIOS (UF, COD_UF, CODIGO_MUNICIPIO, NOME_MUNICIPIO, POP_COLETADA, POP_IMPUTADA, POP_TOTAL) values ('&quot;; [.A252]; &quot;', '&quot;; [.B252]; &quot;', '&quot;; [.C252]; &quot;', '&quot;; [.D252]; &quot;',&quot;; [.E252]; &quot;, &quot;; [.F252]; &quot;, &quot;; [.G252]; &quot;);&quot;)" office:value-type="string" office:string-value="insert into IBGE_MUNICIPIOS (UF, COD_UF, CODIGO_MUNICIPIO, NOME_MUNICIPIO, POP_COLETADA, POP_IMPUTADA, POP_TOTAL) values ('PR', '41', '18006', 'Paraíso do Norte',13243, 2, 13245);" calcext:value-type="string">
            <text:p>insert into IBGE_MUNICIPIOS (UF, COD_UF, CODIGO_MUNICIPIO, NOME_MUNICIPIO, POP_COLETADA, POP_IMPUTADA, POP_TOTAL) values ('PR', '41', '18006', 'Paraíso do Norte',13243, 2, 13245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18105" calcext:value-type="float">
            <text:p>18105</text:p>
          </table:table-cell>
          <table:table-cell office:value-type="string" calcext:value-type="string">
            <text:p>Paranacity</text:p>
          </table:table-cell>
          <table:table-cell office:value-type="float" office:value="9544" calcext:value-type="float">
            <text:p>9544</text:p>
          </table:table-cell>
          <table:table-cell office:value-type="float" office:value="13" calcext:value-type="float">
            <text:p>13</text:p>
          </table:table-cell>
          <table:table-cell office:value-type="float" office:value="9557" calcext:value-type="float">
            <text:p>9557</text:p>
          </table:table-cell>
          <table:table-cell table:formula="of:=CONCATENATE(&quot;insert into IBGE_MUNICIPIOS (UF, COD_UF, CODIGO_MUNICIPIO, NOME_MUNICIPIO, POP_COLETADA, POP_IMPUTADA, POP_TOTAL) values ('&quot;; [.A253]; &quot;', '&quot;; [.B253]; &quot;', '&quot;; [.C253]; &quot;', '&quot;; [.D253]; &quot;',&quot;; [.E253]; &quot;, &quot;; [.F253]; &quot;, &quot;; [.G253]; &quot;);&quot;)" office:value-type="string" office:string-value="insert into IBGE_MUNICIPIOS (UF, COD_UF, CODIGO_MUNICIPIO, NOME_MUNICIPIO, POP_COLETADA, POP_IMPUTADA, POP_TOTAL) values ('PR', '41', '18105', 'Paranacity',9544, 13, 9557);" calcext:value-type="string">
            <text:p>insert into IBGE_MUNICIPIOS (UF, COD_UF, CODIGO_MUNICIPIO, NOME_MUNICIPIO, POP_COLETADA, POP_IMPUTADA, POP_TOTAL) values ('PR', '41', '18105', 'Paranacity',9544, 13, 9557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18204" calcext:value-type="float">
            <text:p>18204</text:p>
          </table:table-cell>
          <table:table-cell office:value-type="string" calcext:value-type="string">
            <text:p>Paranaguá</text:p>
          </table:table-cell>
          <table:table-cell office:value-type="float" office:value="135641" calcext:value-type="float">
            <text:p>135641</text:p>
          </table:table-cell>
          <table:table-cell office:value-type="float" office:value="10188" calcext:value-type="float">
            <text:p>10188</text:p>
          </table:table-cell>
          <table:table-cell office:value-type="float" office:value="145829" calcext:value-type="float">
            <text:p>145829</text:p>
          </table:table-cell>
          <table:table-cell table:formula="of:=CONCATENATE(&quot;insert into IBGE_MUNICIPIOS (UF, COD_UF, CODIGO_MUNICIPIO, NOME_MUNICIPIO, POP_COLETADA, POP_IMPUTADA, POP_TOTAL) values ('&quot;; [.A254]; &quot;', '&quot;; [.B254]; &quot;', '&quot;; [.C254]; &quot;', '&quot;; [.D254]; &quot;',&quot;; [.E254]; &quot;, &quot;; [.F254]; &quot;, &quot;; [.G254]; &quot;);&quot;)" office:value-type="string" office:string-value="insert into IBGE_MUNICIPIOS (UF, COD_UF, CODIGO_MUNICIPIO, NOME_MUNICIPIO, POP_COLETADA, POP_IMPUTADA, POP_TOTAL) values ('PR', '41', '18204', 'Paranaguá',135641, 10188, 145829);" calcext:value-type="string">
            <text:p>insert into IBGE_MUNICIPIOS (UF, COD_UF, CODIGO_MUNICIPIO, NOME_MUNICIPIO, POP_COLETADA, POP_IMPUTADA, POP_TOTAL) values ('PR', '41', '18204', 'Paranaguá',135641, 10188, 145829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18303" calcext:value-type="float">
            <text:p>18303</text:p>
          </table:table-cell>
          <table:table-cell office:value-type="string" calcext:value-type="string">
            <text:p>Paranapoema</text:p>
          </table:table-cell>
          <table:table-cell office:value-type="float" office:value="2388" calcext:value-type="float">
            <text:p>2388</text:p>
          </table:table-cell>
          <table:table-cell office:value-type="float" office:value="10" calcext:value-type="float">
            <text:p>10</text:p>
          </table:table-cell>
          <table:table-cell office:value-type="float" office:value="2398" calcext:value-type="float">
            <text:p>2398</text:p>
          </table:table-cell>
          <table:table-cell table:formula="of:=CONCATENATE(&quot;insert into IBGE_MUNICIPIOS (UF, COD_UF, CODIGO_MUNICIPIO, NOME_MUNICIPIO, POP_COLETADA, POP_IMPUTADA, POP_TOTAL) values ('&quot;; [.A255]; &quot;', '&quot;; [.B255]; &quot;', '&quot;; [.C255]; &quot;', '&quot;; [.D255]; &quot;',&quot;; [.E255]; &quot;, &quot;; [.F255]; &quot;, &quot;; [.G255]; &quot;);&quot;)" office:value-type="string" office:string-value="insert into IBGE_MUNICIPIOS (UF, COD_UF, CODIGO_MUNICIPIO, NOME_MUNICIPIO, POP_COLETADA, POP_IMPUTADA, POP_TOTAL) values ('PR', '41', '18303', 'Paranapoema',2388, 10, 2398);" calcext:value-type="string">
            <text:p>insert into IBGE_MUNICIPIOS (UF, COD_UF, CODIGO_MUNICIPIO, NOME_MUNICIPIO, POP_COLETADA, POP_IMPUTADA, POP_TOTAL) values ('PR', '41', '18303', 'Paranapoema',2388, 10, 2398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18402" calcext:value-type="float">
            <text:p>18402</text:p>
          </table:table-cell>
          <table:table-cell office:value-type="string" calcext:value-type="string">
            <text:p>Paranavaí</text:p>
          </table:table-cell>
          <table:table-cell office:value-type="float" office:value="88758" calcext:value-type="float">
            <text:p>88758</text:p>
          </table:table-cell>
          <table:table-cell office:value-type="float" office:value="3243" calcext:value-type="float">
            <text:p>3243</text:p>
          </table:table-cell>
          <table:table-cell office:value-type="float" office:value="92001" calcext:value-type="float">
            <text:p>92001</text:p>
          </table:table-cell>
          <table:table-cell table:formula="of:=CONCATENATE(&quot;insert into IBGE_MUNICIPIOS (UF, COD_UF, CODIGO_MUNICIPIO, NOME_MUNICIPIO, POP_COLETADA, POP_IMPUTADA, POP_TOTAL) values ('&quot;; [.A256]; &quot;', '&quot;; [.B256]; &quot;', '&quot;; [.C256]; &quot;', '&quot;; [.D256]; &quot;',&quot;; [.E256]; &quot;, &quot;; [.F256]; &quot;, &quot;; [.G256]; &quot;);&quot;)" office:value-type="string" office:string-value="insert into IBGE_MUNICIPIOS (UF, COD_UF, CODIGO_MUNICIPIO, NOME_MUNICIPIO, POP_COLETADA, POP_IMPUTADA, POP_TOTAL) values ('PR', '41', '18402', 'Paranavaí',88758, 3243, 92001);" calcext:value-type="string">
            <text:p>insert into IBGE_MUNICIPIOS (UF, COD_UF, CODIGO_MUNICIPIO, NOME_MUNICIPIO, POP_COLETADA, POP_IMPUTADA, POP_TOTAL) values ('PR', '41', '18402', 'Paranavaí',88758, 3243, 92001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18451" calcext:value-type="float">
            <text:p>18451</text:p>
          </table:table-cell>
          <table:table-cell office:value-type="string" calcext:value-type="string">
            <text:p>Pato Bragado</text:p>
          </table:table-cell>
          <table:table-cell office:value-type="float" office:value="5600" calcext:value-type="float">
            <text:p>5600</text:p>
          </table:table-cell>
          <table:table-cell office:value-type="float" office:value="133" calcext:value-type="float">
            <text:p>133</text:p>
          </table:table-cell>
          <table:table-cell office:value-type="float" office:value="5733" calcext:value-type="float">
            <text:p>5733</text:p>
          </table:table-cell>
          <table:table-cell table:formula="of:=CONCATENATE(&quot;insert into IBGE_MUNICIPIOS (UF, COD_UF, CODIGO_MUNICIPIO, NOME_MUNICIPIO, POP_COLETADA, POP_IMPUTADA, POP_TOTAL) values ('&quot;; [.A257]; &quot;', '&quot;; [.B257]; &quot;', '&quot;; [.C257]; &quot;', '&quot;; [.D257]; &quot;',&quot;; [.E257]; &quot;, &quot;; [.F257]; &quot;, &quot;; [.G257]; &quot;);&quot;)" office:value-type="string" office:string-value="insert into IBGE_MUNICIPIOS (UF, COD_UF, CODIGO_MUNICIPIO, NOME_MUNICIPIO, POP_COLETADA, POP_IMPUTADA, POP_TOTAL) values ('PR', '41', '18451', 'Pato Bragado',5600, 133, 5733);" calcext:value-type="string">
            <text:p>insert into IBGE_MUNICIPIOS (UF, COD_UF, CODIGO_MUNICIPIO, NOME_MUNICIPIO, POP_COLETADA, POP_IMPUTADA, POP_TOTAL) values ('PR', '41', '18451', 'Pato Bragado',5600, 133, 5733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18501" calcext:value-type="float">
            <text:p>18501</text:p>
          </table:table-cell>
          <table:table-cell office:value-type="string" calcext:value-type="string">
            <text:p>Pato Branco</text:p>
          </table:table-cell>
          <table:table-cell office:value-type="float" office:value="88095" calcext:value-type="float">
            <text:p>88095</text:p>
          </table:table-cell>
          <table:table-cell office:value-type="float" office:value="3741" calcext:value-type="float">
            <text:p>3741</text:p>
          </table:table-cell>
          <table:table-cell office:value-type="float" office:value="91836" calcext:value-type="float">
            <text:p>91836</text:p>
          </table:table-cell>
          <table:table-cell table:formula="of:=CONCATENATE(&quot;insert into IBGE_MUNICIPIOS (UF, COD_UF, CODIGO_MUNICIPIO, NOME_MUNICIPIO, POP_COLETADA, POP_IMPUTADA, POP_TOTAL) values ('&quot;; [.A258]; &quot;', '&quot;; [.B258]; &quot;', '&quot;; [.C258]; &quot;', '&quot;; [.D258]; &quot;',&quot;; [.E258]; &quot;, &quot;; [.F258]; &quot;, &quot;; [.G258]; &quot;);&quot;)" office:value-type="string" office:string-value="insert into IBGE_MUNICIPIOS (UF, COD_UF, CODIGO_MUNICIPIO, NOME_MUNICIPIO, POP_COLETADA, POP_IMPUTADA, POP_TOTAL) values ('PR', '41', '18501', 'Pato Branco',88095, 3741, 91836);" calcext:value-type="string">
            <text:p>insert into IBGE_MUNICIPIOS (UF, COD_UF, CODIGO_MUNICIPIO, NOME_MUNICIPIO, POP_COLETADA, POP_IMPUTADA, POP_TOTAL) values ('PR', '41', '18501', 'Pato Branco',88095, 3741, 91836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18600" calcext:value-type="float">
            <text:p>18600</text:p>
          </table:table-cell>
          <table:table-cell office:value-type="string" calcext:value-type="string">
            <text:p>Paula Freitas</text:p>
          </table:table-cell>
          <table:table-cell office:value-type="float" office:value="5577" calcext:value-type="float">
            <text:p>5577</text:p>
          </table:table-cell>
          <table:table-cell office:value-type="float" office:value="89" calcext:value-type="float">
            <text:p>89</text:p>
          </table:table-cell>
          <table:table-cell office:value-type="float" office:value="5666" calcext:value-type="float">
            <text:p>5666</text:p>
          </table:table-cell>
          <table:table-cell table:formula="of:=CONCATENATE(&quot;insert into IBGE_MUNICIPIOS (UF, COD_UF, CODIGO_MUNICIPIO, NOME_MUNICIPIO, POP_COLETADA, POP_IMPUTADA, POP_TOTAL) values ('&quot;; [.A259]; &quot;', '&quot;; [.B259]; &quot;', '&quot;; [.C259]; &quot;', '&quot;; [.D259]; &quot;',&quot;; [.E259]; &quot;, &quot;; [.F259]; &quot;, &quot;; [.G259]; &quot;);&quot;)" office:value-type="string" office:string-value="insert into IBGE_MUNICIPIOS (UF, COD_UF, CODIGO_MUNICIPIO, NOME_MUNICIPIO, POP_COLETADA, POP_IMPUTADA, POP_TOTAL) values ('PR', '41', '18600', 'Paula Freitas',5577, 89, 5666);" calcext:value-type="string">
            <text:p>insert into IBGE_MUNICIPIOS (UF, COD_UF, CODIGO_MUNICIPIO, NOME_MUNICIPIO, POP_COLETADA, POP_IMPUTADA, POP_TOTAL) values ('PR', '41', '18600', 'Paula Freitas',5577, 89, 5666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18709" calcext:value-type="float">
            <text:p>18709</text:p>
          </table:table-cell>
          <table:table-cell office:value-type="string" calcext:value-type="string">
            <text:p>Paulo Frontin</text:p>
          </table:table-cell>
          <table:table-cell office:value-type="float" office:value="6211" calcext:value-type="float">
            <text:p>6211</text:p>
          </table:table-cell>
          <table:table-cell office:value-type="float" office:value="132" calcext:value-type="float">
            <text:p>132</text:p>
          </table:table-cell>
          <table:table-cell office:value-type="float" office:value="6343" calcext:value-type="float">
            <text:p>6343</text:p>
          </table:table-cell>
          <table:table-cell table:formula="of:=CONCATENATE(&quot;insert into IBGE_MUNICIPIOS (UF, COD_UF, CODIGO_MUNICIPIO, NOME_MUNICIPIO, POP_COLETADA, POP_IMPUTADA, POP_TOTAL) values ('&quot;; [.A260]; &quot;', '&quot;; [.B260]; &quot;', '&quot;; [.C260]; &quot;', '&quot;; [.D260]; &quot;',&quot;; [.E260]; &quot;, &quot;; [.F260]; &quot;, &quot;; [.G260]; &quot;);&quot;)" office:value-type="string" office:string-value="insert into IBGE_MUNICIPIOS (UF, COD_UF, CODIGO_MUNICIPIO, NOME_MUNICIPIO, POP_COLETADA, POP_IMPUTADA, POP_TOTAL) values ('PR', '41', '18709', 'Paulo Frontin',6211, 132, 6343);" calcext:value-type="string">
            <text:p>insert into IBGE_MUNICIPIOS (UF, COD_UF, CODIGO_MUNICIPIO, NOME_MUNICIPIO, POP_COLETADA, POP_IMPUTADA, POP_TOTAL) values ('PR', '41', '18709', 'Paulo Frontin',6211, 132, 6343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18808" calcext:value-type="float">
            <text:p>18808</text:p>
          </table:table-cell>
          <table:table-cell office:value-type="string" calcext:value-type="string">
            <text:p>Peabiru</text:p>
          </table:table-cell>
          <table:table-cell office:value-type="float" office:value="12884" calcext:value-type="float">
            <text:p>12884</text:p>
          </table:table-cell>
          <table:table-cell office:value-type="float" office:value="462" calcext:value-type="float">
            <text:p>462</text:p>
          </table:table-cell>
          <table:table-cell office:value-type="float" office:value="13346" calcext:value-type="float">
            <text:p>13346</text:p>
          </table:table-cell>
          <table:table-cell table:formula="of:=CONCATENATE(&quot;insert into IBGE_MUNICIPIOS (UF, COD_UF, CODIGO_MUNICIPIO, NOME_MUNICIPIO, POP_COLETADA, POP_IMPUTADA, POP_TOTAL) values ('&quot;; [.A261]; &quot;', '&quot;; [.B261]; &quot;', '&quot;; [.C261]; &quot;', '&quot;; [.D261]; &quot;',&quot;; [.E261]; &quot;, &quot;; [.F261]; &quot;, &quot;; [.G261]; &quot;);&quot;)" office:value-type="string" office:string-value="insert into IBGE_MUNICIPIOS (UF, COD_UF, CODIGO_MUNICIPIO, NOME_MUNICIPIO, POP_COLETADA, POP_IMPUTADA, POP_TOTAL) values ('PR', '41', '18808', 'Peabiru',12884, 462, 13346);" calcext:value-type="string">
            <text:p>insert into IBGE_MUNICIPIOS (UF, COD_UF, CODIGO_MUNICIPIO, NOME_MUNICIPIO, POP_COLETADA, POP_IMPUTADA, POP_TOTAL) values ('PR', '41', '18808', 'Peabiru',12884, 462, 13346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18857" calcext:value-type="float">
            <text:p>18857</text:p>
          </table:table-cell>
          <table:table-cell office:value-type="string" calcext:value-type="string">
            <text:p>Perobal</text:p>
          </table:table-cell>
          <table:table-cell office:value-type="float" office:value="6901" calcext:value-type="float">
            <text:p>6901</text:p>
          </table:table-cell>
          <table:table-cell office:value-type="float" office:value="288" calcext:value-type="float">
            <text:p>288</text:p>
          </table:table-cell>
          <table:table-cell office:value-type="float" office:value="7189" calcext:value-type="float">
            <text:p>7189</text:p>
          </table:table-cell>
          <table:table-cell table:formula="of:=CONCATENATE(&quot;insert into IBGE_MUNICIPIOS (UF, COD_UF, CODIGO_MUNICIPIO, NOME_MUNICIPIO, POP_COLETADA, POP_IMPUTADA, POP_TOTAL) values ('&quot;; [.A262]; &quot;', '&quot;; [.B262]; &quot;', '&quot;; [.C262]; &quot;', '&quot;; [.D262]; &quot;',&quot;; [.E262]; &quot;, &quot;; [.F262]; &quot;, &quot;; [.G262]; &quot;);&quot;)" office:value-type="string" office:string-value="insert into IBGE_MUNICIPIOS (UF, COD_UF, CODIGO_MUNICIPIO, NOME_MUNICIPIO, POP_COLETADA, POP_IMPUTADA, POP_TOTAL) values ('PR', '41', '18857', 'Perobal',6901, 288, 7189);" calcext:value-type="string">
            <text:p>insert into IBGE_MUNICIPIOS (UF, COD_UF, CODIGO_MUNICIPIO, NOME_MUNICIPIO, POP_COLETADA, POP_IMPUTADA, POP_TOTAL) values ('PR', '41', '18857', 'Perobal',6901, 288, 7189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18907" calcext:value-type="float">
            <text:p>18907</text:p>
          </table:table-cell>
          <table:table-cell office:value-type="string" calcext:value-type="string">
            <text:p>Pérola</text:p>
          </table:table-cell>
          <table:table-cell office:value-type="float" office:value="11743" calcext:value-type="float">
            <text:p>11743</text:p>
          </table:table-cell>
          <table:table-cell office:value-type="float" office:value="135" calcext:value-type="float">
            <text:p>135</text:p>
          </table:table-cell>
          <table:table-cell office:value-type="float" office:value="11878" calcext:value-type="float">
            <text:p>11878</text:p>
          </table:table-cell>
          <table:table-cell table:formula="of:=CONCATENATE(&quot;insert into IBGE_MUNICIPIOS (UF, COD_UF, CODIGO_MUNICIPIO, NOME_MUNICIPIO, POP_COLETADA, POP_IMPUTADA, POP_TOTAL) values ('&quot;; [.A263]; &quot;', '&quot;; [.B263]; &quot;', '&quot;; [.C263]; &quot;', '&quot;; [.D263]; &quot;',&quot;; [.E263]; &quot;, &quot;; [.F263]; &quot;, &quot;; [.G263]; &quot;);&quot;)" office:value-type="string" office:string-value="insert into IBGE_MUNICIPIOS (UF, COD_UF, CODIGO_MUNICIPIO, NOME_MUNICIPIO, POP_COLETADA, POP_IMPUTADA, POP_TOTAL) values ('PR', '41', '18907', 'Pérola',11743, 135, 11878);" calcext:value-type="string">
            <text:p>insert into IBGE_MUNICIPIOS (UF, COD_UF, CODIGO_MUNICIPIO, NOME_MUNICIPIO, POP_COLETADA, POP_IMPUTADA, POP_TOTAL) values ('PR', '41', '18907', 'Pérola',11743, 135, 11878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19004" calcext:value-type="float">
            <text:p>19004</text:p>
          </table:table-cell>
          <table:table-cell office:value-type="string" calcext:value-type="string">
            <text:p>Pérola do Oeste</text:p>
          </table:table-cell>
          <table:table-cell office:value-type="float" office:value="6221" calcext:value-type="float">
            <text:p>6221</text:p>
          </table:table-cell>
          <table:table-cell office:value-type="float" office:value="0" calcext:value-type="float">
            <text:p>0</text:p>
          </table:table-cell>
          <table:table-cell office:value-type="float" office:value="6221" calcext:value-type="float">
            <text:p>6221</text:p>
          </table:table-cell>
          <table:table-cell table:formula="of:=CONCATENATE(&quot;insert into IBGE_MUNICIPIOS (UF, COD_UF, CODIGO_MUNICIPIO, NOME_MUNICIPIO, POP_COLETADA, POP_IMPUTADA, POP_TOTAL) values ('&quot;; [.A264]; &quot;', '&quot;; [.B264]; &quot;', '&quot;; [.C264]; &quot;', '&quot;; [.D264]; &quot;',&quot;; [.E264]; &quot;, &quot;; [.F264]; &quot;, &quot;; [.G264]; &quot;);&quot;)" office:value-type="string" office:string-value="insert into IBGE_MUNICIPIOS (UF, COD_UF, CODIGO_MUNICIPIO, NOME_MUNICIPIO, POP_COLETADA, POP_IMPUTADA, POP_TOTAL) values ('PR', '41', '19004', 'Pérola do Oeste',6221, 0, 6221);" calcext:value-type="string">
            <text:p>insert into IBGE_MUNICIPIOS (UF, COD_UF, CODIGO_MUNICIPIO, NOME_MUNICIPIO, POP_COLETADA, POP_IMPUTADA, POP_TOTAL) values ('PR', '41', '19004', 'Pérola do Oeste',6221, 0, 6221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19103" calcext:value-type="float">
            <text:p>19103</text:p>
          </table:table-cell>
          <table:table-cell office:value-type="string" calcext:value-type="string">
            <text:p>Piên</text:p>
          </table:table-cell>
          <table:table-cell office:value-type="float" office:value="13606" calcext:value-type="float">
            <text:p>13606</text:p>
          </table:table-cell>
          <table:table-cell office:value-type="float" office:value="49" calcext:value-type="float">
            <text:p>49</text:p>
          </table:table-cell>
          <table:table-cell office:value-type="float" office:value="13655" calcext:value-type="float">
            <text:p>13655</text:p>
          </table:table-cell>
          <table:table-cell table:formula="of:=CONCATENATE(&quot;insert into IBGE_MUNICIPIOS (UF, COD_UF, CODIGO_MUNICIPIO, NOME_MUNICIPIO, POP_COLETADA, POP_IMPUTADA, POP_TOTAL) values ('&quot;; [.A265]; &quot;', '&quot;; [.B265]; &quot;', '&quot;; [.C265]; &quot;', '&quot;; [.D265]; &quot;',&quot;; [.E265]; &quot;, &quot;; [.F265]; &quot;, &quot;; [.G265]; &quot;);&quot;)" office:value-type="string" office:string-value="insert into IBGE_MUNICIPIOS (UF, COD_UF, CODIGO_MUNICIPIO, NOME_MUNICIPIO, POP_COLETADA, POP_IMPUTADA, POP_TOTAL) values ('PR', '41', '19103', 'Piên',13606, 49, 13655);" calcext:value-type="string">
            <text:p>insert into IBGE_MUNICIPIOS (UF, COD_UF, CODIGO_MUNICIPIO, NOME_MUNICIPIO, POP_COLETADA, POP_IMPUTADA, POP_TOTAL) values ('PR', '41', '19103', 'Piên',13606, 49, 13655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19152" calcext:value-type="float">
            <text:p>19152</text:p>
          </table:table-cell>
          <table:table-cell office:value-type="string" calcext:value-type="string">
            <text:p>Pinhais</text:p>
          </table:table-cell>
          <table:table-cell office:value-type="float" office:value="122765" calcext:value-type="float">
            <text:p>122765</text:p>
          </table:table-cell>
          <table:table-cell office:value-type="float" office:value="4254" calcext:value-type="float">
            <text:p>4254</text:p>
          </table:table-cell>
          <table:table-cell office:value-type="float" office:value="127019" calcext:value-type="float">
            <text:p>127019</text:p>
          </table:table-cell>
          <table:table-cell table:formula="of:=CONCATENATE(&quot;insert into IBGE_MUNICIPIOS (UF, COD_UF, CODIGO_MUNICIPIO, NOME_MUNICIPIO, POP_COLETADA, POP_IMPUTADA, POP_TOTAL) values ('&quot;; [.A266]; &quot;', '&quot;; [.B266]; &quot;', '&quot;; [.C266]; &quot;', '&quot;; [.D266]; &quot;',&quot;; [.E266]; &quot;, &quot;; [.F266]; &quot;, &quot;; [.G266]; &quot;);&quot;)" office:value-type="string" office:string-value="insert into IBGE_MUNICIPIOS (UF, COD_UF, CODIGO_MUNICIPIO, NOME_MUNICIPIO, POP_COLETADA, POP_IMPUTADA, POP_TOTAL) values ('PR', '41', '19152', 'Pinhais',122765, 4254, 127019);" calcext:value-type="string">
            <text:p>insert into IBGE_MUNICIPIOS (UF, COD_UF, CODIGO_MUNICIPIO, NOME_MUNICIPIO, POP_COLETADA, POP_IMPUTADA, POP_TOTAL) values ('PR', '41', '19152', 'Pinhais',122765, 4254, 127019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19202" calcext:value-type="float">
            <text:p>19202</text:p>
          </table:table-cell>
          <table:table-cell office:value-type="string" calcext:value-type="string">
            <text:p>Pinhalão</text:p>
          </table:table-cell>
          <table:table-cell office:value-type="float" office:value="6537" calcext:value-type="float">
            <text:p>6537</text:p>
          </table:table-cell>
          <table:table-cell office:value-type="float" office:value="29" calcext:value-type="float">
            <text:p>29</text:p>
          </table:table-cell>
          <table:table-cell office:value-type="float" office:value="6566" calcext:value-type="float">
            <text:p>6566</text:p>
          </table:table-cell>
          <table:table-cell table:formula="of:=CONCATENATE(&quot;insert into IBGE_MUNICIPIOS (UF, COD_UF, CODIGO_MUNICIPIO, NOME_MUNICIPIO, POP_COLETADA, POP_IMPUTADA, POP_TOTAL) values ('&quot;; [.A267]; &quot;', '&quot;; [.B267]; &quot;', '&quot;; [.C267]; &quot;', '&quot;; [.D267]; &quot;',&quot;; [.E267]; &quot;, &quot;; [.F267]; &quot;, &quot;; [.G267]; &quot;);&quot;)" office:value-type="string" office:string-value="insert into IBGE_MUNICIPIOS (UF, COD_UF, CODIGO_MUNICIPIO, NOME_MUNICIPIO, POP_COLETADA, POP_IMPUTADA, POP_TOTAL) values ('PR', '41', '19202', 'Pinhalão',6537, 29, 6566);" calcext:value-type="string">
            <text:p>insert into IBGE_MUNICIPIOS (UF, COD_UF, CODIGO_MUNICIPIO, NOME_MUNICIPIO, POP_COLETADA, POP_IMPUTADA, POP_TOTAL) values ('PR', '41', '19202', 'Pinhalão',6537, 29, 6566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19251" calcext:value-type="float">
            <text:p>19251</text:p>
          </table:table-cell>
          <table:table-cell office:value-type="string" calcext:value-type="string">
            <text:p>Pinhal de São Bento</text:p>
          </table:table-cell>
          <table:table-cell office:value-type="float" office:value="2759" calcext:value-type="float">
            <text:p>2759</text:p>
          </table:table-cell>
          <table:table-cell office:value-type="float" office:value="2" calcext:value-type="float">
            <text:p>2</text:p>
          </table:table-cell>
          <table:table-cell office:value-type="float" office:value="2761" calcext:value-type="float">
            <text:p>2761</text:p>
          </table:table-cell>
          <table:table-cell table:formula="of:=CONCATENATE(&quot;insert into IBGE_MUNICIPIOS (UF, COD_UF, CODIGO_MUNICIPIO, NOME_MUNICIPIO, POP_COLETADA, POP_IMPUTADA, POP_TOTAL) values ('&quot;; [.A268]; &quot;', '&quot;; [.B268]; &quot;', '&quot;; [.C268]; &quot;', '&quot;; [.D268]; &quot;',&quot;; [.E268]; &quot;, &quot;; [.F268]; &quot;, &quot;; [.G268]; &quot;);&quot;)" office:value-type="string" office:string-value="insert into IBGE_MUNICIPIOS (UF, COD_UF, CODIGO_MUNICIPIO, NOME_MUNICIPIO, POP_COLETADA, POP_IMPUTADA, POP_TOTAL) values ('PR', '41', '19251', 'Pinhal de São Bento',2759, 2, 2761);" calcext:value-type="string">
            <text:p>insert into IBGE_MUNICIPIOS (UF, COD_UF, CODIGO_MUNICIPIO, NOME_MUNICIPIO, POP_COLETADA, POP_IMPUTADA, POP_TOTAL) values ('PR', '41', '19251', 'Pinhal de São Bento',2759, 2, 2761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19301" calcext:value-type="float">
            <text:p>19301</text:p>
          </table:table-cell>
          <table:table-cell office:value-type="string" calcext:value-type="string">
            <text:p>Pinhão</text:p>
          </table:table-cell>
          <table:table-cell office:value-type="float" office:value="29553" calcext:value-type="float">
            <text:p>29553</text:p>
          </table:table-cell>
          <table:table-cell office:value-type="float" office:value="333" calcext:value-type="float">
            <text:p>333</text:p>
          </table:table-cell>
          <table:table-cell office:value-type="float" office:value="29886" calcext:value-type="float">
            <text:p>29886</text:p>
          </table:table-cell>
          <table:table-cell table:formula="of:=CONCATENATE(&quot;insert into IBGE_MUNICIPIOS (UF, COD_UF, CODIGO_MUNICIPIO, NOME_MUNICIPIO, POP_COLETADA, POP_IMPUTADA, POP_TOTAL) values ('&quot;; [.A269]; &quot;', '&quot;; [.B269]; &quot;', '&quot;; [.C269]; &quot;', '&quot;; [.D269]; &quot;',&quot;; [.E269]; &quot;, &quot;; [.F269]; &quot;, &quot;; [.G269]; &quot;);&quot;)" office:value-type="string" office:string-value="insert into IBGE_MUNICIPIOS (UF, COD_UF, CODIGO_MUNICIPIO, NOME_MUNICIPIO, POP_COLETADA, POP_IMPUTADA, POP_TOTAL) values ('PR', '41', '19301', 'Pinhão',29553, 333, 29886);" calcext:value-type="string">
            <text:p>insert into IBGE_MUNICIPIOS (UF, COD_UF, CODIGO_MUNICIPIO, NOME_MUNICIPIO, POP_COLETADA, POP_IMPUTADA, POP_TOTAL) values ('PR', '41', '19301', 'Pinhão',29553, 333, 29886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19400" calcext:value-type="float">
            <text:p>19400</text:p>
          </table:table-cell>
          <table:table-cell office:value-type="string" calcext:value-type="string">
            <text:p>Piraí do Sul</text:p>
          </table:table-cell>
          <table:table-cell office:value-type="float" office:value="23540" calcext:value-type="float">
            <text:p>23540</text:p>
          </table:table-cell>
          <table:table-cell office:value-type="float" office:value="111" calcext:value-type="float">
            <text:p>111</text:p>
          </table:table-cell>
          <table:table-cell office:value-type="float" office:value="23651" calcext:value-type="float">
            <text:p>23651</text:p>
          </table:table-cell>
          <table:table-cell table:formula="of:=CONCATENATE(&quot;insert into IBGE_MUNICIPIOS (UF, COD_UF, CODIGO_MUNICIPIO, NOME_MUNICIPIO, POP_COLETADA, POP_IMPUTADA, POP_TOTAL) values ('&quot;; [.A270]; &quot;', '&quot;; [.B270]; &quot;', '&quot;; [.C270]; &quot;', '&quot;; [.D270]; &quot;',&quot;; [.E270]; &quot;, &quot;; [.F270]; &quot;, &quot;; [.G270]; &quot;);&quot;)" office:value-type="string" office:string-value="insert into IBGE_MUNICIPIOS (UF, COD_UF, CODIGO_MUNICIPIO, NOME_MUNICIPIO, POP_COLETADA, POP_IMPUTADA, POP_TOTAL) values ('PR', '41', '19400', 'Piraí do Sul',23540, 111, 23651);" calcext:value-type="string">
            <text:p>insert into IBGE_MUNICIPIOS (UF, COD_UF, CODIGO_MUNICIPIO, NOME_MUNICIPIO, POP_COLETADA, POP_IMPUTADA, POP_TOTAL) values ('PR', '41', '19400', 'Piraí do Sul',23540, 111, 23651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19509" calcext:value-type="float">
            <text:p>19509</text:p>
          </table:table-cell>
          <table:table-cell office:value-type="string" calcext:value-type="string">
            <text:p>Piraquara</text:p>
          </table:table-cell>
          <table:table-cell office:value-type="float" office:value="113669" calcext:value-type="float">
            <text:p>113669</text:p>
          </table:table-cell>
          <table:table-cell office:value-type="float" office:value="5061" calcext:value-type="float">
            <text:p>5061</text:p>
          </table:table-cell>
          <table:table-cell office:value-type="float" office:value="118730" calcext:value-type="float">
            <text:p>118730</text:p>
          </table:table-cell>
          <table:table-cell table:formula="of:=CONCATENATE(&quot;insert into IBGE_MUNICIPIOS (UF, COD_UF, CODIGO_MUNICIPIO, NOME_MUNICIPIO, POP_COLETADA, POP_IMPUTADA, POP_TOTAL) values ('&quot;; [.A271]; &quot;', '&quot;; [.B271]; &quot;', '&quot;; [.C271]; &quot;', '&quot;; [.D271]; &quot;',&quot;; [.E271]; &quot;, &quot;; [.F271]; &quot;, &quot;; [.G271]; &quot;);&quot;)" office:value-type="string" office:string-value="insert into IBGE_MUNICIPIOS (UF, COD_UF, CODIGO_MUNICIPIO, NOME_MUNICIPIO, POP_COLETADA, POP_IMPUTADA, POP_TOTAL) values ('PR', '41', '19509', 'Piraquara',113669, 5061, 118730);" calcext:value-type="string">
            <text:p>insert into IBGE_MUNICIPIOS (UF, COD_UF, CODIGO_MUNICIPIO, NOME_MUNICIPIO, POP_COLETADA, POP_IMPUTADA, POP_TOTAL) values ('PR', '41', '19509', 'Piraquara',113669, 5061, 118730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19608" calcext:value-type="float">
            <text:p>19608</text:p>
          </table:table-cell>
          <table:table-cell office:value-type="string" calcext:value-type="string">
            <text:p>Pitanga</text:p>
          </table:table-cell>
          <table:table-cell office:value-type="float" office:value="31880" calcext:value-type="float">
            <text:p>31880</text:p>
          </table:table-cell>
          <table:table-cell office:value-type="float" office:value="1687" calcext:value-type="float">
            <text:p>1687</text:p>
          </table:table-cell>
          <table:table-cell office:value-type="float" office:value="33567" calcext:value-type="float">
            <text:p>33567</text:p>
          </table:table-cell>
          <table:table-cell table:formula="of:=CONCATENATE(&quot;insert into IBGE_MUNICIPIOS (UF, COD_UF, CODIGO_MUNICIPIO, NOME_MUNICIPIO, POP_COLETADA, POP_IMPUTADA, POP_TOTAL) values ('&quot;; [.A272]; &quot;', '&quot;; [.B272]; &quot;', '&quot;; [.C272]; &quot;', '&quot;; [.D272]; &quot;',&quot;; [.E272]; &quot;, &quot;; [.F272]; &quot;, &quot;; [.G272]; &quot;);&quot;)" office:value-type="string" office:string-value="insert into IBGE_MUNICIPIOS (UF, COD_UF, CODIGO_MUNICIPIO, NOME_MUNICIPIO, POP_COLETADA, POP_IMPUTADA, POP_TOTAL) values ('PR', '41', '19608', 'Pitanga',31880, 1687, 33567);" calcext:value-type="string">
            <text:p>insert into IBGE_MUNICIPIOS (UF, COD_UF, CODIGO_MUNICIPIO, NOME_MUNICIPIO, POP_COLETADA, POP_IMPUTADA, POP_TOTAL) values ('PR', '41', '19608', 'Pitanga',31880, 1687, 33567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19657" calcext:value-type="float">
            <text:p>19657</text:p>
          </table:table-cell>
          <table:table-cell office:value-type="string" calcext:value-type="string">
            <text:p>Pitangueiras</text:p>
          </table:table-cell>
          <table:table-cell office:value-type="float" office:value="2948" calcext:value-type="float">
            <text:p>2948</text:p>
          </table:table-cell>
          <table:table-cell office:value-type="float" office:value="98" calcext:value-type="float">
            <text:p>98</text:p>
          </table:table-cell>
          <table:table-cell office:value-type="float" office:value="3046" calcext:value-type="float">
            <text:p>3046</text:p>
          </table:table-cell>
          <table:table-cell table:formula="of:=CONCATENATE(&quot;insert into IBGE_MUNICIPIOS (UF, COD_UF, CODIGO_MUNICIPIO, NOME_MUNICIPIO, POP_COLETADA, POP_IMPUTADA, POP_TOTAL) values ('&quot;; [.A273]; &quot;', '&quot;; [.B273]; &quot;', '&quot;; [.C273]; &quot;', '&quot;; [.D273]; &quot;',&quot;; [.E273]; &quot;, &quot;; [.F273]; &quot;, &quot;; [.G273]; &quot;);&quot;)" office:value-type="string" office:string-value="insert into IBGE_MUNICIPIOS (UF, COD_UF, CODIGO_MUNICIPIO, NOME_MUNICIPIO, POP_COLETADA, POP_IMPUTADA, POP_TOTAL) values ('PR', '41', '19657', 'Pitangueiras',2948, 98, 3046);" calcext:value-type="string">
            <text:p>insert into IBGE_MUNICIPIOS (UF, COD_UF, CODIGO_MUNICIPIO, NOME_MUNICIPIO, POP_COLETADA, POP_IMPUTADA, POP_TOTAL) values ('PR', '41', '19657', 'Pitangueiras',2948, 98, 3046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19707" calcext:value-type="float">
            <text:p>19707</text:p>
          </table:table-cell>
          <table:table-cell office:value-type="string" calcext:value-type="string">
            <text:p>Planaltina do Paraná</text:p>
          </table:table-cell>
          <table:table-cell office:value-type="float" office:value="4025" calcext:value-type="float">
            <text:p>4025</text:p>
          </table:table-cell>
          <table:table-cell office:value-type="float" office:value="45" calcext:value-type="float">
            <text:p>45</text:p>
          </table:table-cell>
          <table:table-cell office:value-type="float" office:value="4070" calcext:value-type="float">
            <text:p>4070</text:p>
          </table:table-cell>
          <table:table-cell table:formula="of:=CONCATENATE(&quot;insert into IBGE_MUNICIPIOS (UF, COD_UF, CODIGO_MUNICIPIO, NOME_MUNICIPIO, POP_COLETADA, POP_IMPUTADA, POP_TOTAL) values ('&quot;; [.A274]; &quot;', '&quot;; [.B274]; &quot;', '&quot;; [.C274]; &quot;', '&quot;; [.D274]; &quot;',&quot;; [.E274]; &quot;, &quot;; [.F274]; &quot;, &quot;; [.G274]; &quot;);&quot;)" office:value-type="string" office:string-value="insert into IBGE_MUNICIPIOS (UF, COD_UF, CODIGO_MUNICIPIO, NOME_MUNICIPIO, POP_COLETADA, POP_IMPUTADA, POP_TOTAL) values ('PR', '41', '19707', 'Planaltina do Paraná',4025, 45, 4070);" calcext:value-type="string">
            <text:p>insert into IBGE_MUNICIPIOS (UF, COD_UF, CODIGO_MUNICIPIO, NOME_MUNICIPIO, POP_COLETADA, POP_IMPUTADA, POP_TOTAL) values ('PR', '41', '19707', 'Planaltina do Paraná',4025, 45, 4070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19806" calcext:value-type="float">
            <text:p>19806</text:p>
          </table:table-cell>
          <table:table-cell office:value-type="string" calcext:value-type="string">
            <text:p>Planalto</text:p>
          </table:table-cell>
          <table:table-cell office:value-type="float" office:value="14369" calcext:value-type="float">
            <text:p>14369</text:p>
          </table:table-cell>
          <table:table-cell office:value-type="float" office:value="5" calcext:value-type="float">
            <text:p>5</text:p>
          </table:table-cell>
          <table:table-cell office:value-type="float" office:value="14374" calcext:value-type="float">
            <text:p>14374</text:p>
          </table:table-cell>
          <table:table-cell table:formula="of:=CONCATENATE(&quot;insert into IBGE_MUNICIPIOS (UF, COD_UF, CODIGO_MUNICIPIO, NOME_MUNICIPIO, POP_COLETADA, POP_IMPUTADA, POP_TOTAL) values ('&quot;; [.A275]; &quot;', '&quot;; [.B275]; &quot;', '&quot;; [.C275]; &quot;', '&quot;; [.D275]; &quot;',&quot;; [.E275]; &quot;, &quot;; [.F275]; &quot;, &quot;; [.G275]; &quot;);&quot;)" office:value-type="string" office:string-value="insert into IBGE_MUNICIPIOS (UF, COD_UF, CODIGO_MUNICIPIO, NOME_MUNICIPIO, POP_COLETADA, POP_IMPUTADA, POP_TOTAL) values ('PR', '41', '19806', 'Planalto',14369, 5, 14374);" calcext:value-type="string">
            <text:p>insert into IBGE_MUNICIPIOS (UF, COD_UF, CODIGO_MUNICIPIO, NOME_MUNICIPIO, POP_COLETADA, POP_IMPUTADA, POP_TOTAL) values ('PR', '41', '19806', 'Planalto',14369, 5, 14374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19905" calcext:value-type="float">
            <text:p>19905</text:p>
          </table:table-cell>
          <table:table-cell office:value-type="string" calcext:value-type="string">
            <text:p>Ponta Grossa</text:p>
          </table:table-cell>
          <table:table-cell office:value-type="float" office:value="339719" calcext:value-type="float">
            <text:p>339719</text:p>
          </table:table-cell>
          <table:table-cell office:value-type="float" office:value="18652" calcext:value-type="float">
            <text:p>18652</text:p>
          </table:table-cell>
          <table:table-cell office:value-type="float" office:value="358371" calcext:value-type="float">
            <text:p>358371</text:p>
          </table:table-cell>
          <table:table-cell table:formula="of:=CONCATENATE(&quot;insert into IBGE_MUNICIPIOS (UF, COD_UF, CODIGO_MUNICIPIO, NOME_MUNICIPIO, POP_COLETADA, POP_IMPUTADA, POP_TOTAL) values ('&quot;; [.A276]; &quot;', '&quot;; [.B276]; &quot;', '&quot;; [.C276]; &quot;', '&quot;; [.D276]; &quot;',&quot;; [.E276]; &quot;, &quot;; [.F276]; &quot;, &quot;; [.G276]; &quot;);&quot;)" office:value-type="string" office:string-value="insert into IBGE_MUNICIPIOS (UF, COD_UF, CODIGO_MUNICIPIO, NOME_MUNICIPIO, POP_COLETADA, POP_IMPUTADA, POP_TOTAL) values ('PR', '41', '19905', 'Ponta Grossa',339719, 18652, 358371);" calcext:value-type="string">
            <text:p>insert into IBGE_MUNICIPIOS (UF, COD_UF, CODIGO_MUNICIPIO, NOME_MUNICIPIO, POP_COLETADA, POP_IMPUTADA, POP_TOTAL) values ('PR', '41', '19905', 'Ponta Grossa',339719, 18652, 358371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19954" calcext:value-type="float">
            <text:p>19954</text:p>
          </table:table-cell>
          <table:table-cell office:value-type="string" calcext:value-type="string">
            <text:p>Pontal do Paraná</text:p>
          </table:table-cell>
          <table:table-cell office:value-type="float" office:value="29011" calcext:value-type="float">
            <text:p>29011</text:p>
          </table:table-cell>
          <table:table-cell office:value-type="float" office:value="1414" calcext:value-type="float">
            <text:p>1414</text:p>
          </table:table-cell>
          <table:table-cell office:value-type="float" office:value="30425" calcext:value-type="float">
            <text:p>30425</text:p>
          </table:table-cell>
          <table:table-cell table:formula="of:=CONCATENATE(&quot;insert into IBGE_MUNICIPIOS (UF, COD_UF, CODIGO_MUNICIPIO, NOME_MUNICIPIO, POP_COLETADA, POP_IMPUTADA, POP_TOTAL) values ('&quot;; [.A277]; &quot;', '&quot;; [.B277]; &quot;', '&quot;; [.C277]; &quot;', '&quot;; [.D277]; &quot;',&quot;; [.E277]; &quot;, &quot;; [.F277]; &quot;, &quot;; [.G277]; &quot;);&quot;)" office:value-type="string" office:string-value="insert into IBGE_MUNICIPIOS (UF, COD_UF, CODIGO_MUNICIPIO, NOME_MUNICIPIO, POP_COLETADA, POP_IMPUTADA, POP_TOTAL) values ('PR', '41', '19954', 'Pontal do Paraná',29011, 1414, 30425);" calcext:value-type="string">
            <text:p>insert into IBGE_MUNICIPIOS (UF, COD_UF, CODIGO_MUNICIPIO, NOME_MUNICIPIO, POP_COLETADA, POP_IMPUTADA, POP_TOTAL) values ('PR', '41', '19954', 'Pontal do Paraná',29011, 1414, 30425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20002" calcext:value-type="float">
            <text:p>20002</text:p>
          </table:table-cell>
          <table:table-cell office:value-type="string" calcext:value-type="string">
            <text:p>Porecatu</text:p>
          </table:table-cell>
          <table:table-cell office:value-type="float" office:value="11182" calcext:value-type="float">
            <text:p>11182</text:p>
          </table:table-cell>
          <table:table-cell office:value-type="float" office:value="442" calcext:value-type="float">
            <text:p>442</text:p>
          </table:table-cell>
          <table:table-cell office:value-type="float" office:value="11624" calcext:value-type="float">
            <text:p>11624</text:p>
          </table:table-cell>
          <table:table-cell table:formula="of:=CONCATENATE(&quot;insert into IBGE_MUNICIPIOS (UF, COD_UF, CODIGO_MUNICIPIO, NOME_MUNICIPIO, POP_COLETADA, POP_IMPUTADA, POP_TOTAL) values ('&quot;; [.A278]; &quot;', '&quot;; [.B278]; &quot;', '&quot;; [.C278]; &quot;', '&quot;; [.D278]; &quot;',&quot;; [.E278]; &quot;, &quot;; [.F278]; &quot;, &quot;; [.G278]; &quot;);&quot;)" office:value-type="string" office:string-value="insert into IBGE_MUNICIPIOS (UF, COD_UF, CODIGO_MUNICIPIO, NOME_MUNICIPIO, POP_COLETADA, POP_IMPUTADA, POP_TOTAL) values ('PR', '41', '20002', 'Porecatu',11182, 442, 11624);" calcext:value-type="string">
            <text:p>insert into IBGE_MUNICIPIOS (UF, COD_UF, CODIGO_MUNICIPIO, NOME_MUNICIPIO, POP_COLETADA, POP_IMPUTADA, POP_TOTAL) values ('PR', '41', '20002', 'Porecatu',11182, 442, 11624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20101" calcext:value-type="float">
            <text:p>20101</text:p>
          </table:table-cell>
          <table:table-cell office:value-type="string" calcext:value-type="string">
            <text:p>Porto Amazonas</text:p>
          </table:table-cell>
          <table:table-cell office:value-type="float" office:value="3969" calcext:value-type="float">
            <text:p>3969</text:p>
          </table:table-cell>
          <table:table-cell office:value-type="float" office:value="129" calcext:value-type="float">
            <text:p>129</text:p>
          </table:table-cell>
          <table:table-cell office:value-type="float" office:value="4098" calcext:value-type="float">
            <text:p>4098</text:p>
          </table:table-cell>
          <table:table-cell table:formula="of:=CONCATENATE(&quot;insert into IBGE_MUNICIPIOS (UF, COD_UF, CODIGO_MUNICIPIO, NOME_MUNICIPIO, POP_COLETADA, POP_IMPUTADA, POP_TOTAL) values ('&quot;; [.A279]; &quot;', '&quot;; [.B279]; &quot;', '&quot;; [.C279]; &quot;', '&quot;; [.D279]; &quot;',&quot;; [.E279]; &quot;, &quot;; [.F279]; &quot;, &quot;; [.G279]; &quot;);&quot;)" office:value-type="string" office:string-value="insert into IBGE_MUNICIPIOS (UF, COD_UF, CODIGO_MUNICIPIO, NOME_MUNICIPIO, POP_COLETADA, POP_IMPUTADA, POP_TOTAL) values ('PR', '41', '20101', 'Porto Amazonas',3969, 129, 4098);" calcext:value-type="string">
            <text:p>insert into IBGE_MUNICIPIOS (UF, COD_UF, CODIGO_MUNICIPIO, NOME_MUNICIPIO, POP_COLETADA, POP_IMPUTADA, POP_TOTAL) values ('PR', '41', '20101', 'Porto Amazonas',3969, 129, 4098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20150" calcext:value-type="float">
            <text:p>20150</text:p>
          </table:table-cell>
          <table:table-cell office:value-type="string" calcext:value-type="string">
            <text:p>Porto Barreiro</text:p>
          </table:table-cell>
          <table:table-cell office:value-type="float" office:value="3108" calcext:value-type="float">
            <text:p>3108</text:p>
          </table:table-cell>
          <table:table-cell office:value-type="float" office:value="2" calcext:value-type="float">
            <text:p>2</text:p>
          </table:table-cell>
          <table:table-cell office:value-type="float" office:value="3110" calcext:value-type="float">
            <text:p>3110</text:p>
          </table:table-cell>
          <table:table-cell table:formula="of:=CONCATENATE(&quot;insert into IBGE_MUNICIPIOS (UF, COD_UF, CODIGO_MUNICIPIO, NOME_MUNICIPIO, POP_COLETADA, POP_IMPUTADA, POP_TOTAL) values ('&quot;; [.A280]; &quot;', '&quot;; [.B280]; &quot;', '&quot;; [.C280]; &quot;', '&quot;; [.D280]; &quot;',&quot;; [.E280]; &quot;, &quot;; [.F280]; &quot;, &quot;; [.G280]; &quot;);&quot;)" office:value-type="string" office:string-value="insert into IBGE_MUNICIPIOS (UF, COD_UF, CODIGO_MUNICIPIO, NOME_MUNICIPIO, POP_COLETADA, POP_IMPUTADA, POP_TOTAL) values ('PR', '41', '20150', 'Porto Barreiro',3108, 2, 3110);" calcext:value-type="string">
            <text:p>insert into IBGE_MUNICIPIOS (UF, COD_UF, CODIGO_MUNICIPIO, NOME_MUNICIPIO, POP_COLETADA, POP_IMPUTADA, POP_TOTAL) values ('PR', '41', '20150', 'Porto Barreiro',3108, 2, 3110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20200" calcext:value-type="float">
            <text:p>20200</text:p>
          </table:table-cell>
          <table:table-cell office:value-type="string" calcext:value-type="string">
            <text:p>Porto Rico</text:p>
          </table:table-cell>
          <table:table-cell office:value-type="float" office:value="3042" calcext:value-type="float">
            <text:p>3042</text:p>
          </table:table-cell>
          <table:table-cell office:value-type="float" office:value="140" calcext:value-type="float">
            <text:p>140</text:p>
          </table:table-cell>
          <table:table-cell office:value-type="float" office:value="3182" calcext:value-type="float">
            <text:p>3182</text:p>
          </table:table-cell>
          <table:table-cell table:formula="of:=CONCATENATE(&quot;insert into IBGE_MUNICIPIOS (UF, COD_UF, CODIGO_MUNICIPIO, NOME_MUNICIPIO, POP_COLETADA, POP_IMPUTADA, POP_TOTAL) values ('&quot;; [.A281]; &quot;', '&quot;; [.B281]; &quot;', '&quot;; [.C281]; &quot;', '&quot;; [.D281]; &quot;',&quot;; [.E281]; &quot;, &quot;; [.F281]; &quot;, &quot;; [.G281]; &quot;);&quot;)" office:value-type="string" office:string-value="insert into IBGE_MUNICIPIOS (UF, COD_UF, CODIGO_MUNICIPIO, NOME_MUNICIPIO, POP_COLETADA, POP_IMPUTADA, POP_TOTAL) values ('PR', '41', '20200', 'Porto Rico',3042, 140, 3182);" calcext:value-type="string">
            <text:p>insert into IBGE_MUNICIPIOS (UF, COD_UF, CODIGO_MUNICIPIO, NOME_MUNICIPIO, POP_COLETADA, POP_IMPUTADA, POP_TOTAL) values ('PR', '41', '20200', 'Porto Rico',3042, 140, 3182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20309" calcext:value-type="float">
            <text:p>20309</text:p>
          </table:table-cell>
          <table:table-cell office:value-type="string" calcext:value-type="string">
            <text:p>Porto Vitória</text:p>
          </table:table-cell>
          <table:table-cell office:value-type="float" office:value="3516" calcext:value-type="float">
            <text:p>3516</text:p>
          </table:table-cell>
          <table:table-cell office:value-type="float" office:value="46" calcext:value-type="float">
            <text:p>46</text:p>
          </table:table-cell>
          <table:table-cell office:value-type="float" office:value="3562" calcext:value-type="float">
            <text:p>3562</text:p>
          </table:table-cell>
          <table:table-cell table:formula="of:=CONCATENATE(&quot;insert into IBGE_MUNICIPIOS (UF, COD_UF, CODIGO_MUNICIPIO, NOME_MUNICIPIO, POP_COLETADA, POP_IMPUTADA, POP_TOTAL) values ('&quot;; [.A282]; &quot;', '&quot;; [.B282]; &quot;', '&quot;; [.C282]; &quot;', '&quot;; [.D282]; &quot;',&quot;; [.E282]; &quot;, &quot;; [.F282]; &quot;, &quot;; [.G282]; &quot;);&quot;)" office:value-type="string" office:string-value="insert into IBGE_MUNICIPIOS (UF, COD_UF, CODIGO_MUNICIPIO, NOME_MUNICIPIO, POP_COLETADA, POP_IMPUTADA, POP_TOTAL) values ('PR', '41', '20309', 'Porto Vitória',3516, 46, 3562);" calcext:value-type="string">
            <text:p>insert into IBGE_MUNICIPIOS (UF, COD_UF, CODIGO_MUNICIPIO, NOME_MUNICIPIO, POP_COLETADA, POP_IMPUTADA, POP_TOTAL) values ('PR', '41', '20309', 'Porto Vitória',3516, 46, 3562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20333" calcext:value-type="float">
            <text:p>20333</text:p>
          </table:table-cell>
          <table:table-cell office:value-type="string" calcext:value-type="string">
            <text:p>Prado Ferreira</text:p>
          </table:table-cell>
          <table:table-cell office:value-type="float" office:value="3628" calcext:value-type="float">
            <text:p>3628</text:p>
          </table:table-cell>
          <table:table-cell office:value-type="float" office:value="81" calcext:value-type="float">
            <text:p>81</text:p>
          </table:table-cell>
          <table:table-cell office:value-type="float" office:value="3709" calcext:value-type="float">
            <text:p>3709</text:p>
          </table:table-cell>
          <table:table-cell table:formula="of:=CONCATENATE(&quot;insert into IBGE_MUNICIPIOS (UF, COD_UF, CODIGO_MUNICIPIO, NOME_MUNICIPIO, POP_COLETADA, POP_IMPUTADA, POP_TOTAL) values ('&quot;; [.A283]; &quot;', '&quot;; [.B283]; &quot;', '&quot;; [.C283]; &quot;', '&quot;; [.D283]; &quot;',&quot;; [.E283]; &quot;, &quot;; [.F283]; &quot;, &quot;; [.G283]; &quot;);&quot;)" office:value-type="string" office:string-value="insert into IBGE_MUNICIPIOS (UF, COD_UF, CODIGO_MUNICIPIO, NOME_MUNICIPIO, POP_COLETADA, POP_IMPUTADA, POP_TOTAL) values ('PR', '41', '20333', 'Prado Ferreira',3628, 81, 3709);" calcext:value-type="string">
            <text:p>insert into IBGE_MUNICIPIOS (UF, COD_UF, CODIGO_MUNICIPIO, NOME_MUNICIPIO, POP_COLETADA, POP_IMPUTADA, POP_TOTAL) values ('PR', '41', '20333', 'Prado Ferreira',3628, 81, 3709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20358" calcext:value-type="float">
            <text:p>20358</text:p>
          </table:table-cell>
          <table:table-cell office:value-type="string" calcext:value-type="string">
            <text:p>Pranchita</text:p>
          </table:table-cell>
          <table:table-cell office:value-type="float" office:value="5674" calcext:value-type="float">
            <text:p>5674</text:p>
          </table:table-cell>
          <table:table-cell office:value-type="float" office:value="63" calcext:value-type="float">
            <text:p>63</text:p>
          </table:table-cell>
          <table:table-cell office:value-type="float" office:value="5737" calcext:value-type="float">
            <text:p>5737</text:p>
          </table:table-cell>
          <table:table-cell table:formula="of:=CONCATENATE(&quot;insert into IBGE_MUNICIPIOS (UF, COD_UF, CODIGO_MUNICIPIO, NOME_MUNICIPIO, POP_COLETADA, POP_IMPUTADA, POP_TOTAL) values ('&quot;; [.A284]; &quot;', '&quot;; [.B284]; &quot;', '&quot;; [.C284]; &quot;', '&quot;; [.D284]; &quot;',&quot;; [.E284]; &quot;, &quot;; [.F284]; &quot;, &quot;; [.G284]; &quot;);&quot;)" office:value-type="string" office:string-value="insert into IBGE_MUNICIPIOS (UF, COD_UF, CODIGO_MUNICIPIO, NOME_MUNICIPIO, POP_COLETADA, POP_IMPUTADA, POP_TOTAL) values ('PR', '41', '20358', 'Pranchita',5674, 63, 5737);" calcext:value-type="string">
            <text:p>insert into IBGE_MUNICIPIOS (UF, COD_UF, CODIGO_MUNICIPIO, NOME_MUNICIPIO, POP_COLETADA, POP_IMPUTADA, POP_TOTAL) values ('PR', '41', '20358', 'Pranchita',5674, 63, 5737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20408" calcext:value-type="float">
            <text:p>20408</text:p>
          </table:table-cell>
          <table:table-cell office:value-type="string" calcext:value-type="string">
            <text:p>Presidente Castelo Branco</text:p>
          </table:table-cell>
          <table:table-cell office:value-type="float" office:value="4236" calcext:value-type="float">
            <text:p>4236</text:p>
          </table:table-cell>
          <table:table-cell office:value-type="float" office:value="100" calcext:value-type="float">
            <text:p>100</text:p>
          </table:table-cell>
          <table:table-cell office:value-type="float" office:value="4336" calcext:value-type="float">
            <text:p>4336</text:p>
          </table:table-cell>
          <table:table-cell table:formula="of:=CONCATENATE(&quot;insert into IBGE_MUNICIPIOS (UF, COD_UF, CODIGO_MUNICIPIO, NOME_MUNICIPIO, POP_COLETADA, POP_IMPUTADA, POP_TOTAL) values ('&quot;; [.A285]; &quot;', '&quot;; [.B285]; &quot;', '&quot;; [.C285]; &quot;', '&quot;; [.D285]; &quot;',&quot;; [.E285]; &quot;, &quot;; [.F285]; &quot;, &quot;; [.G285]; &quot;);&quot;)" office:value-type="string" office:string-value="insert into IBGE_MUNICIPIOS (UF, COD_UF, CODIGO_MUNICIPIO, NOME_MUNICIPIO, POP_COLETADA, POP_IMPUTADA, POP_TOTAL) values ('PR', '41', '20408', 'Presidente Castelo Branco',4236, 100, 4336);" calcext:value-type="string">
            <text:p>insert into IBGE_MUNICIPIOS (UF, COD_UF, CODIGO_MUNICIPIO, NOME_MUNICIPIO, POP_COLETADA, POP_IMPUTADA, POP_TOTAL) values ('PR', '41', '20408', 'Presidente Castelo Branco',4236, 100, 4336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20507" calcext:value-type="float">
            <text:p>20507</text:p>
          </table:table-cell>
          <table:table-cell office:value-type="string" calcext:value-type="string">
            <text:p>Primeiro de Maio</text:p>
          </table:table-cell>
          <table:table-cell office:value-type="float" office:value="9971" calcext:value-type="float">
            <text:p>9971</text:p>
          </table:table-cell>
          <table:table-cell office:value-type="float" office:value="111" calcext:value-type="float">
            <text:p>111</text:p>
          </table:table-cell>
          <table:table-cell office:value-type="float" office:value="10082" calcext:value-type="float">
            <text:p>10082</text:p>
          </table:table-cell>
          <table:table-cell table:formula="of:=CONCATENATE(&quot;insert into IBGE_MUNICIPIOS (UF, COD_UF, CODIGO_MUNICIPIO, NOME_MUNICIPIO, POP_COLETADA, POP_IMPUTADA, POP_TOTAL) values ('&quot;; [.A286]; &quot;', '&quot;; [.B286]; &quot;', '&quot;; [.C286]; &quot;', '&quot;; [.D286]; &quot;',&quot;; [.E286]; &quot;, &quot;; [.F286]; &quot;, &quot;; [.G286]; &quot;);&quot;)" office:value-type="string" office:string-value="insert into IBGE_MUNICIPIOS (UF, COD_UF, CODIGO_MUNICIPIO, NOME_MUNICIPIO, POP_COLETADA, POP_IMPUTADA, POP_TOTAL) values ('PR', '41', '20507', 'Primeiro de Maio',9971, 111, 10082);" calcext:value-type="string">
            <text:p>insert into IBGE_MUNICIPIOS (UF, COD_UF, CODIGO_MUNICIPIO, NOME_MUNICIPIO, POP_COLETADA, POP_IMPUTADA, POP_TOTAL) values ('PR', '41', '20507', 'Primeiro de Maio',9971, 111, 10082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20606" calcext:value-type="float">
            <text:p>20606</text:p>
          </table:table-cell>
          <table:table-cell office:value-type="string" calcext:value-type="string">
            <text:p>Prudentópolis</text:p>
          </table:table-cell>
          <table:table-cell office:value-type="float" office:value="49042" calcext:value-type="float">
            <text:p>49042</text:p>
          </table:table-cell>
          <table:table-cell office:value-type="float" office:value="351" calcext:value-type="float">
            <text:p>351</text:p>
          </table:table-cell>
          <table:table-cell office:value-type="float" office:value="49393" calcext:value-type="float">
            <text:p>49393</text:p>
          </table:table-cell>
          <table:table-cell table:formula="of:=CONCATENATE(&quot;insert into IBGE_MUNICIPIOS (UF, COD_UF, CODIGO_MUNICIPIO, NOME_MUNICIPIO, POP_COLETADA, POP_IMPUTADA, POP_TOTAL) values ('&quot;; [.A287]; &quot;', '&quot;; [.B287]; &quot;', '&quot;; [.C287]; &quot;', '&quot;; [.D287]; &quot;',&quot;; [.E287]; &quot;, &quot;; [.F287]; &quot;, &quot;; [.G287]; &quot;);&quot;)" office:value-type="string" office:string-value="insert into IBGE_MUNICIPIOS (UF, COD_UF, CODIGO_MUNICIPIO, NOME_MUNICIPIO, POP_COLETADA, POP_IMPUTADA, POP_TOTAL) values ('PR', '41', '20606', 'Prudentópolis',49042, 351, 49393);" calcext:value-type="string">
            <text:p>insert into IBGE_MUNICIPIOS (UF, COD_UF, CODIGO_MUNICIPIO, NOME_MUNICIPIO, POP_COLETADA, POP_IMPUTADA, POP_TOTAL) values ('PR', '41', '20606', 'Prudentópolis',49042, 351, 49393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20655" calcext:value-type="float">
            <text:p>20655</text:p>
          </table:table-cell>
          <table:table-cell office:value-type="string" calcext:value-type="string">
            <text:p>Quarto Centenário</text:p>
          </table:table-cell>
          <table:table-cell office:value-type="float" office:value="4179" calcext:value-type="float">
            <text:p>4179</text:p>
          </table:table-cell>
          <table:table-cell office:value-type="float" office:value="22" calcext:value-type="float">
            <text:p>22</text:p>
          </table:table-cell>
          <table:table-cell office:value-type="float" office:value="4201" calcext:value-type="float">
            <text:p>4201</text:p>
          </table:table-cell>
          <table:table-cell table:formula="of:=CONCATENATE(&quot;insert into IBGE_MUNICIPIOS (UF, COD_UF, CODIGO_MUNICIPIO, NOME_MUNICIPIO, POP_COLETADA, POP_IMPUTADA, POP_TOTAL) values ('&quot;; [.A288]; &quot;', '&quot;; [.B288]; &quot;', '&quot;; [.C288]; &quot;', '&quot;; [.D288]; &quot;',&quot;; [.E288]; &quot;, &quot;; [.F288]; &quot;, &quot;; [.G288]; &quot;);&quot;)" office:value-type="string" office:string-value="insert into IBGE_MUNICIPIOS (UF, COD_UF, CODIGO_MUNICIPIO, NOME_MUNICIPIO, POP_COLETADA, POP_IMPUTADA, POP_TOTAL) values ('PR', '41', '20655', 'Quarto Centenário',4179, 22, 4201);" calcext:value-type="string">
            <text:p>insert into IBGE_MUNICIPIOS (UF, COD_UF, CODIGO_MUNICIPIO, NOME_MUNICIPIO, POP_COLETADA, POP_IMPUTADA, POP_TOTAL) values ('PR', '41', '20655', 'Quarto Centenário',4179, 22, 4201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20705" calcext:value-type="float">
            <text:p>20705</text:p>
          </table:table-cell>
          <table:table-cell office:value-type="string" calcext:value-type="string">
            <text:p>Quatiguá</text:p>
          </table:table-cell>
          <table:table-cell office:value-type="float" office:value="7895" calcext:value-type="float">
            <text:p>7895</text:p>
          </table:table-cell>
          <table:table-cell office:value-type="float" office:value="204" calcext:value-type="float">
            <text:p>204</text:p>
          </table:table-cell>
          <table:table-cell office:value-type="float" office:value="8099" calcext:value-type="float">
            <text:p>8099</text:p>
          </table:table-cell>
          <table:table-cell table:formula="of:=CONCATENATE(&quot;insert into IBGE_MUNICIPIOS (UF, COD_UF, CODIGO_MUNICIPIO, NOME_MUNICIPIO, POP_COLETADA, POP_IMPUTADA, POP_TOTAL) values ('&quot;; [.A289]; &quot;', '&quot;; [.B289]; &quot;', '&quot;; [.C289]; &quot;', '&quot;; [.D289]; &quot;',&quot;; [.E289]; &quot;, &quot;; [.F289]; &quot;, &quot;; [.G289]; &quot;);&quot;)" office:value-type="string" office:string-value="insert into IBGE_MUNICIPIOS (UF, COD_UF, CODIGO_MUNICIPIO, NOME_MUNICIPIO, POP_COLETADA, POP_IMPUTADA, POP_TOTAL) values ('PR', '41', '20705', 'Quatiguá',7895, 204, 8099);" calcext:value-type="string">
            <text:p>insert into IBGE_MUNICIPIOS (UF, COD_UF, CODIGO_MUNICIPIO, NOME_MUNICIPIO, POP_COLETADA, POP_IMPUTADA, POP_TOTAL) values ('PR', '41', '20705', 'Quatiguá',7895, 204, 8099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20804" calcext:value-type="float">
            <text:p>20804</text:p>
          </table:table-cell>
          <table:table-cell office:value-type="string" calcext:value-type="string">
            <text:p>Quatro Barras</text:p>
          </table:table-cell>
          <table:table-cell office:value-type="float" office:value="23234" calcext:value-type="float">
            <text:p>23234</text:p>
          </table:table-cell>
          <table:table-cell office:value-type="float" office:value="957" calcext:value-type="float">
            <text:p>957</text:p>
          </table:table-cell>
          <table:table-cell office:value-type="float" office:value="24191" calcext:value-type="float">
            <text:p>24191</text:p>
          </table:table-cell>
          <table:table-cell table:formula="of:=CONCATENATE(&quot;insert into IBGE_MUNICIPIOS (UF, COD_UF, CODIGO_MUNICIPIO, NOME_MUNICIPIO, POP_COLETADA, POP_IMPUTADA, POP_TOTAL) values ('&quot;; [.A290]; &quot;', '&quot;; [.B290]; &quot;', '&quot;; [.C290]; &quot;', '&quot;; [.D290]; &quot;',&quot;; [.E290]; &quot;, &quot;; [.F290]; &quot;, &quot;; [.G290]; &quot;);&quot;)" office:value-type="string" office:string-value="insert into IBGE_MUNICIPIOS (UF, COD_UF, CODIGO_MUNICIPIO, NOME_MUNICIPIO, POP_COLETADA, POP_IMPUTADA, POP_TOTAL) values ('PR', '41', '20804', 'Quatro Barras',23234, 957, 24191);" calcext:value-type="string">
            <text:p>insert into IBGE_MUNICIPIOS (UF, COD_UF, CODIGO_MUNICIPIO, NOME_MUNICIPIO, POP_COLETADA, POP_IMPUTADA, POP_TOTAL) values ('PR', '41', '20804', 'Quatro Barras',23234, 957, 24191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20853" calcext:value-type="float">
            <text:p>20853</text:p>
          </table:table-cell>
          <table:table-cell office:value-type="string" calcext:value-type="string">
            <text:p>Quatro Pontes</text:p>
          </table:table-cell>
          <table:table-cell office:value-type="float" office:value="4185" calcext:value-type="float">
            <text:p>4185</text:p>
          </table:table-cell>
          <table:table-cell office:value-type="float" office:value="295" calcext:value-type="float">
            <text:p>295</text:p>
          </table:table-cell>
          <table:table-cell office:value-type="float" office:value="4480" calcext:value-type="float">
            <text:p>4480</text:p>
          </table:table-cell>
          <table:table-cell table:formula="of:=CONCATENATE(&quot;insert into IBGE_MUNICIPIOS (UF, COD_UF, CODIGO_MUNICIPIO, NOME_MUNICIPIO, POP_COLETADA, POP_IMPUTADA, POP_TOTAL) values ('&quot;; [.A291]; &quot;', '&quot;; [.B291]; &quot;', '&quot;; [.C291]; &quot;', '&quot;; [.D291]; &quot;',&quot;; [.E291]; &quot;, &quot;; [.F291]; &quot;, &quot;; [.G291]; &quot;);&quot;)" office:value-type="string" office:string-value="insert into IBGE_MUNICIPIOS (UF, COD_UF, CODIGO_MUNICIPIO, NOME_MUNICIPIO, POP_COLETADA, POP_IMPUTADA, POP_TOTAL) values ('PR', '41', '20853', 'Quatro Pontes',4185, 295, 4480);" calcext:value-type="string">
            <text:p>insert into IBGE_MUNICIPIOS (UF, COD_UF, CODIGO_MUNICIPIO, NOME_MUNICIPIO, POP_COLETADA, POP_IMPUTADA, POP_TOTAL) values ('PR', '41', '20853', 'Quatro Pontes',4185, 295, 4480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20903" calcext:value-type="float">
            <text:p>20903</text:p>
          </table:table-cell>
          <table:table-cell office:value-type="string" calcext:value-type="string">
            <text:p>Quedas do Iguaçu</text:p>
          </table:table-cell>
          <table:table-cell office:value-type="float" office:value="30069" calcext:value-type="float">
            <text:p>30069</text:p>
          </table:table-cell>
          <table:table-cell office:value-type="float" office:value="669" calcext:value-type="float">
            <text:p>669</text:p>
          </table:table-cell>
          <table:table-cell office:value-type="float" office:value="30738" calcext:value-type="float">
            <text:p>30738</text:p>
          </table:table-cell>
          <table:table-cell table:formula="of:=CONCATENATE(&quot;insert into IBGE_MUNICIPIOS (UF, COD_UF, CODIGO_MUNICIPIO, NOME_MUNICIPIO, POP_COLETADA, POP_IMPUTADA, POP_TOTAL) values ('&quot;; [.A292]; &quot;', '&quot;; [.B292]; &quot;', '&quot;; [.C292]; &quot;', '&quot;; [.D292]; &quot;',&quot;; [.E292]; &quot;, &quot;; [.F292]; &quot;, &quot;; [.G292]; &quot;);&quot;)" office:value-type="string" office:string-value="insert into IBGE_MUNICIPIOS (UF, COD_UF, CODIGO_MUNICIPIO, NOME_MUNICIPIO, POP_COLETADA, POP_IMPUTADA, POP_TOTAL) values ('PR', '41', '20903', 'Quedas do Iguaçu',30069, 669, 30738);" calcext:value-type="string">
            <text:p>insert into IBGE_MUNICIPIOS (UF, COD_UF, CODIGO_MUNICIPIO, NOME_MUNICIPIO, POP_COLETADA, POP_IMPUTADA, POP_TOTAL) values ('PR', '41', '20903', 'Quedas do Iguaçu',30069, 669, 30738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21000" calcext:value-type="float">
            <text:p>21000</text:p>
          </table:table-cell>
          <table:table-cell office:value-type="string" calcext:value-type="string">
            <text:p>Querência do Norte</text:p>
          </table:table-cell>
          <table:table-cell office:value-type="float" office:value="10335" calcext:value-type="float">
            <text:p>10335</text:p>
          </table:table-cell>
          <table:table-cell office:value-type="float" office:value="350" calcext:value-type="float">
            <text:p>350</text:p>
          </table:table-cell>
          <table:table-cell office:value-type="float" office:value="10685" calcext:value-type="float">
            <text:p>10685</text:p>
          </table:table-cell>
          <table:table-cell table:formula="of:=CONCATENATE(&quot;insert into IBGE_MUNICIPIOS (UF, COD_UF, CODIGO_MUNICIPIO, NOME_MUNICIPIO, POP_COLETADA, POP_IMPUTADA, POP_TOTAL) values ('&quot;; [.A293]; &quot;', '&quot;; [.B293]; &quot;', '&quot;; [.C293]; &quot;', '&quot;; [.D293]; &quot;',&quot;; [.E293]; &quot;, &quot;; [.F293]; &quot;, &quot;; [.G293]; &quot;);&quot;)" office:value-type="string" office:string-value="insert into IBGE_MUNICIPIOS (UF, COD_UF, CODIGO_MUNICIPIO, NOME_MUNICIPIO, POP_COLETADA, POP_IMPUTADA, POP_TOTAL) values ('PR', '41', '21000', 'Querência do Norte',10335, 350, 10685);" calcext:value-type="string">
            <text:p>insert into IBGE_MUNICIPIOS (UF, COD_UF, CODIGO_MUNICIPIO, NOME_MUNICIPIO, POP_COLETADA, POP_IMPUTADA, POP_TOTAL) values ('PR', '41', '21000', 'Querência do Norte',10335, 350, 10685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21109" calcext:value-type="float">
            <text:p>21109</text:p>
          </table:table-cell>
          <table:table-cell office:value-type="string" calcext:value-type="string">
            <text:p>Quinta do Sol</text:p>
          </table:table-cell>
          <table:table-cell office:value-type="float" office:value="4893" calcext:value-type="float">
            <text:p>4893</text:p>
          </table:table-cell>
          <table:table-cell office:value-type="float" office:value="108" calcext:value-type="float">
            <text:p>108</text:p>
          </table:table-cell>
          <table:table-cell office:value-type="float" office:value="5001" calcext:value-type="float">
            <text:p>5001</text:p>
          </table:table-cell>
          <table:table-cell table:formula="of:=CONCATENATE(&quot;insert into IBGE_MUNICIPIOS (UF, COD_UF, CODIGO_MUNICIPIO, NOME_MUNICIPIO, POP_COLETADA, POP_IMPUTADA, POP_TOTAL) values ('&quot;; [.A294]; &quot;', '&quot;; [.B294]; &quot;', '&quot;; [.C294]; &quot;', '&quot;; [.D294]; &quot;',&quot;; [.E294]; &quot;, &quot;; [.F294]; &quot;, &quot;; [.G294]; &quot;);&quot;)" office:value-type="string" office:string-value="insert into IBGE_MUNICIPIOS (UF, COD_UF, CODIGO_MUNICIPIO, NOME_MUNICIPIO, POP_COLETADA, POP_IMPUTADA, POP_TOTAL) values ('PR', '41', '21109', 'Quinta do Sol',4893, 108, 5001);" calcext:value-type="string">
            <text:p>insert into IBGE_MUNICIPIOS (UF, COD_UF, CODIGO_MUNICIPIO, NOME_MUNICIPIO, POP_COLETADA, POP_IMPUTADA, POP_TOTAL) values ('PR', '41', '21109', 'Quinta do Sol',4893, 108, 5001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21208" calcext:value-type="float">
            <text:p>21208</text:p>
          </table:table-cell>
          <table:table-cell office:value-type="string" calcext:value-type="string">
            <text:p>Quitandinha</text:p>
          </table:table-cell>
          <table:table-cell office:value-type="float" office:value="18126" calcext:value-type="float">
            <text:p>18126</text:p>
          </table:table-cell>
          <table:table-cell office:value-type="float" office:value="272" calcext:value-type="float">
            <text:p>272</text:p>
          </table:table-cell>
          <table:table-cell office:value-type="float" office:value="18398" calcext:value-type="float">
            <text:p>18398</text:p>
          </table:table-cell>
          <table:table-cell table:formula="of:=CONCATENATE(&quot;insert into IBGE_MUNICIPIOS (UF, COD_UF, CODIGO_MUNICIPIO, NOME_MUNICIPIO, POP_COLETADA, POP_IMPUTADA, POP_TOTAL) values ('&quot;; [.A295]; &quot;', '&quot;; [.B295]; &quot;', '&quot;; [.C295]; &quot;', '&quot;; [.D295]; &quot;',&quot;; [.E295]; &quot;, &quot;; [.F295]; &quot;, &quot;; [.G295]; &quot;);&quot;)" office:value-type="string" office:string-value="insert into IBGE_MUNICIPIOS (UF, COD_UF, CODIGO_MUNICIPIO, NOME_MUNICIPIO, POP_COLETADA, POP_IMPUTADA, POP_TOTAL) values ('PR', '41', '21208', 'Quitandinha',18126, 272, 18398);" calcext:value-type="string">
            <text:p>insert into IBGE_MUNICIPIOS (UF, COD_UF, CODIGO_MUNICIPIO, NOME_MUNICIPIO, POP_COLETADA, POP_IMPUTADA, POP_TOTAL) values ('PR', '41', '21208', 'Quitandinha',18126, 272, 18398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21257" calcext:value-type="float">
            <text:p>21257</text:p>
          </table:table-cell>
          <table:table-cell office:value-type="string" calcext:value-type="string">
            <text:p>Ramilândia</text:p>
          </table:table-cell>
          <table:table-cell office:value-type="float" office:value="4074" calcext:value-type="float">
            <text:p>4074</text:p>
          </table:table-cell>
          <table:table-cell office:value-type="float" office:value="147" calcext:value-type="float">
            <text:p>147</text:p>
          </table:table-cell>
          <table:table-cell office:value-type="float" office:value="4221" calcext:value-type="float">
            <text:p>4221</text:p>
          </table:table-cell>
          <table:table-cell table:formula="of:=CONCATENATE(&quot;insert into IBGE_MUNICIPIOS (UF, COD_UF, CODIGO_MUNICIPIO, NOME_MUNICIPIO, POP_COLETADA, POP_IMPUTADA, POP_TOTAL) values ('&quot;; [.A296]; &quot;', '&quot;; [.B296]; &quot;', '&quot;; [.C296]; &quot;', '&quot;; [.D296]; &quot;',&quot;; [.E296]; &quot;, &quot;; [.F296]; &quot;, &quot;; [.G296]; &quot;);&quot;)" office:value-type="string" office:string-value="insert into IBGE_MUNICIPIOS (UF, COD_UF, CODIGO_MUNICIPIO, NOME_MUNICIPIO, POP_COLETADA, POP_IMPUTADA, POP_TOTAL) values ('PR', '41', '21257', 'Ramilândia',4074, 147, 4221);" calcext:value-type="string">
            <text:p>insert into IBGE_MUNICIPIOS (UF, COD_UF, CODIGO_MUNICIPIO, NOME_MUNICIPIO, POP_COLETADA, POP_IMPUTADA, POP_TOTAL) values ('PR', '41', '21257', 'Ramilândia',4074, 147, 4221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21307" calcext:value-type="float">
            <text:p>21307</text:p>
          </table:table-cell>
          <table:table-cell office:value-type="string" calcext:value-type="string">
            <text:p>Rancho Alegre</text:p>
          </table:table-cell>
          <table:table-cell office:value-type="float" office:value="3509" calcext:value-type="float">
            <text:p>3509</text:p>
          </table:table-cell>
          <table:table-cell office:value-type="float" office:value="3" calcext:value-type="float">
            <text:p>3</text:p>
          </table:table-cell>
          <table:table-cell office:value-type="float" office:value="3512" calcext:value-type="float">
            <text:p>3512</text:p>
          </table:table-cell>
          <table:table-cell table:formula="of:=CONCATENATE(&quot;insert into IBGE_MUNICIPIOS (UF, COD_UF, CODIGO_MUNICIPIO, NOME_MUNICIPIO, POP_COLETADA, POP_IMPUTADA, POP_TOTAL) values ('&quot;; [.A297]; &quot;', '&quot;; [.B297]; &quot;', '&quot;; [.C297]; &quot;', '&quot;; [.D297]; &quot;',&quot;; [.E297]; &quot;, &quot;; [.F297]; &quot;, &quot;; [.G297]; &quot;);&quot;)" office:value-type="string" office:string-value="insert into IBGE_MUNICIPIOS (UF, COD_UF, CODIGO_MUNICIPIO, NOME_MUNICIPIO, POP_COLETADA, POP_IMPUTADA, POP_TOTAL) values ('PR', '41', '21307', 'Rancho Alegre',3509, 3, 3512);" calcext:value-type="string">
            <text:p>insert into IBGE_MUNICIPIOS (UF, COD_UF, CODIGO_MUNICIPIO, NOME_MUNICIPIO, POP_COLETADA, POP_IMPUTADA, POP_TOTAL) values ('PR', '41', '21307', 'Rancho Alegre',3509, 3, 3512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21356" calcext:value-type="float">
            <text:p>21356</text:p>
          </table:table-cell>
          <table:table-cell office:value-type="string" calcext:value-type="string">
            <text:p>Rancho Alegre Do Oeste</text:p>
          </table:table-cell>
          <table:table-cell office:value-type="float" office:value="2571" calcext:value-type="float">
            <text:p>2571</text:p>
          </table:table-cell>
          <table:table-cell office:value-type="float" office:value="47" calcext:value-type="float">
            <text:p>47</text:p>
          </table:table-cell>
          <table:table-cell office:value-type="float" office:value="2618" calcext:value-type="float">
            <text:p>2618</text:p>
          </table:table-cell>
          <table:table-cell table:formula="of:=CONCATENATE(&quot;insert into IBGE_MUNICIPIOS (UF, COD_UF, CODIGO_MUNICIPIO, NOME_MUNICIPIO, POP_COLETADA, POP_IMPUTADA, POP_TOTAL) values ('&quot;; [.A298]; &quot;', '&quot;; [.B298]; &quot;', '&quot;; [.C298]; &quot;', '&quot;; [.D298]; &quot;',&quot;; [.E298]; &quot;, &quot;; [.F298]; &quot;, &quot;; [.G298]; &quot;);&quot;)" office:value-type="string" office:string-value="insert into IBGE_MUNICIPIOS (UF, COD_UF, CODIGO_MUNICIPIO, NOME_MUNICIPIO, POP_COLETADA, POP_IMPUTADA, POP_TOTAL) values ('PR', '41', '21356', 'Rancho Alegre Do Oeste',2571, 47, 2618);" calcext:value-type="string">
            <text:p>insert into IBGE_MUNICIPIOS (UF, COD_UF, CODIGO_MUNICIPIO, NOME_MUNICIPIO, POP_COLETADA, POP_IMPUTADA, POP_TOTAL) values ('PR', '41', '21356', 'Rancho Alegre Do Oeste',2571, 47, 2618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21406" calcext:value-type="float">
            <text:p>21406</text:p>
          </table:table-cell>
          <table:table-cell office:value-type="string" calcext:value-type="string">
            <text:p>Realeza</text:p>
          </table:table-cell>
          <table:table-cell office:value-type="float" office:value="19242" calcext:value-type="float">
            <text:p>19242</text:p>
          </table:table-cell>
          <table:table-cell office:value-type="float" office:value="5" calcext:value-type="float">
            <text:p>5</text:p>
          </table:table-cell>
          <table:table-cell office:value-type="float" office:value="19247" calcext:value-type="float">
            <text:p>19247</text:p>
          </table:table-cell>
          <table:table-cell table:formula="of:=CONCATENATE(&quot;insert into IBGE_MUNICIPIOS (UF, COD_UF, CODIGO_MUNICIPIO, NOME_MUNICIPIO, POP_COLETADA, POP_IMPUTADA, POP_TOTAL) values ('&quot;; [.A299]; &quot;', '&quot;; [.B299]; &quot;', '&quot;; [.C299]; &quot;', '&quot;; [.D299]; &quot;',&quot;; [.E299]; &quot;, &quot;; [.F299]; &quot;, &quot;; [.G299]; &quot;);&quot;)" office:value-type="string" office:string-value="insert into IBGE_MUNICIPIOS (UF, COD_UF, CODIGO_MUNICIPIO, NOME_MUNICIPIO, POP_COLETADA, POP_IMPUTADA, POP_TOTAL) values ('PR', '41', '21406', 'Realeza',19242, 5, 19247);" calcext:value-type="string">
            <text:p>insert into IBGE_MUNICIPIOS (UF, COD_UF, CODIGO_MUNICIPIO, NOME_MUNICIPIO, POP_COLETADA, POP_IMPUTADA, POP_TOTAL) values ('PR', '41', '21406', 'Realeza',19242, 5, 19247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21505" calcext:value-type="float">
            <text:p>21505</text:p>
          </table:table-cell>
          <table:table-cell office:value-type="string" calcext:value-type="string">
            <text:p>Rebouças</text:p>
          </table:table-cell>
          <table:table-cell office:value-type="float" office:value="14430" calcext:value-type="float">
            <text:p>14430</text:p>
          </table:table-cell>
          <table:table-cell office:value-type="float" office:value="84" calcext:value-type="float">
            <text:p>84</text:p>
          </table:table-cell>
          <table:table-cell office:value-type="float" office:value="14514" calcext:value-type="float">
            <text:p>14514</text:p>
          </table:table-cell>
          <table:table-cell table:formula="of:=CONCATENATE(&quot;insert into IBGE_MUNICIPIOS (UF, COD_UF, CODIGO_MUNICIPIO, NOME_MUNICIPIO, POP_COLETADA, POP_IMPUTADA, POP_TOTAL) values ('&quot;; [.A300]; &quot;', '&quot;; [.B300]; &quot;', '&quot;; [.C300]; &quot;', '&quot;; [.D300]; &quot;',&quot;; [.E300]; &quot;, &quot;; [.F300]; &quot;, &quot;; [.G300]; &quot;);&quot;)" office:value-type="string" office:string-value="insert into IBGE_MUNICIPIOS (UF, COD_UF, CODIGO_MUNICIPIO, NOME_MUNICIPIO, POP_COLETADA, POP_IMPUTADA, POP_TOTAL) values ('PR', '41', '21505', 'Rebouças',14430, 84, 14514);" calcext:value-type="string">
            <text:p>insert into IBGE_MUNICIPIOS (UF, COD_UF, CODIGO_MUNICIPIO, NOME_MUNICIPIO, POP_COLETADA, POP_IMPUTADA, POP_TOTAL) values ('PR', '41', '21505', 'Rebouças',14430, 84, 14514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21604" calcext:value-type="float">
            <text:p>21604</text:p>
          </table:table-cell>
          <table:table-cell office:value-type="string" calcext:value-type="string">
            <text:p>Renascença</text:p>
          </table:table-cell>
          <table:table-cell office:value-type="float" office:value="6821" calcext:value-type="float">
            <text:p>6821</text:p>
          </table:table-cell>
          <table:table-cell office:value-type="float" office:value="24" calcext:value-type="float">
            <text:p>24</text:p>
          </table:table-cell>
          <table:table-cell office:value-type="float" office:value="6845" calcext:value-type="float">
            <text:p>6845</text:p>
          </table:table-cell>
          <table:table-cell table:formula="of:=CONCATENATE(&quot;insert into IBGE_MUNICIPIOS (UF, COD_UF, CODIGO_MUNICIPIO, NOME_MUNICIPIO, POP_COLETADA, POP_IMPUTADA, POP_TOTAL) values ('&quot;; [.A301]; &quot;', '&quot;; [.B301]; &quot;', '&quot;; [.C301]; &quot;', '&quot;; [.D301]; &quot;',&quot;; [.E301]; &quot;, &quot;; [.F301]; &quot;, &quot;; [.G301]; &quot;);&quot;)" office:value-type="string" office:string-value="insert into IBGE_MUNICIPIOS (UF, COD_UF, CODIGO_MUNICIPIO, NOME_MUNICIPIO, POP_COLETADA, POP_IMPUTADA, POP_TOTAL) values ('PR', '41', '21604', 'Renascença',6821, 24, 6845);" calcext:value-type="string">
            <text:p>insert into IBGE_MUNICIPIOS (UF, COD_UF, CODIGO_MUNICIPIO, NOME_MUNICIPIO, POP_COLETADA, POP_IMPUTADA, POP_TOTAL) values ('PR', '41', '21604', 'Renascença',6821, 24, 6845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21703" calcext:value-type="float">
            <text:p>21703</text:p>
          </table:table-cell>
          <table:table-cell office:value-type="string" calcext:value-type="string">
            <text:p>Reserva</text:p>
          </table:table-cell>
          <table:table-cell office:value-type="float" office:value="23118" calcext:value-type="float">
            <text:p>23118</text:p>
          </table:table-cell>
          <table:table-cell office:value-type="float" office:value="1455" calcext:value-type="float">
            <text:p>1455</text:p>
          </table:table-cell>
          <table:table-cell office:value-type="float" office:value="24573" calcext:value-type="float">
            <text:p>24573</text:p>
          </table:table-cell>
          <table:table-cell table:formula="of:=CONCATENATE(&quot;insert into IBGE_MUNICIPIOS (UF, COD_UF, CODIGO_MUNICIPIO, NOME_MUNICIPIO, POP_COLETADA, POP_IMPUTADA, POP_TOTAL) values ('&quot;; [.A302]; &quot;', '&quot;; [.B302]; &quot;', '&quot;; [.C302]; &quot;', '&quot;; [.D302]; &quot;',&quot;; [.E302]; &quot;, &quot;; [.F302]; &quot;, &quot;; [.G302]; &quot;);&quot;)" office:value-type="string" office:string-value="insert into IBGE_MUNICIPIOS (UF, COD_UF, CODIGO_MUNICIPIO, NOME_MUNICIPIO, POP_COLETADA, POP_IMPUTADA, POP_TOTAL) values ('PR', '41', '21703', 'Reserva',23118, 1455, 24573);" calcext:value-type="string">
            <text:p>insert into IBGE_MUNICIPIOS (UF, COD_UF, CODIGO_MUNICIPIO, NOME_MUNICIPIO, POP_COLETADA, POP_IMPUTADA, POP_TOTAL) values ('PR', '41', '21703', 'Reserva',23118, 1455, 24573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21752" calcext:value-type="float">
            <text:p>21752</text:p>
          </table:table-cell>
          <table:table-cell office:value-type="string" calcext:value-type="string">
            <text:p>Reserva do Iguaçu</text:p>
          </table:table-cell>
          <table:table-cell office:value-type="float" office:value="6485" calcext:value-type="float">
            <text:p>6485</text:p>
          </table:table-cell>
          <table:table-cell office:value-type="float" office:value="68" calcext:value-type="float">
            <text:p>68</text:p>
          </table:table-cell>
          <table:table-cell office:value-type="float" office:value="6553" calcext:value-type="float">
            <text:p>6553</text:p>
          </table:table-cell>
          <table:table-cell table:formula="of:=CONCATENATE(&quot;insert into IBGE_MUNICIPIOS (UF, COD_UF, CODIGO_MUNICIPIO, NOME_MUNICIPIO, POP_COLETADA, POP_IMPUTADA, POP_TOTAL) values ('&quot;; [.A303]; &quot;', '&quot;; [.B303]; &quot;', '&quot;; [.C303]; &quot;', '&quot;; [.D303]; &quot;',&quot;; [.E303]; &quot;, &quot;; [.F303]; &quot;, &quot;; [.G303]; &quot;);&quot;)" office:value-type="string" office:string-value="insert into IBGE_MUNICIPIOS (UF, COD_UF, CODIGO_MUNICIPIO, NOME_MUNICIPIO, POP_COLETADA, POP_IMPUTADA, POP_TOTAL) values ('PR', '41', '21752', 'Reserva do Iguaçu',6485, 68, 6553);" calcext:value-type="string">
            <text:p>insert into IBGE_MUNICIPIOS (UF, COD_UF, CODIGO_MUNICIPIO, NOME_MUNICIPIO, POP_COLETADA, POP_IMPUTADA, POP_TOTAL) values ('PR', '41', '21752', 'Reserva do Iguaçu',6485, 68, 6553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21802" calcext:value-type="float">
            <text:p>21802</text:p>
          </table:table-cell>
          <table:table-cell office:value-type="string" calcext:value-type="string">
            <text:p>Ribeirão Claro</text:p>
          </table:table-cell>
          <table:table-cell office:value-type="float" office:value="12305" calcext:value-type="float">
            <text:p>12305</text:p>
          </table:table-cell>
          <table:table-cell office:value-type="float" office:value="59" calcext:value-type="float">
            <text:p>59</text:p>
          </table:table-cell>
          <table:table-cell office:value-type="float" office:value="12364" calcext:value-type="float">
            <text:p>12364</text:p>
          </table:table-cell>
          <table:table-cell table:formula="of:=CONCATENATE(&quot;insert into IBGE_MUNICIPIOS (UF, COD_UF, CODIGO_MUNICIPIO, NOME_MUNICIPIO, POP_COLETADA, POP_IMPUTADA, POP_TOTAL) values ('&quot;; [.A304]; &quot;', '&quot;; [.B304]; &quot;', '&quot;; [.C304]; &quot;', '&quot;; [.D304]; &quot;',&quot;; [.E304]; &quot;, &quot;; [.F304]; &quot;, &quot;; [.G304]; &quot;);&quot;)" office:value-type="string" office:string-value="insert into IBGE_MUNICIPIOS (UF, COD_UF, CODIGO_MUNICIPIO, NOME_MUNICIPIO, POP_COLETADA, POP_IMPUTADA, POP_TOTAL) values ('PR', '41', '21802', 'Ribeirão Claro',12305, 59, 12364);" calcext:value-type="string">
            <text:p>insert into IBGE_MUNICIPIOS (UF, COD_UF, CODIGO_MUNICIPIO, NOME_MUNICIPIO, POP_COLETADA, POP_IMPUTADA, POP_TOTAL) values ('PR', '41', '21802', 'Ribeirão Claro',12305, 59, 12364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21901" calcext:value-type="float">
            <text:p>21901</text:p>
          </table:table-cell>
          <table:table-cell office:value-type="string" calcext:value-type="string">
            <text:p>Ribeirão do Pinhal</text:p>
          </table:table-cell>
          <table:table-cell office:value-type="float" office:value="12668" calcext:value-type="float">
            <text:p>12668</text:p>
          </table:table-cell>
          <table:table-cell office:value-type="float" office:value="392" calcext:value-type="float">
            <text:p>392</text:p>
          </table:table-cell>
          <table:table-cell office:value-type="float" office:value="13060" calcext:value-type="float">
            <text:p>13060</text:p>
          </table:table-cell>
          <table:table-cell table:formula="of:=CONCATENATE(&quot;insert into IBGE_MUNICIPIOS (UF, COD_UF, CODIGO_MUNICIPIO, NOME_MUNICIPIO, POP_COLETADA, POP_IMPUTADA, POP_TOTAL) values ('&quot;; [.A305]; &quot;', '&quot;; [.B305]; &quot;', '&quot;; [.C305]; &quot;', '&quot;; [.D305]; &quot;',&quot;; [.E305]; &quot;, &quot;; [.F305]; &quot;, &quot;; [.G305]; &quot;);&quot;)" office:value-type="string" office:string-value="insert into IBGE_MUNICIPIOS (UF, COD_UF, CODIGO_MUNICIPIO, NOME_MUNICIPIO, POP_COLETADA, POP_IMPUTADA, POP_TOTAL) values ('PR', '41', '21901', 'Ribeirão do Pinhal',12668, 392, 13060);" calcext:value-type="string">
            <text:p>insert into IBGE_MUNICIPIOS (UF, COD_UF, CODIGO_MUNICIPIO, NOME_MUNICIPIO, POP_COLETADA, POP_IMPUTADA, POP_TOTAL) values ('PR', '41', '21901', 'Ribeirão do Pinhal',12668, 392, 13060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22008" calcext:value-type="float">
            <text:p>22008</text:p>
          </table:table-cell>
          <table:table-cell office:value-type="string" calcext:value-type="string">
            <text:p>Rio Azul</text:p>
          </table:table-cell>
          <table:table-cell office:value-type="float" office:value="13931" calcext:value-type="float">
            <text:p>13931</text:p>
          </table:table-cell>
          <table:table-cell office:value-type="float" office:value="94" calcext:value-type="float">
            <text:p>94</text:p>
          </table:table-cell>
          <table:table-cell office:value-type="float" office:value="14025" calcext:value-type="float">
            <text:p>14025</text:p>
          </table:table-cell>
          <table:table-cell table:formula="of:=CONCATENATE(&quot;insert into IBGE_MUNICIPIOS (UF, COD_UF, CODIGO_MUNICIPIO, NOME_MUNICIPIO, POP_COLETADA, POP_IMPUTADA, POP_TOTAL) values ('&quot;; [.A306]; &quot;', '&quot;; [.B306]; &quot;', '&quot;; [.C306]; &quot;', '&quot;; [.D306]; &quot;',&quot;; [.E306]; &quot;, &quot;; [.F306]; &quot;, &quot;; [.G306]; &quot;);&quot;)" office:value-type="string" office:string-value="insert into IBGE_MUNICIPIOS (UF, COD_UF, CODIGO_MUNICIPIO, NOME_MUNICIPIO, POP_COLETADA, POP_IMPUTADA, POP_TOTAL) values ('PR', '41', '22008', 'Rio Azul',13931, 94, 14025);" calcext:value-type="string">
            <text:p>insert into IBGE_MUNICIPIOS (UF, COD_UF, CODIGO_MUNICIPIO, NOME_MUNICIPIO, POP_COLETADA, POP_IMPUTADA, POP_TOTAL) values ('PR', '41', '22008', 'Rio Azul',13931, 94, 14025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22107" calcext:value-type="float">
            <text:p>22107</text:p>
          </table:table-cell>
          <table:table-cell office:value-type="string" calcext:value-type="string">
            <text:p>Rio Bom</text:p>
          </table:table-cell>
          <table:table-cell office:value-type="float" office:value="3120" calcext:value-type="float">
            <text:p>3120</text:p>
          </table:table-cell>
          <table:table-cell office:value-type="float" office:value="77" calcext:value-type="float">
            <text:p>77</text:p>
          </table:table-cell>
          <table:table-cell office:value-type="float" office:value="3197" calcext:value-type="float">
            <text:p>3197</text:p>
          </table:table-cell>
          <table:table-cell table:formula="of:=CONCATENATE(&quot;insert into IBGE_MUNICIPIOS (UF, COD_UF, CODIGO_MUNICIPIO, NOME_MUNICIPIO, POP_COLETADA, POP_IMPUTADA, POP_TOTAL) values ('&quot;; [.A307]; &quot;', '&quot;; [.B307]; &quot;', '&quot;; [.C307]; &quot;', '&quot;; [.D307]; &quot;',&quot;; [.E307]; &quot;, &quot;; [.F307]; &quot;, &quot;; [.G307]; &quot;);&quot;)" office:value-type="string" office:string-value="insert into IBGE_MUNICIPIOS (UF, COD_UF, CODIGO_MUNICIPIO, NOME_MUNICIPIO, POP_COLETADA, POP_IMPUTADA, POP_TOTAL) values ('PR', '41', '22107', 'Rio Bom',3120, 77, 3197);" calcext:value-type="string">
            <text:p>insert into IBGE_MUNICIPIOS (UF, COD_UF, CODIGO_MUNICIPIO, NOME_MUNICIPIO, POP_COLETADA, POP_IMPUTADA, POP_TOTAL) values ('PR', '41', '22107', 'Rio Bom',3120, 77, 3197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22156" calcext:value-type="float">
            <text:p>22156</text:p>
          </table:table-cell>
          <table:table-cell office:value-type="string" calcext:value-type="string">
            <text:p>Rio Bonito do Iguaçu</text:p>
          </table:table-cell>
          <table:table-cell office:value-type="float" office:value="13924" calcext:value-type="float">
            <text:p>13924</text:p>
          </table:table-cell>
          <table:table-cell office:value-type="float" office:value="5" calcext:value-type="float">
            <text:p>5</text:p>
          </table:table-cell>
          <table:table-cell office:value-type="float" office:value="13929" calcext:value-type="float">
            <text:p>13929</text:p>
          </table:table-cell>
          <table:table-cell table:formula="of:=CONCATENATE(&quot;insert into IBGE_MUNICIPIOS (UF, COD_UF, CODIGO_MUNICIPIO, NOME_MUNICIPIO, POP_COLETADA, POP_IMPUTADA, POP_TOTAL) values ('&quot;; [.A308]; &quot;', '&quot;; [.B308]; &quot;', '&quot;; [.C308]; &quot;', '&quot;; [.D308]; &quot;',&quot;; [.E308]; &quot;, &quot;; [.F308]; &quot;, &quot;; [.G308]; &quot;);&quot;)" office:value-type="string" office:string-value="insert into IBGE_MUNICIPIOS (UF, COD_UF, CODIGO_MUNICIPIO, NOME_MUNICIPIO, POP_COLETADA, POP_IMPUTADA, POP_TOTAL) values ('PR', '41', '22156', 'Rio Bonito do Iguaçu',13924, 5, 13929);" calcext:value-type="string">
            <text:p>insert into IBGE_MUNICIPIOS (UF, COD_UF, CODIGO_MUNICIPIO, NOME_MUNICIPIO, POP_COLETADA, POP_IMPUTADA, POP_TOTAL) values ('PR', '41', '22156', 'Rio Bonito do Iguaçu',13924, 5, 13929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22172" calcext:value-type="float">
            <text:p>22172</text:p>
          </table:table-cell>
          <table:table-cell office:value-type="string" calcext:value-type="string">
            <text:p>Rio Branco do Ivaí</text:p>
          </table:table-cell>
          <table:table-cell office:value-type="float" office:value="3771" calcext:value-type="float">
            <text:p>3771</text:p>
          </table:table-cell>
          <table:table-cell office:value-type="float" office:value="37" calcext:value-type="float">
            <text:p>37</text:p>
          </table:table-cell>
          <table:table-cell office:value-type="float" office:value="3808" calcext:value-type="float">
            <text:p>3808</text:p>
          </table:table-cell>
          <table:table-cell table:formula="of:=CONCATENATE(&quot;insert into IBGE_MUNICIPIOS (UF, COD_UF, CODIGO_MUNICIPIO, NOME_MUNICIPIO, POP_COLETADA, POP_IMPUTADA, POP_TOTAL) values ('&quot;; [.A309]; &quot;', '&quot;; [.B309]; &quot;', '&quot;; [.C309]; &quot;', '&quot;; [.D309]; &quot;',&quot;; [.E309]; &quot;, &quot;; [.F309]; &quot;, &quot;; [.G309]; &quot;);&quot;)" office:value-type="string" office:string-value="insert into IBGE_MUNICIPIOS (UF, COD_UF, CODIGO_MUNICIPIO, NOME_MUNICIPIO, POP_COLETADA, POP_IMPUTADA, POP_TOTAL) values ('PR', '41', '22172', 'Rio Branco do Ivaí',3771, 37, 3808);" calcext:value-type="string">
            <text:p>insert into IBGE_MUNICIPIOS (UF, COD_UF, CODIGO_MUNICIPIO, NOME_MUNICIPIO, POP_COLETADA, POP_IMPUTADA, POP_TOTAL) values ('PR', '41', '22172', 'Rio Branco do Ivaí',3771, 37, 3808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22206" calcext:value-type="float">
            <text:p>22206</text:p>
          </table:table-cell>
          <table:table-cell office:value-type="string" calcext:value-type="string">
            <text:p>Rio Branco do Sul</text:p>
          </table:table-cell>
          <table:table-cell office:value-type="float" office:value="37540" calcext:value-type="float">
            <text:p>37540</text:p>
          </table:table-cell>
          <table:table-cell office:value-type="float" office:value="18" calcext:value-type="float">
            <text:p>18</text:p>
          </table:table-cell>
          <table:table-cell office:value-type="float" office:value="37558" calcext:value-type="float">
            <text:p>37558</text:p>
          </table:table-cell>
          <table:table-cell table:formula="of:=CONCATENATE(&quot;insert into IBGE_MUNICIPIOS (UF, COD_UF, CODIGO_MUNICIPIO, NOME_MUNICIPIO, POP_COLETADA, POP_IMPUTADA, POP_TOTAL) values ('&quot;; [.A310]; &quot;', '&quot;; [.B310]; &quot;', '&quot;; [.C310]; &quot;', '&quot;; [.D310]; &quot;',&quot;; [.E310]; &quot;, &quot;; [.F310]; &quot;, &quot;; [.G310]; &quot;);&quot;)" office:value-type="string" office:string-value="insert into IBGE_MUNICIPIOS (UF, COD_UF, CODIGO_MUNICIPIO, NOME_MUNICIPIO, POP_COLETADA, POP_IMPUTADA, POP_TOTAL) values ('PR', '41', '22206', 'Rio Branco do Sul',37540, 18, 37558);" calcext:value-type="string">
            <text:p>insert into IBGE_MUNICIPIOS (UF, COD_UF, CODIGO_MUNICIPIO, NOME_MUNICIPIO, POP_COLETADA, POP_IMPUTADA, POP_TOTAL) values ('PR', '41', '22206', 'Rio Branco do Sul',37540, 18, 37558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22305" calcext:value-type="float">
            <text:p>22305</text:p>
          </table:table-cell>
          <table:table-cell office:value-type="string" calcext:value-type="string">
            <text:p>Rio Negro</text:p>
          </table:table-cell>
          <table:table-cell office:value-type="float" office:value="30840" calcext:value-type="float">
            <text:p>30840</text:p>
          </table:table-cell>
          <table:table-cell office:value-type="float" office:value="484" calcext:value-type="float">
            <text:p>484</text:p>
          </table:table-cell>
          <table:table-cell office:value-type="float" office:value="31324" calcext:value-type="float">
            <text:p>31324</text:p>
          </table:table-cell>
          <table:table-cell table:formula="of:=CONCATENATE(&quot;insert into IBGE_MUNICIPIOS (UF, COD_UF, CODIGO_MUNICIPIO, NOME_MUNICIPIO, POP_COLETADA, POP_IMPUTADA, POP_TOTAL) values ('&quot;; [.A311]; &quot;', '&quot;; [.B311]; &quot;', '&quot;; [.C311]; &quot;', '&quot;; [.D311]; &quot;',&quot;; [.E311]; &quot;, &quot;; [.F311]; &quot;, &quot;; [.G311]; &quot;);&quot;)" office:value-type="string" office:string-value="insert into IBGE_MUNICIPIOS (UF, COD_UF, CODIGO_MUNICIPIO, NOME_MUNICIPIO, POP_COLETADA, POP_IMPUTADA, POP_TOTAL) values ('PR', '41', '22305', 'Rio Negro',30840, 484, 31324);" calcext:value-type="string">
            <text:p>insert into IBGE_MUNICIPIOS (UF, COD_UF, CODIGO_MUNICIPIO, NOME_MUNICIPIO, POP_COLETADA, POP_IMPUTADA, POP_TOTAL) values ('PR', '41', '22305', 'Rio Negro',30840, 484, 31324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22404" calcext:value-type="float">
            <text:p>22404</text:p>
          </table:table-cell>
          <table:table-cell office:value-type="string" calcext:value-type="string">
            <text:p>Rolândia</text:p>
          </table:table-cell>
          <table:table-cell office:value-type="float" office:value="70670" calcext:value-type="float">
            <text:p>70670</text:p>
          </table:table-cell>
          <table:table-cell office:value-type="float" office:value="1000" calcext:value-type="float">
            <text:p>1000</text:p>
          </table:table-cell>
          <table:table-cell office:value-type="float" office:value="71670" calcext:value-type="float">
            <text:p>71670</text:p>
          </table:table-cell>
          <table:table-cell table:formula="of:=CONCATENATE(&quot;insert into IBGE_MUNICIPIOS (UF, COD_UF, CODIGO_MUNICIPIO, NOME_MUNICIPIO, POP_COLETADA, POP_IMPUTADA, POP_TOTAL) values ('&quot;; [.A312]; &quot;', '&quot;; [.B312]; &quot;', '&quot;; [.C312]; &quot;', '&quot;; [.D312]; &quot;',&quot;; [.E312]; &quot;, &quot;; [.F312]; &quot;, &quot;; [.G312]; &quot;);&quot;)" office:value-type="string" office:string-value="insert into IBGE_MUNICIPIOS (UF, COD_UF, CODIGO_MUNICIPIO, NOME_MUNICIPIO, POP_COLETADA, POP_IMPUTADA, POP_TOTAL) values ('PR', '41', '22404', 'Rolândia',70670, 1000, 71670);" calcext:value-type="string">
            <text:p>insert into IBGE_MUNICIPIOS (UF, COD_UF, CODIGO_MUNICIPIO, NOME_MUNICIPIO, POP_COLETADA, POP_IMPUTADA, POP_TOTAL) values ('PR', '41', '22404', 'Rolândia',70670, 1000, 71670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22503" calcext:value-type="float">
            <text:p>22503</text:p>
          </table:table-cell>
          <table:table-cell office:value-type="string" calcext:value-type="string">
            <text:p>Roncador</text:p>
          </table:table-cell>
          <table:table-cell office:value-type="float" office:value="11088" calcext:value-type="float">
            <text:p>11088</text:p>
          </table:table-cell>
          <table:table-cell office:value-type="float" office:value="163" calcext:value-type="float">
            <text:p>163</text:p>
          </table:table-cell>
          <table:table-cell office:value-type="float" office:value="11251" calcext:value-type="float">
            <text:p>11251</text:p>
          </table:table-cell>
          <table:table-cell table:formula="of:=CONCATENATE(&quot;insert into IBGE_MUNICIPIOS (UF, COD_UF, CODIGO_MUNICIPIO, NOME_MUNICIPIO, POP_COLETADA, POP_IMPUTADA, POP_TOTAL) values ('&quot;; [.A313]; &quot;', '&quot;; [.B313]; &quot;', '&quot;; [.C313]; &quot;', '&quot;; [.D313]; &quot;',&quot;; [.E313]; &quot;, &quot;; [.F313]; &quot;, &quot;; [.G313]; &quot;);&quot;)" office:value-type="string" office:string-value="insert into IBGE_MUNICIPIOS (UF, COD_UF, CODIGO_MUNICIPIO, NOME_MUNICIPIO, POP_COLETADA, POP_IMPUTADA, POP_TOTAL) values ('PR', '41', '22503', 'Roncador',11088, 163, 11251);" calcext:value-type="string">
            <text:p>insert into IBGE_MUNICIPIOS (UF, COD_UF, CODIGO_MUNICIPIO, NOME_MUNICIPIO, POP_COLETADA, POP_IMPUTADA, POP_TOTAL) values ('PR', '41', '22503', 'Roncador',11088, 163, 11251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22602" calcext:value-type="float">
            <text:p>22602</text:p>
          </table:table-cell>
          <table:table-cell office:value-type="string" calcext:value-type="string">
            <text:p>Rondon</text:p>
          </table:table-cell>
          <table:table-cell office:value-type="float" office:value="8979" calcext:value-type="float">
            <text:p>8979</text:p>
          </table:table-cell>
          <table:table-cell office:value-type="float" office:value="118" calcext:value-type="float">
            <text:p>118</text:p>
          </table:table-cell>
          <table:table-cell office:value-type="float" office:value="9097" calcext:value-type="float">
            <text:p>9097</text:p>
          </table:table-cell>
          <table:table-cell table:formula="of:=CONCATENATE(&quot;insert into IBGE_MUNICIPIOS (UF, COD_UF, CODIGO_MUNICIPIO, NOME_MUNICIPIO, POP_COLETADA, POP_IMPUTADA, POP_TOTAL) values ('&quot;; [.A314]; &quot;', '&quot;; [.B314]; &quot;', '&quot;; [.C314]; &quot;', '&quot;; [.D314]; &quot;',&quot;; [.E314]; &quot;, &quot;; [.F314]; &quot;, &quot;; [.G314]; &quot;);&quot;)" office:value-type="string" office:string-value="insert into IBGE_MUNICIPIOS (UF, COD_UF, CODIGO_MUNICIPIO, NOME_MUNICIPIO, POP_COLETADA, POP_IMPUTADA, POP_TOTAL) values ('PR', '41', '22602', 'Rondon',8979, 118, 9097);" calcext:value-type="string">
            <text:p>insert into IBGE_MUNICIPIOS (UF, COD_UF, CODIGO_MUNICIPIO, NOME_MUNICIPIO, POP_COLETADA, POP_IMPUTADA, POP_TOTAL) values ('PR', '41', '22602', 'Rondon',8979, 118, 9097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22651" calcext:value-type="float">
            <text:p>22651</text:p>
          </table:table-cell>
          <table:table-cell office:value-type="string" calcext:value-type="string">
            <text:p>Rosário do Ivaí</text:p>
          </table:table-cell>
          <table:table-cell office:value-type="float" office:value="5392" calcext:value-type="float">
            <text:p>5392</text:p>
          </table:table-cell>
          <table:table-cell office:value-type="float" office:value="43" calcext:value-type="float">
            <text:p>43</text:p>
          </table:table-cell>
          <table:table-cell office:value-type="float" office:value="5435" calcext:value-type="float">
            <text:p>5435</text:p>
          </table:table-cell>
          <table:table-cell table:formula="of:=CONCATENATE(&quot;insert into IBGE_MUNICIPIOS (UF, COD_UF, CODIGO_MUNICIPIO, NOME_MUNICIPIO, POP_COLETADA, POP_IMPUTADA, POP_TOTAL) values ('&quot;; [.A315]; &quot;', '&quot;; [.B315]; &quot;', '&quot;; [.C315]; &quot;', '&quot;; [.D315]; &quot;',&quot;; [.E315]; &quot;, &quot;; [.F315]; &quot;, &quot;; [.G315]; &quot;);&quot;)" office:value-type="string" office:string-value="insert into IBGE_MUNICIPIOS (UF, COD_UF, CODIGO_MUNICIPIO, NOME_MUNICIPIO, POP_COLETADA, POP_IMPUTADA, POP_TOTAL) values ('PR', '41', '22651', 'Rosário do Ivaí',5392, 43, 5435);" calcext:value-type="string">
            <text:p>insert into IBGE_MUNICIPIOS (UF, COD_UF, CODIGO_MUNICIPIO, NOME_MUNICIPIO, POP_COLETADA, POP_IMPUTADA, POP_TOTAL) values ('PR', '41', '22651', 'Rosário do Ivaí',5392, 43, 5435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22701" calcext:value-type="float">
            <text:p>22701</text:p>
          </table:table-cell>
          <table:table-cell office:value-type="string" calcext:value-type="string">
            <text:p>Sabáudia</text:p>
          </table:table-cell>
          <table:table-cell office:value-type="float" office:value="8674" calcext:value-type="float">
            <text:p>8674</text:p>
          </table:table-cell>
          <table:table-cell office:value-type="float" office:value="148" calcext:value-type="float">
            <text:p>148</text:p>
          </table:table-cell>
          <table:table-cell office:value-type="float" office:value="8822" calcext:value-type="float">
            <text:p>8822</text:p>
          </table:table-cell>
          <table:table-cell table:formula="of:=CONCATENATE(&quot;insert into IBGE_MUNICIPIOS (UF, COD_UF, CODIGO_MUNICIPIO, NOME_MUNICIPIO, POP_COLETADA, POP_IMPUTADA, POP_TOTAL) values ('&quot;; [.A316]; &quot;', '&quot;; [.B316]; &quot;', '&quot;; [.C316]; &quot;', '&quot;; [.D316]; &quot;',&quot;; [.E316]; &quot;, &quot;; [.F316]; &quot;, &quot;; [.G316]; &quot;);&quot;)" office:value-type="string" office:string-value="insert into IBGE_MUNICIPIOS (UF, COD_UF, CODIGO_MUNICIPIO, NOME_MUNICIPIO, POP_COLETADA, POP_IMPUTADA, POP_TOTAL) values ('PR', '41', '22701', 'Sabáudia',8674, 148, 8822);" calcext:value-type="string">
            <text:p>insert into IBGE_MUNICIPIOS (UF, COD_UF, CODIGO_MUNICIPIO, NOME_MUNICIPIO, POP_COLETADA, POP_IMPUTADA, POP_TOTAL) values ('PR', '41', '22701', 'Sabáudia',8674, 148, 8822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22800" calcext:value-type="float">
            <text:p>22800</text:p>
          </table:table-cell>
          <table:table-cell office:value-type="string" calcext:value-type="string">
            <text:p>Salgado Filho</text:p>
          </table:table-cell>
          <table:table-cell office:value-type="float" office:value="4073" calcext:value-type="float">
            <text:p>4073</text:p>
          </table:table-cell>
          <table:table-cell office:value-type="float" office:value="2" calcext:value-type="float">
            <text:p>2</text:p>
          </table:table-cell>
          <table:table-cell office:value-type="float" office:value="4075" calcext:value-type="float">
            <text:p>4075</text:p>
          </table:table-cell>
          <table:table-cell table:formula="of:=CONCATENATE(&quot;insert into IBGE_MUNICIPIOS (UF, COD_UF, CODIGO_MUNICIPIO, NOME_MUNICIPIO, POP_COLETADA, POP_IMPUTADA, POP_TOTAL) values ('&quot;; [.A317]; &quot;', '&quot;; [.B317]; &quot;', '&quot;; [.C317]; &quot;', '&quot;; [.D317]; &quot;',&quot;; [.E317]; &quot;, &quot;; [.F317]; &quot;, &quot;; [.G317]; &quot;);&quot;)" office:value-type="string" office:string-value="insert into IBGE_MUNICIPIOS (UF, COD_UF, CODIGO_MUNICIPIO, NOME_MUNICIPIO, POP_COLETADA, POP_IMPUTADA, POP_TOTAL) values ('PR', '41', '22800', 'Salgado Filho',4073, 2, 4075);" calcext:value-type="string">
            <text:p>insert into IBGE_MUNICIPIOS (UF, COD_UF, CODIGO_MUNICIPIO, NOME_MUNICIPIO, POP_COLETADA, POP_IMPUTADA, POP_TOTAL) values ('PR', '41', '22800', 'Salgado Filho',4073, 2, 4075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22909" calcext:value-type="float">
            <text:p>22909</text:p>
          </table:table-cell>
          <table:table-cell office:value-type="string" calcext:value-type="string">
            <text:p>Salto do Itararé</text:p>
          </table:table-cell>
          <table:table-cell office:value-type="float" office:value="5165" calcext:value-type="float">
            <text:p>5165</text:p>
          </table:table-cell>
          <table:table-cell office:value-type="float" office:value="27" calcext:value-type="float">
            <text:p>27</text:p>
          </table:table-cell>
          <table:table-cell office:value-type="float" office:value="5192" calcext:value-type="float">
            <text:p>5192</text:p>
          </table:table-cell>
          <table:table-cell table:formula="of:=CONCATENATE(&quot;insert into IBGE_MUNICIPIOS (UF, COD_UF, CODIGO_MUNICIPIO, NOME_MUNICIPIO, POP_COLETADA, POP_IMPUTADA, POP_TOTAL) values ('&quot;; [.A318]; &quot;', '&quot;; [.B318]; &quot;', '&quot;; [.C318]; &quot;', '&quot;; [.D318]; &quot;',&quot;; [.E318]; &quot;, &quot;; [.F318]; &quot;, &quot;; [.G318]; &quot;);&quot;)" office:value-type="string" office:string-value="insert into IBGE_MUNICIPIOS (UF, COD_UF, CODIGO_MUNICIPIO, NOME_MUNICIPIO, POP_COLETADA, POP_IMPUTADA, POP_TOTAL) values ('PR', '41', '22909', 'Salto do Itararé',5165, 27, 5192);" calcext:value-type="string">
            <text:p>insert into IBGE_MUNICIPIOS (UF, COD_UF, CODIGO_MUNICIPIO, NOME_MUNICIPIO, POP_COLETADA, POP_IMPUTADA, POP_TOTAL) values ('PR', '41', '22909', 'Salto do Itararé',5165, 27, 5192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23006" calcext:value-type="float">
            <text:p>23006</text:p>
          </table:table-cell>
          <table:table-cell office:value-type="string" calcext:value-type="string">
            <text:p>Salto do Lontra</text:p>
          </table:table-cell>
          <table:table-cell office:value-type="float" office:value="15100" calcext:value-type="float">
            <text:p>15100</text:p>
          </table:table-cell>
          <table:table-cell office:value-type="float" office:value="123" calcext:value-type="float">
            <text:p>123</text:p>
          </table:table-cell>
          <table:table-cell office:value-type="float" office:value="15223" calcext:value-type="float">
            <text:p>15223</text:p>
          </table:table-cell>
          <table:table-cell table:formula="of:=CONCATENATE(&quot;insert into IBGE_MUNICIPIOS (UF, COD_UF, CODIGO_MUNICIPIO, NOME_MUNICIPIO, POP_COLETADA, POP_IMPUTADA, POP_TOTAL) values ('&quot;; [.A319]; &quot;', '&quot;; [.B319]; &quot;', '&quot;; [.C319]; &quot;', '&quot;; [.D319]; &quot;',&quot;; [.E319]; &quot;, &quot;; [.F319]; &quot;, &quot;; [.G319]; &quot;);&quot;)" office:value-type="string" office:string-value="insert into IBGE_MUNICIPIOS (UF, COD_UF, CODIGO_MUNICIPIO, NOME_MUNICIPIO, POP_COLETADA, POP_IMPUTADA, POP_TOTAL) values ('PR', '41', '23006', 'Salto do Lontra',15100, 123, 15223);" calcext:value-type="string">
            <text:p>insert into IBGE_MUNICIPIOS (UF, COD_UF, CODIGO_MUNICIPIO, NOME_MUNICIPIO, POP_COLETADA, POP_IMPUTADA, POP_TOTAL) values ('PR', '41', '23006', 'Salto do Lontra',15100, 123, 15223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23105" calcext:value-type="float">
            <text:p>23105</text:p>
          </table:table-cell>
          <table:table-cell office:value-type="string" calcext:value-type="string">
            <text:p>Santa Amélia</text:p>
          </table:table-cell>
          <table:table-cell office:value-type="float" office:value="3380" calcext:value-type="float">
            <text:p>3380</text:p>
          </table:table-cell>
          <table:table-cell office:value-type="float" office:value="14" calcext:value-type="float">
            <text:p>14</text:p>
          </table:table-cell>
          <table:table-cell office:value-type="float" office:value="3394" calcext:value-type="float">
            <text:p>3394</text:p>
          </table:table-cell>
          <table:table-cell table:formula="of:=CONCATENATE(&quot;insert into IBGE_MUNICIPIOS (UF, COD_UF, CODIGO_MUNICIPIO, NOME_MUNICIPIO, POP_COLETADA, POP_IMPUTADA, POP_TOTAL) values ('&quot;; [.A320]; &quot;', '&quot;; [.B320]; &quot;', '&quot;; [.C320]; &quot;', '&quot;; [.D320]; &quot;',&quot;; [.E320]; &quot;, &quot;; [.F320]; &quot;, &quot;; [.G320]; &quot;);&quot;)" office:value-type="string" office:string-value="insert into IBGE_MUNICIPIOS (UF, COD_UF, CODIGO_MUNICIPIO, NOME_MUNICIPIO, POP_COLETADA, POP_IMPUTADA, POP_TOTAL) values ('PR', '41', '23105', 'Santa Amélia',3380, 14, 3394);" calcext:value-type="string">
            <text:p>insert into IBGE_MUNICIPIOS (UF, COD_UF, CODIGO_MUNICIPIO, NOME_MUNICIPIO, POP_COLETADA, POP_IMPUTADA, POP_TOTAL) values ('PR', '41', '23105', 'Santa Amélia',3380, 14, 3394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23204" calcext:value-type="float">
            <text:p>23204</text:p>
          </table:table-cell>
          <table:table-cell office:value-type="string" calcext:value-type="string">
            <text:p>Santa Cecília do Pavão</text:p>
          </table:table-cell>
          <table:table-cell office:value-type="float" office:value="3341" calcext:value-type="float">
            <text:p>3341</text:p>
          </table:table-cell>
          <table:table-cell office:value-type="float" office:value="24" calcext:value-type="float">
            <text:p>24</text:p>
          </table:table-cell>
          <table:table-cell office:value-type="float" office:value="3365" calcext:value-type="float">
            <text:p>3365</text:p>
          </table:table-cell>
          <table:table-cell table:formula="of:=CONCATENATE(&quot;insert into IBGE_MUNICIPIOS (UF, COD_UF, CODIGO_MUNICIPIO, NOME_MUNICIPIO, POP_COLETADA, POP_IMPUTADA, POP_TOTAL) values ('&quot;; [.A321]; &quot;', '&quot;; [.B321]; &quot;', '&quot;; [.C321]; &quot;', '&quot;; [.D321]; &quot;',&quot;; [.E321]; &quot;, &quot;; [.F321]; &quot;, &quot;; [.G321]; &quot;);&quot;)" office:value-type="string" office:string-value="insert into IBGE_MUNICIPIOS (UF, COD_UF, CODIGO_MUNICIPIO, NOME_MUNICIPIO, POP_COLETADA, POP_IMPUTADA, POP_TOTAL) values ('PR', '41', '23204', 'Santa Cecília do Pavão',3341, 24, 3365);" calcext:value-type="string">
            <text:p>insert into IBGE_MUNICIPIOS (UF, COD_UF, CODIGO_MUNICIPIO, NOME_MUNICIPIO, POP_COLETADA, POP_IMPUTADA, POP_TOTAL) values ('PR', '41', '23204', 'Santa Cecília do Pavão',3341, 24, 3365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23303" calcext:value-type="float">
            <text:p>23303</text:p>
          </table:table-cell>
          <table:table-cell office:value-type="string" calcext:value-type="string">
            <text:p>Santa Cruz de Monte Castelo</text:p>
          </table:table-cell>
          <table:table-cell office:value-type="float" office:value="8344" calcext:value-type="float">
            <text:p>8344</text:p>
          </table:table-cell>
          <table:table-cell office:value-type="float" office:value="269" calcext:value-type="float">
            <text:p>269</text:p>
          </table:table-cell>
          <table:table-cell office:value-type="float" office:value="8613" calcext:value-type="float">
            <text:p>8613</text:p>
          </table:table-cell>
          <table:table-cell table:formula="of:=CONCATENATE(&quot;insert into IBGE_MUNICIPIOS (UF, COD_UF, CODIGO_MUNICIPIO, NOME_MUNICIPIO, POP_COLETADA, POP_IMPUTADA, POP_TOTAL) values ('&quot;; [.A322]; &quot;', '&quot;; [.B322]; &quot;', '&quot;; [.C322]; &quot;', '&quot;; [.D322]; &quot;',&quot;; [.E322]; &quot;, &quot;; [.F322]; &quot;, &quot;; [.G322]; &quot;);&quot;)" office:value-type="string" office:string-value="insert into IBGE_MUNICIPIOS (UF, COD_UF, CODIGO_MUNICIPIO, NOME_MUNICIPIO, POP_COLETADA, POP_IMPUTADA, POP_TOTAL) values ('PR', '41', '23303', 'Santa Cruz de Monte Castelo',8344, 269, 8613);" calcext:value-type="string">
            <text:p>insert into IBGE_MUNICIPIOS (UF, COD_UF, CODIGO_MUNICIPIO, NOME_MUNICIPIO, POP_COLETADA, POP_IMPUTADA, POP_TOTAL) values ('PR', '41', '23303', 'Santa Cruz de Monte Castelo',8344, 269, 8613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23402" calcext:value-type="float">
            <text:p>23402</text:p>
          </table:table-cell>
          <table:table-cell office:value-type="string" calcext:value-type="string">
            <text:p>Santa Fé</text:p>
          </table:table-cell>
          <table:table-cell office:value-type="float" office:value="11377" calcext:value-type="float">
            <text:p>11377</text:p>
          </table:table-cell>
          <table:table-cell office:value-type="float" office:value="1" calcext:value-type="float">
            <text:p>1</text:p>
          </table:table-cell>
          <table:table-cell office:value-type="float" office:value="11378" calcext:value-type="float">
            <text:p>11378</text:p>
          </table:table-cell>
          <table:table-cell table:formula="of:=CONCATENATE(&quot;insert into IBGE_MUNICIPIOS (UF, COD_UF, CODIGO_MUNICIPIO, NOME_MUNICIPIO, POP_COLETADA, POP_IMPUTADA, POP_TOTAL) values ('&quot;; [.A323]; &quot;', '&quot;; [.B323]; &quot;', '&quot;; [.C323]; &quot;', '&quot;; [.D323]; &quot;',&quot;; [.E323]; &quot;, &quot;; [.F323]; &quot;, &quot;; [.G323]; &quot;);&quot;)" office:value-type="string" office:string-value="insert into IBGE_MUNICIPIOS (UF, COD_UF, CODIGO_MUNICIPIO, NOME_MUNICIPIO, POP_COLETADA, POP_IMPUTADA, POP_TOTAL) values ('PR', '41', '23402', 'Santa Fé',11377, 1, 11378);" calcext:value-type="string">
            <text:p>insert into IBGE_MUNICIPIOS (UF, COD_UF, CODIGO_MUNICIPIO, NOME_MUNICIPIO, POP_COLETADA, POP_IMPUTADA, POP_TOTAL) values ('PR', '41', '23402', 'Santa Fé',11377, 1, 11378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23501" calcext:value-type="float">
            <text:p>23501</text:p>
          </table:table-cell>
          <table:table-cell office:value-type="string" calcext:value-type="string">
            <text:p>Santa Helena</text:p>
          </table:table-cell>
          <table:table-cell office:value-type="float" office:value="24998" calcext:value-type="float">
            <text:p>24998</text:p>
          </table:table-cell>
          <table:table-cell office:value-type="float" office:value="494" calcext:value-type="float">
            <text:p>494</text:p>
          </table:table-cell>
          <table:table-cell office:value-type="float" office:value="25492" calcext:value-type="float">
            <text:p>25492</text:p>
          </table:table-cell>
          <table:table-cell table:formula="of:=CONCATENATE(&quot;insert into IBGE_MUNICIPIOS (UF, COD_UF, CODIGO_MUNICIPIO, NOME_MUNICIPIO, POP_COLETADA, POP_IMPUTADA, POP_TOTAL) values ('&quot;; [.A324]; &quot;', '&quot;; [.B324]; &quot;', '&quot;; [.C324]; &quot;', '&quot;; [.D324]; &quot;',&quot;; [.E324]; &quot;, &quot;; [.F324]; &quot;, &quot;; [.G324]; &quot;);&quot;)" office:value-type="string" office:string-value="insert into IBGE_MUNICIPIOS (UF, COD_UF, CODIGO_MUNICIPIO, NOME_MUNICIPIO, POP_COLETADA, POP_IMPUTADA, POP_TOTAL) values ('PR', '41', '23501', 'Santa Helena',24998, 494, 25492);" calcext:value-type="string">
            <text:p>insert into IBGE_MUNICIPIOS (UF, COD_UF, CODIGO_MUNICIPIO, NOME_MUNICIPIO, POP_COLETADA, POP_IMPUTADA, POP_TOTAL) values ('PR', '41', '23501', 'Santa Helena',24998, 494, 25492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23600" calcext:value-type="float">
            <text:p>23600</text:p>
          </table:table-cell>
          <table:table-cell office:value-type="string" calcext:value-type="string">
            <text:p>Santa Inês</text:p>
          </table:table-cell>
          <table:table-cell office:value-type="float" office:value="1744" calcext:value-type="float">
            <text:p>1744</text:p>
          </table:table-cell>
          <table:table-cell office:value-type="float" office:value="4" calcext:value-type="float">
            <text:p>4</text:p>
          </table:table-cell>
          <table:table-cell office:value-type="float" office:value="1748" calcext:value-type="float">
            <text:p>1748</text:p>
          </table:table-cell>
          <table:table-cell table:formula="of:=CONCATENATE(&quot;insert into IBGE_MUNICIPIOS (UF, COD_UF, CODIGO_MUNICIPIO, NOME_MUNICIPIO, POP_COLETADA, POP_IMPUTADA, POP_TOTAL) values ('&quot;; [.A325]; &quot;', '&quot;; [.B325]; &quot;', '&quot;; [.C325]; &quot;', '&quot;; [.D325]; &quot;',&quot;; [.E325]; &quot;, &quot;; [.F325]; &quot;, &quot;; [.G325]; &quot;);&quot;)" office:value-type="string" office:string-value="insert into IBGE_MUNICIPIOS (UF, COD_UF, CODIGO_MUNICIPIO, NOME_MUNICIPIO, POP_COLETADA, POP_IMPUTADA, POP_TOTAL) values ('PR', '41', '23600', 'Santa Inês',1744, 4, 1748);" calcext:value-type="string">
            <text:p>insert into IBGE_MUNICIPIOS (UF, COD_UF, CODIGO_MUNICIPIO, NOME_MUNICIPIO, POP_COLETADA, POP_IMPUTADA, POP_TOTAL) values ('PR', '41', '23600', 'Santa Inês',1744, 4, 1748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23709" calcext:value-type="float">
            <text:p>23709</text:p>
          </table:table-cell>
          <table:table-cell office:value-type="string" calcext:value-type="string">
            <text:p>Santa Isabel do Ivaí</text:p>
          </table:table-cell>
          <table:table-cell office:value-type="float" office:value="8852" calcext:value-type="float">
            <text:p>8852</text:p>
          </table:table-cell>
          <table:table-cell office:value-type="float" office:value="60" calcext:value-type="float">
            <text:p>60</text:p>
          </table:table-cell>
          <table:table-cell office:value-type="float" office:value="8912" calcext:value-type="float">
            <text:p>8912</text:p>
          </table:table-cell>
          <table:table-cell table:formula="of:=CONCATENATE(&quot;insert into IBGE_MUNICIPIOS (UF, COD_UF, CODIGO_MUNICIPIO, NOME_MUNICIPIO, POP_COLETADA, POP_IMPUTADA, POP_TOTAL) values ('&quot;; [.A326]; &quot;', '&quot;; [.B326]; &quot;', '&quot;; [.C326]; &quot;', '&quot;; [.D326]; &quot;',&quot;; [.E326]; &quot;, &quot;; [.F326]; &quot;, &quot;; [.G326]; &quot;);&quot;)" office:value-type="string" office:string-value="insert into IBGE_MUNICIPIOS (UF, COD_UF, CODIGO_MUNICIPIO, NOME_MUNICIPIO, POP_COLETADA, POP_IMPUTADA, POP_TOTAL) values ('PR', '41', '23709', 'Santa Isabel do Ivaí',8852, 60, 8912);" calcext:value-type="string">
            <text:p>insert into IBGE_MUNICIPIOS (UF, COD_UF, CODIGO_MUNICIPIO, NOME_MUNICIPIO, POP_COLETADA, POP_IMPUTADA, POP_TOTAL) values ('PR', '41', '23709', 'Santa Isabel do Ivaí',8852, 60, 8912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23808" calcext:value-type="float">
            <text:p>23808</text:p>
          </table:table-cell>
          <table:table-cell office:value-type="string" calcext:value-type="string">
            <text:p>Santa Izabel do Oeste</text:p>
          </table:table-cell>
          <table:table-cell office:value-type="float" office:value="14061" calcext:value-type="float">
            <text:p>14061</text:p>
          </table:table-cell>
          <table:table-cell office:value-type="float" office:value="9" calcext:value-type="float">
            <text:p>9</text:p>
          </table:table-cell>
          <table:table-cell office:value-type="float" office:value="14070" calcext:value-type="float">
            <text:p>14070</text:p>
          </table:table-cell>
          <table:table-cell table:formula="of:=CONCATENATE(&quot;insert into IBGE_MUNICIPIOS (UF, COD_UF, CODIGO_MUNICIPIO, NOME_MUNICIPIO, POP_COLETADA, POP_IMPUTADA, POP_TOTAL) values ('&quot;; [.A327]; &quot;', '&quot;; [.B327]; &quot;', '&quot;; [.C327]; &quot;', '&quot;; [.D327]; &quot;',&quot;; [.E327]; &quot;, &quot;; [.F327]; &quot;, &quot;; [.G327]; &quot;);&quot;)" office:value-type="string" office:string-value="insert into IBGE_MUNICIPIOS (UF, COD_UF, CODIGO_MUNICIPIO, NOME_MUNICIPIO, POP_COLETADA, POP_IMPUTADA, POP_TOTAL) values ('PR', '41', '23808', 'Santa Izabel do Oeste',14061, 9, 14070);" calcext:value-type="string">
            <text:p>insert into IBGE_MUNICIPIOS (UF, COD_UF, CODIGO_MUNICIPIO, NOME_MUNICIPIO, POP_COLETADA, POP_IMPUTADA, POP_TOTAL) values ('PR', '41', '23808', 'Santa Izabel do Oeste',14061, 9, 14070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23824" calcext:value-type="float">
            <text:p>23824</text:p>
          </table:table-cell>
          <table:table-cell office:value-type="string" calcext:value-type="string">
            <text:p>Santa Lúcia</text:p>
          </table:table-cell>
          <table:table-cell office:value-type="float" office:value="3637" calcext:value-type="float">
            <text:p>3637</text:p>
          </table:table-cell>
          <table:table-cell office:value-type="float" office:value="7" calcext:value-type="float">
            <text:p>7</text:p>
          </table:table-cell>
          <table:table-cell office:value-type="float" office:value="3644" calcext:value-type="float">
            <text:p>3644</text:p>
          </table:table-cell>
          <table:table-cell table:formula="of:=CONCATENATE(&quot;insert into IBGE_MUNICIPIOS (UF, COD_UF, CODIGO_MUNICIPIO, NOME_MUNICIPIO, POP_COLETADA, POP_IMPUTADA, POP_TOTAL) values ('&quot;; [.A328]; &quot;', '&quot;; [.B328]; &quot;', '&quot;; [.C328]; &quot;', '&quot;; [.D328]; &quot;',&quot;; [.E328]; &quot;, &quot;; [.F328]; &quot;, &quot;; [.G328]; &quot;);&quot;)" office:value-type="string" office:string-value="insert into IBGE_MUNICIPIOS (UF, COD_UF, CODIGO_MUNICIPIO, NOME_MUNICIPIO, POP_COLETADA, POP_IMPUTADA, POP_TOTAL) values ('PR', '41', '23824', 'Santa Lúcia',3637, 7, 3644);" calcext:value-type="string">
            <text:p>insert into IBGE_MUNICIPIOS (UF, COD_UF, CODIGO_MUNICIPIO, NOME_MUNICIPIO, POP_COLETADA, POP_IMPUTADA, POP_TOTAL) values ('PR', '41', '23824', 'Santa Lúcia',3637, 7, 3644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23857" calcext:value-type="float">
            <text:p>23857</text:p>
          </table:table-cell>
          <table:table-cell office:value-type="string" calcext:value-type="string">
            <text:p>Santa Maria do Oeste</text:p>
          </table:table-cell>
          <table:table-cell office:value-type="float" office:value="9844" calcext:value-type="float">
            <text:p>9844</text:p>
          </table:table-cell>
          <table:table-cell office:value-type="float" office:value="90" calcext:value-type="float">
            <text:p>90</text:p>
          </table:table-cell>
          <table:table-cell office:value-type="float" office:value="9934" calcext:value-type="float">
            <text:p>9934</text:p>
          </table:table-cell>
          <table:table-cell table:formula="of:=CONCATENATE(&quot;insert into IBGE_MUNICIPIOS (UF, COD_UF, CODIGO_MUNICIPIO, NOME_MUNICIPIO, POP_COLETADA, POP_IMPUTADA, POP_TOTAL) values ('&quot;; [.A329]; &quot;', '&quot;; [.B329]; &quot;', '&quot;; [.C329]; &quot;', '&quot;; [.D329]; &quot;',&quot;; [.E329]; &quot;, &quot;; [.F329]; &quot;, &quot;; [.G329]; &quot;);&quot;)" office:value-type="string" office:string-value="insert into IBGE_MUNICIPIOS (UF, COD_UF, CODIGO_MUNICIPIO, NOME_MUNICIPIO, POP_COLETADA, POP_IMPUTADA, POP_TOTAL) values ('PR', '41', '23857', 'Santa Maria do Oeste',9844, 90, 9934);" calcext:value-type="string">
            <text:p>insert into IBGE_MUNICIPIOS (UF, COD_UF, CODIGO_MUNICIPIO, NOME_MUNICIPIO, POP_COLETADA, POP_IMPUTADA, POP_TOTAL) values ('PR', '41', '23857', 'Santa Maria do Oeste',9844, 90, 9934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23907" calcext:value-type="float">
            <text:p>23907</text:p>
          </table:table-cell>
          <table:table-cell office:value-type="string" calcext:value-type="string">
            <text:p>Santa Mariana</text:p>
          </table:table-cell>
          <table:table-cell office:value-type="float" office:value="10862" calcext:value-type="float">
            <text:p>10862</text:p>
          </table:table-cell>
          <table:table-cell office:value-type="float" office:value="204" calcext:value-type="float">
            <text:p>204</text:p>
          </table:table-cell>
          <table:table-cell office:value-type="float" office:value="11066" calcext:value-type="float">
            <text:p>11066</text:p>
          </table:table-cell>
          <table:table-cell table:formula="of:=CONCATENATE(&quot;insert into IBGE_MUNICIPIOS (UF, COD_UF, CODIGO_MUNICIPIO, NOME_MUNICIPIO, POP_COLETADA, POP_IMPUTADA, POP_TOTAL) values ('&quot;; [.A330]; &quot;', '&quot;; [.B330]; &quot;', '&quot;; [.C330]; &quot;', '&quot;; [.D330]; &quot;',&quot;; [.E330]; &quot;, &quot;; [.F330]; &quot;, &quot;; [.G330]; &quot;);&quot;)" office:value-type="string" office:string-value="insert into IBGE_MUNICIPIOS (UF, COD_UF, CODIGO_MUNICIPIO, NOME_MUNICIPIO, POP_COLETADA, POP_IMPUTADA, POP_TOTAL) values ('PR', '41', '23907', 'Santa Mariana',10862, 204, 11066);" calcext:value-type="string">
            <text:p>insert into IBGE_MUNICIPIOS (UF, COD_UF, CODIGO_MUNICIPIO, NOME_MUNICIPIO, POP_COLETADA, POP_IMPUTADA, POP_TOTAL) values ('PR', '41', '23907', 'Santa Mariana',10862, 204, 11066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23956" calcext:value-type="float">
            <text:p>23956</text:p>
          </table:table-cell>
          <table:table-cell office:value-type="string" calcext:value-type="string">
            <text:p>Santa Mônica</text:p>
          </table:table-cell>
          <table:table-cell office:value-type="float" office:value="3351" calcext:value-type="float">
            <text:p>3351</text:p>
          </table:table-cell>
          <table:table-cell office:value-type="float" office:value="5" calcext:value-type="float">
            <text:p>5</text:p>
          </table:table-cell>
          <table:table-cell office:value-type="float" office:value="3356" calcext:value-type="float">
            <text:p>3356</text:p>
          </table:table-cell>
          <table:table-cell table:formula="of:=CONCATENATE(&quot;insert into IBGE_MUNICIPIOS (UF, COD_UF, CODIGO_MUNICIPIO, NOME_MUNICIPIO, POP_COLETADA, POP_IMPUTADA, POP_TOTAL) values ('&quot;; [.A331]; &quot;', '&quot;; [.B331]; &quot;', '&quot;; [.C331]; &quot;', '&quot;; [.D331]; &quot;',&quot;; [.E331]; &quot;, &quot;; [.F331]; &quot;, &quot;; [.G331]; &quot;);&quot;)" office:value-type="string" office:string-value="insert into IBGE_MUNICIPIOS (UF, COD_UF, CODIGO_MUNICIPIO, NOME_MUNICIPIO, POP_COLETADA, POP_IMPUTADA, POP_TOTAL) values ('PR', '41', '23956', 'Santa Mônica',3351, 5, 3356);" calcext:value-type="string">
            <text:p>insert into IBGE_MUNICIPIOS (UF, COD_UF, CODIGO_MUNICIPIO, NOME_MUNICIPIO, POP_COLETADA, POP_IMPUTADA, POP_TOTAL) values ('PR', '41', '23956', 'Santa Mônica',3351, 5, 3356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24004" calcext:value-type="float">
            <text:p>24004</text:p>
          </table:table-cell>
          <table:table-cell office:value-type="string" calcext:value-type="string">
            <text:p>Santana do Itararé</text:p>
          </table:table-cell>
          <table:table-cell office:value-type="float" office:value="5508" calcext:value-type="float">
            <text:p>5508</text:p>
          </table:table-cell>
          <table:table-cell office:value-type="float" office:value="6" calcext:value-type="float">
            <text:p>6</text:p>
          </table:table-cell>
          <table:table-cell office:value-type="float" office:value="5514" calcext:value-type="float">
            <text:p>5514</text:p>
          </table:table-cell>
          <table:table-cell table:formula="of:=CONCATENATE(&quot;insert into IBGE_MUNICIPIOS (UF, COD_UF, CODIGO_MUNICIPIO, NOME_MUNICIPIO, POP_COLETADA, POP_IMPUTADA, POP_TOTAL) values ('&quot;; [.A332]; &quot;', '&quot;; [.B332]; &quot;', '&quot;; [.C332]; &quot;', '&quot;; [.D332]; &quot;',&quot;; [.E332]; &quot;, &quot;; [.F332]; &quot;, &quot;; [.G332]; &quot;);&quot;)" office:value-type="string" office:string-value="insert into IBGE_MUNICIPIOS (UF, COD_UF, CODIGO_MUNICIPIO, NOME_MUNICIPIO, POP_COLETADA, POP_IMPUTADA, POP_TOTAL) values ('PR', '41', '24004', 'Santana do Itararé',5508, 6, 5514);" calcext:value-type="string">
            <text:p>insert into IBGE_MUNICIPIOS (UF, COD_UF, CODIGO_MUNICIPIO, NOME_MUNICIPIO, POP_COLETADA, POP_IMPUTADA, POP_TOTAL) values ('PR', '41', '24004', 'Santana do Itararé',5508, 6, 5514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24020" calcext:value-type="float">
            <text:p>24020</text:p>
          </table:table-cell>
          <table:table-cell office:value-type="string" calcext:value-type="string">
            <text:p>Santa Tereza do Oeste</text:p>
          </table:table-cell>
          <table:table-cell office:value-type="float" office:value="12319" calcext:value-type="float">
            <text:p>12319</text:p>
          </table:table-cell>
          <table:table-cell office:value-type="float" office:value="855" calcext:value-type="float">
            <text:p>855</text:p>
          </table:table-cell>
          <table:table-cell office:value-type="float" office:value="13174" calcext:value-type="float">
            <text:p>13174</text:p>
          </table:table-cell>
          <table:table-cell table:formula="of:=CONCATENATE(&quot;insert into IBGE_MUNICIPIOS (UF, COD_UF, CODIGO_MUNICIPIO, NOME_MUNICIPIO, POP_COLETADA, POP_IMPUTADA, POP_TOTAL) values ('&quot;; [.A333]; &quot;', '&quot;; [.B333]; &quot;', '&quot;; [.C333]; &quot;', '&quot;; [.D333]; &quot;',&quot;; [.E333]; &quot;, &quot;; [.F333]; &quot;, &quot;; [.G333]; &quot;);&quot;)" office:value-type="string" office:string-value="insert into IBGE_MUNICIPIOS (UF, COD_UF, CODIGO_MUNICIPIO, NOME_MUNICIPIO, POP_COLETADA, POP_IMPUTADA, POP_TOTAL) values ('PR', '41', '24020', 'Santa Tereza do Oeste',12319, 855, 13174);" calcext:value-type="string">
            <text:p>insert into IBGE_MUNICIPIOS (UF, COD_UF, CODIGO_MUNICIPIO, NOME_MUNICIPIO, POP_COLETADA, POP_IMPUTADA, POP_TOTAL) values ('PR', '41', '24020', 'Santa Tereza do Oeste',12319, 855, 13174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24053" calcext:value-type="float">
            <text:p>24053</text:p>
          </table:table-cell>
          <table:table-cell office:value-type="string" calcext:value-type="string">
            <text:p>Santa Terezinha de Itaipu</text:p>
          </table:table-cell>
          <table:table-cell office:value-type="float" office:value="22904" calcext:value-type="float">
            <text:p>22904</text:p>
          </table:table-cell>
          <table:table-cell office:value-type="float" office:value="1358" calcext:value-type="float">
            <text:p>1358</text:p>
          </table:table-cell>
          <table:table-cell office:value-type="float" office:value="24262" calcext:value-type="float">
            <text:p>24262</text:p>
          </table:table-cell>
          <table:table-cell table:formula="of:=CONCATENATE(&quot;insert into IBGE_MUNICIPIOS (UF, COD_UF, CODIGO_MUNICIPIO, NOME_MUNICIPIO, POP_COLETADA, POP_IMPUTADA, POP_TOTAL) values ('&quot;; [.A334]; &quot;', '&quot;; [.B334]; &quot;', '&quot;; [.C334]; &quot;', '&quot;; [.D334]; &quot;',&quot;; [.E334]; &quot;, &quot;; [.F334]; &quot;, &quot;; [.G334]; &quot;);&quot;)" office:value-type="string" office:string-value="insert into IBGE_MUNICIPIOS (UF, COD_UF, CODIGO_MUNICIPIO, NOME_MUNICIPIO, POP_COLETADA, POP_IMPUTADA, POP_TOTAL) values ('PR', '41', '24053', 'Santa Terezinha de Itaipu',22904, 1358, 24262);" calcext:value-type="string">
            <text:p>insert into IBGE_MUNICIPIOS (UF, COD_UF, CODIGO_MUNICIPIO, NOME_MUNICIPIO, POP_COLETADA, POP_IMPUTADA, POP_TOTAL) values ('PR', '41', '24053', 'Santa Terezinha de Itaipu',22904, 1358, 24262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24103" calcext:value-type="float">
            <text:p>24103</text:p>
          </table:table-cell>
          <table:table-cell office:value-type="string" calcext:value-type="string">
            <text:p>Santo Antônio da Platina</text:p>
          </table:table-cell>
          <table:table-cell office:value-type="float" office:value="43854" calcext:value-type="float">
            <text:p>43854</text:p>
          </table:table-cell>
          <table:table-cell office:value-type="float" office:value="515" calcext:value-type="float">
            <text:p>515</text:p>
          </table:table-cell>
          <table:table-cell office:value-type="float" office:value="44369" calcext:value-type="float">
            <text:p>44369</text:p>
          </table:table-cell>
          <table:table-cell table:formula="of:=CONCATENATE(&quot;insert into IBGE_MUNICIPIOS (UF, COD_UF, CODIGO_MUNICIPIO, NOME_MUNICIPIO, POP_COLETADA, POP_IMPUTADA, POP_TOTAL) values ('&quot;; [.A335]; &quot;', '&quot;; [.B335]; &quot;', '&quot;; [.C335]; &quot;', '&quot;; [.D335]; &quot;',&quot;; [.E335]; &quot;, &quot;; [.F335]; &quot;, &quot;; [.G335]; &quot;);&quot;)" office:value-type="string" office:string-value="insert into IBGE_MUNICIPIOS (UF, COD_UF, CODIGO_MUNICIPIO, NOME_MUNICIPIO, POP_COLETADA, POP_IMPUTADA, POP_TOTAL) values ('PR', '41', '24103', 'Santo Antônio da Platina',43854, 515, 44369);" calcext:value-type="string">
            <text:p>insert into IBGE_MUNICIPIOS (UF, COD_UF, CODIGO_MUNICIPIO, NOME_MUNICIPIO, POP_COLETADA, POP_IMPUTADA, POP_TOTAL) values ('PR', '41', '24103', 'Santo Antônio da Platina',43854, 515, 44369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24202" calcext:value-type="float">
            <text:p>24202</text:p>
          </table:table-cell>
          <table:table-cell office:value-type="string" calcext:value-type="string">
            <text:p>Santo Antônio do Caiuá</text:p>
          </table:table-cell>
          <table:table-cell office:value-type="float" office:value="2424" calcext:value-type="float">
            <text:p>2424</text:p>
          </table:table-cell>
          <table:table-cell office:value-type="float" office:value="69" calcext:value-type="float">
            <text:p>69</text:p>
          </table:table-cell>
          <table:table-cell office:value-type="float" office:value="2493" calcext:value-type="float">
            <text:p>2493</text:p>
          </table:table-cell>
          <table:table-cell table:formula="of:=CONCATENATE(&quot;insert into IBGE_MUNICIPIOS (UF, COD_UF, CODIGO_MUNICIPIO, NOME_MUNICIPIO, POP_COLETADA, POP_IMPUTADA, POP_TOTAL) values ('&quot;; [.A336]; &quot;', '&quot;; [.B336]; &quot;', '&quot;; [.C336]; &quot;', '&quot;; [.D336]; &quot;',&quot;; [.E336]; &quot;, &quot;; [.F336]; &quot;, &quot;; [.G336]; &quot;);&quot;)" office:value-type="string" office:string-value="insert into IBGE_MUNICIPIOS (UF, COD_UF, CODIGO_MUNICIPIO, NOME_MUNICIPIO, POP_COLETADA, POP_IMPUTADA, POP_TOTAL) values ('PR', '41', '24202', 'Santo Antônio do Caiuá',2424, 69, 2493);" calcext:value-type="string">
            <text:p>insert into IBGE_MUNICIPIOS (UF, COD_UF, CODIGO_MUNICIPIO, NOME_MUNICIPIO, POP_COLETADA, POP_IMPUTADA, POP_TOTAL) values ('PR', '41', '24202', 'Santo Antônio do Caiuá',2424, 69, 2493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24301" calcext:value-type="float">
            <text:p>24301</text:p>
          </table:table-cell>
          <table:table-cell office:value-type="string" calcext:value-type="string">
            <text:p>Santo Antônio do Paraíso</text:p>
          </table:table-cell>
          <table:table-cell office:value-type="float" office:value="2105" calcext:value-type="float">
            <text:p>2105</text:p>
          </table:table-cell>
          <table:table-cell office:value-type="float" office:value="20" calcext:value-type="float">
            <text:p>20</text:p>
          </table:table-cell>
          <table:table-cell office:value-type="float" office:value="2125" calcext:value-type="float">
            <text:p>2125</text:p>
          </table:table-cell>
          <table:table-cell table:formula="of:=CONCATENATE(&quot;insert into IBGE_MUNICIPIOS (UF, COD_UF, CODIGO_MUNICIPIO, NOME_MUNICIPIO, POP_COLETADA, POP_IMPUTADA, POP_TOTAL) values ('&quot;; [.A337]; &quot;', '&quot;; [.B337]; &quot;', '&quot;; [.C337]; &quot;', '&quot;; [.D337]; &quot;',&quot;; [.E337]; &quot;, &quot;; [.F337]; &quot;, &quot;; [.G337]; &quot;);&quot;)" office:value-type="string" office:string-value="insert into IBGE_MUNICIPIOS (UF, COD_UF, CODIGO_MUNICIPIO, NOME_MUNICIPIO, POP_COLETADA, POP_IMPUTADA, POP_TOTAL) values ('PR', '41', '24301', 'Santo Antônio do Paraíso',2105, 20, 2125);" calcext:value-type="string">
            <text:p>insert into IBGE_MUNICIPIOS (UF, COD_UF, CODIGO_MUNICIPIO, NOME_MUNICIPIO, POP_COLETADA, POP_IMPUTADA, POP_TOTAL) values ('PR', '41', '24301', 'Santo Antônio do Paraíso',2105, 20, 2125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24400" calcext:value-type="float">
            <text:p>24400</text:p>
          </table:table-cell>
          <table:table-cell office:value-type="string" calcext:value-type="string">
            <text:p>Santo Antônio do Sudoeste</text:p>
          </table:table-cell>
          <table:table-cell office:value-type="float" office:value="23110" calcext:value-type="float">
            <text:p>23110</text:p>
          </table:table-cell>
          <table:table-cell office:value-type="float" office:value="563" calcext:value-type="float">
            <text:p>563</text:p>
          </table:table-cell>
          <table:table-cell office:value-type="float" office:value="23673" calcext:value-type="float">
            <text:p>23673</text:p>
          </table:table-cell>
          <table:table-cell table:formula="of:=CONCATENATE(&quot;insert into IBGE_MUNICIPIOS (UF, COD_UF, CODIGO_MUNICIPIO, NOME_MUNICIPIO, POP_COLETADA, POP_IMPUTADA, POP_TOTAL) values ('&quot;; [.A338]; &quot;', '&quot;; [.B338]; &quot;', '&quot;; [.C338]; &quot;', '&quot;; [.D338]; &quot;',&quot;; [.E338]; &quot;, &quot;; [.F338]; &quot;, &quot;; [.G338]; &quot;);&quot;)" office:value-type="string" office:string-value="insert into IBGE_MUNICIPIOS (UF, COD_UF, CODIGO_MUNICIPIO, NOME_MUNICIPIO, POP_COLETADA, POP_IMPUTADA, POP_TOTAL) values ('PR', '41', '24400', 'Santo Antônio do Sudoeste',23110, 563, 23673);" calcext:value-type="string">
            <text:p>insert into IBGE_MUNICIPIOS (UF, COD_UF, CODIGO_MUNICIPIO, NOME_MUNICIPIO, POP_COLETADA, POP_IMPUTADA, POP_TOTAL) values ('PR', '41', '24400', 'Santo Antônio do Sudoeste',23110, 563, 23673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24509" calcext:value-type="float">
            <text:p>24509</text:p>
          </table:table-cell>
          <table:table-cell office:value-type="string" calcext:value-type="string">
            <text:p>Santo Inácio</text:p>
          </table:table-cell>
          <table:table-cell office:value-type="float" office:value="6168" calcext:value-type="float">
            <text:p>6168</text:p>
          </table:table-cell>
          <table:table-cell office:value-type="float" office:value="13" calcext:value-type="float">
            <text:p>13</text:p>
          </table:table-cell>
          <table:table-cell office:value-type="float" office:value="6181" calcext:value-type="float">
            <text:p>6181</text:p>
          </table:table-cell>
          <table:table-cell table:formula="of:=CONCATENATE(&quot;insert into IBGE_MUNICIPIOS (UF, COD_UF, CODIGO_MUNICIPIO, NOME_MUNICIPIO, POP_COLETADA, POP_IMPUTADA, POP_TOTAL) values ('&quot;; [.A339]; &quot;', '&quot;; [.B339]; &quot;', '&quot;; [.C339]; &quot;', '&quot;; [.D339]; &quot;',&quot;; [.E339]; &quot;, &quot;; [.F339]; &quot;, &quot;; [.G339]; &quot;);&quot;)" office:value-type="string" office:string-value="insert into IBGE_MUNICIPIOS (UF, COD_UF, CODIGO_MUNICIPIO, NOME_MUNICIPIO, POP_COLETADA, POP_IMPUTADA, POP_TOTAL) values ('PR', '41', '24509', 'Santo Inácio',6168, 13, 6181);" calcext:value-type="string">
            <text:p>insert into IBGE_MUNICIPIOS (UF, COD_UF, CODIGO_MUNICIPIO, NOME_MUNICIPIO, POP_COLETADA, POP_IMPUTADA, POP_TOTAL) values ('PR', '41', '24509', 'Santo Inácio',6168, 13, 6181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24608" calcext:value-type="float">
            <text:p>24608</text:p>
          </table:table-cell>
          <table:table-cell office:value-type="string" calcext:value-type="string">
            <text:p>São Carlos do Ivaí</text:p>
          </table:table-cell>
          <table:table-cell office:value-type="float" office:value="6549" calcext:value-type="float">
            <text:p>6549</text:p>
          </table:table-cell>
          <table:table-cell office:value-type="float" office:value="38" calcext:value-type="float">
            <text:p>38</text:p>
          </table:table-cell>
          <table:table-cell office:value-type="float" office:value="6587" calcext:value-type="float">
            <text:p>6587</text:p>
          </table:table-cell>
          <table:table-cell table:formula="of:=CONCATENATE(&quot;insert into IBGE_MUNICIPIOS (UF, COD_UF, CODIGO_MUNICIPIO, NOME_MUNICIPIO, POP_COLETADA, POP_IMPUTADA, POP_TOTAL) values ('&quot;; [.A340]; &quot;', '&quot;; [.B340]; &quot;', '&quot;; [.C340]; &quot;', '&quot;; [.D340]; &quot;',&quot;; [.E340]; &quot;, &quot;; [.F340]; &quot;, &quot;; [.G340]; &quot;);&quot;)" office:value-type="string" office:string-value="insert into IBGE_MUNICIPIOS (UF, COD_UF, CODIGO_MUNICIPIO, NOME_MUNICIPIO, POP_COLETADA, POP_IMPUTADA, POP_TOTAL) values ('PR', '41', '24608', 'São Carlos do Ivaí',6549, 38, 6587);" calcext:value-type="string">
            <text:p>insert into IBGE_MUNICIPIOS (UF, COD_UF, CODIGO_MUNICIPIO, NOME_MUNICIPIO, POP_COLETADA, POP_IMPUTADA, POP_TOTAL) values ('PR', '41', '24608', 'São Carlos do Ivaí',6549, 38, 6587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24707" calcext:value-type="float">
            <text:p>24707</text:p>
          </table:table-cell>
          <table:table-cell office:value-type="string" calcext:value-type="string">
            <text:p>São Jerônimo da Serra</text:p>
          </table:table-cell>
          <table:table-cell office:value-type="float" office:value="10816" calcext:value-type="float">
            <text:p>10816</text:p>
          </table:table-cell>
          <table:table-cell office:value-type="float" office:value="14" calcext:value-type="float">
            <text:p>14</text:p>
          </table:table-cell>
          <table:table-cell office:value-type="float" office:value="10830" calcext:value-type="float">
            <text:p>10830</text:p>
          </table:table-cell>
          <table:table-cell table:formula="of:=CONCATENATE(&quot;insert into IBGE_MUNICIPIOS (UF, COD_UF, CODIGO_MUNICIPIO, NOME_MUNICIPIO, POP_COLETADA, POP_IMPUTADA, POP_TOTAL) values ('&quot;; [.A341]; &quot;', '&quot;; [.B341]; &quot;', '&quot;; [.C341]; &quot;', '&quot;; [.D341]; &quot;',&quot;; [.E341]; &quot;, &quot;; [.F341]; &quot;, &quot;; [.G341]; &quot;);&quot;)" office:value-type="string" office:string-value="insert into IBGE_MUNICIPIOS (UF, COD_UF, CODIGO_MUNICIPIO, NOME_MUNICIPIO, POP_COLETADA, POP_IMPUTADA, POP_TOTAL) values ('PR', '41', '24707', 'São Jerônimo da Serra',10816, 14, 10830);" calcext:value-type="string">
            <text:p>insert into IBGE_MUNICIPIOS (UF, COD_UF, CODIGO_MUNICIPIO, NOME_MUNICIPIO, POP_COLETADA, POP_IMPUTADA, POP_TOTAL) values ('PR', '41', '24707', 'São Jerônimo da Serra',10816, 14, 10830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24806" calcext:value-type="float">
            <text:p>24806</text:p>
          </table:table-cell>
          <table:table-cell office:value-type="string" calcext:value-type="string">
            <text:p>São João</text:p>
          </table:table-cell>
          <table:table-cell office:value-type="float" office:value="11648" calcext:value-type="float">
            <text:p>11648</text:p>
          </table:table-cell>
          <table:table-cell office:value-type="float" office:value="238" calcext:value-type="float">
            <text:p>238</text:p>
          </table:table-cell>
          <table:table-cell office:value-type="float" office:value="11886" calcext:value-type="float">
            <text:p>11886</text:p>
          </table:table-cell>
          <table:table-cell table:formula="of:=CONCATENATE(&quot;insert into IBGE_MUNICIPIOS (UF, COD_UF, CODIGO_MUNICIPIO, NOME_MUNICIPIO, POP_COLETADA, POP_IMPUTADA, POP_TOTAL) values ('&quot;; [.A342]; &quot;', '&quot;; [.B342]; &quot;', '&quot;; [.C342]; &quot;', '&quot;; [.D342]; &quot;',&quot;; [.E342]; &quot;, &quot;; [.F342]; &quot;, &quot;; [.G342]; &quot;);&quot;)" office:value-type="string" office:string-value="insert into IBGE_MUNICIPIOS (UF, COD_UF, CODIGO_MUNICIPIO, NOME_MUNICIPIO, POP_COLETADA, POP_IMPUTADA, POP_TOTAL) values ('PR', '41', '24806', 'São João',11648, 238, 11886);" calcext:value-type="string">
            <text:p>insert into IBGE_MUNICIPIOS (UF, COD_UF, CODIGO_MUNICIPIO, NOME_MUNICIPIO, POP_COLETADA, POP_IMPUTADA, POP_TOTAL) values ('PR', '41', '24806', 'São João',11648, 238, 11886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24905" calcext:value-type="float">
            <text:p>24905</text:p>
          </table:table-cell>
          <table:table-cell office:value-type="string" calcext:value-type="string">
            <text:p>São João do Caiuá</text:p>
          </table:table-cell>
          <table:table-cell office:value-type="float" office:value="5481" calcext:value-type="float">
            <text:p>5481</text:p>
          </table:table-cell>
          <table:table-cell office:value-type="float" office:value="105" calcext:value-type="float">
            <text:p>105</text:p>
          </table:table-cell>
          <table:table-cell office:value-type="float" office:value="5586" calcext:value-type="float">
            <text:p>5586</text:p>
          </table:table-cell>
          <table:table-cell table:formula="of:=CONCATENATE(&quot;insert into IBGE_MUNICIPIOS (UF, COD_UF, CODIGO_MUNICIPIO, NOME_MUNICIPIO, POP_COLETADA, POP_IMPUTADA, POP_TOTAL) values ('&quot;; [.A343]; &quot;', '&quot;; [.B343]; &quot;', '&quot;; [.C343]; &quot;', '&quot;; [.D343]; &quot;',&quot;; [.E343]; &quot;, &quot;; [.F343]; &quot;, &quot;; [.G343]; &quot;);&quot;)" office:value-type="string" office:string-value="insert into IBGE_MUNICIPIOS (UF, COD_UF, CODIGO_MUNICIPIO, NOME_MUNICIPIO, POP_COLETADA, POP_IMPUTADA, POP_TOTAL) values ('PR', '41', '24905', 'São João do Caiuá',5481, 105, 5586);" calcext:value-type="string">
            <text:p>insert into IBGE_MUNICIPIOS (UF, COD_UF, CODIGO_MUNICIPIO, NOME_MUNICIPIO, POP_COLETADA, POP_IMPUTADA, POP_TOTAL) values ('PR', '41', '24905', 'São João do Caiuá',5481, 105, 5586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25001" calcext:value-type="float">
            <text:p>25001</text:p>
          </table:table-cell>
          <table:table-cell office:value-type="string" calcext:value-type="string">
            <text:p>São João do Ivaí</text:p>
          </table:table-cell>
          <table:table-cell office:value-type="float" office:value="10642" calcext:value-type="float">
            <text:p>10642</text:p>
          </table:table-cell>
          <table:table-cell office:value-type="float" office:value="25" calcext:value-type="float">
            <text:p>25</text:p>
          </table:table-cell>
          <table:table-cell office:value-type="float" office:value="10667" calcext:value-type="float">
            <text:p>10667</text:p>
          </table:table-cell>
          <table:table-cell table:formula="of:=CONCATENATE(&quot;insert into IBGE_MUNICIPIOS (UF, COD_UF, CODIGO_MUNICIPIO, NOME_MUNICIPIO, POP_COLETADA, POP_IMPUTADA, POP_TOTAL) values ('&quot;; [.A344]; &quot;', '&quot;; [.B344]; &quot;', '&quot;; [.C344]; &quot;', '&quot;; [.D344]; &quot;',&quot;; [.E344]; &quot;, &quot;; [.F344]; &quot;, &quot;; [.G344]; &quot;);&quot;)" office:value-type="string" office:string-value="insert into IBGE_MUNICIPIOS (UF, COD_UF, CODIGO_MUNICIPIO, NOME_MUNICIPIO, POP_COLETADA, POP_IMPUTADA, POP_TOTAL) values ('PR', '41', '25001', 'São João do Ivaí',10642, 25, 10667);" calcext:value-type="string">
            <text:p>insert into IBGE_MUNICIPIOS (UF, COD_UF, CODIGO_MUNICIPIO, NOME_MUNICIPIO, POP_COLETADA, POP_IMPUTADA, POP_TOTAL) values ('PR', '41', '25001', 'São João do Ivaí',10642, 25, 10667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25100" calcext:value-type="float">
            <text:p>25100</text:p>
          </table:table-cell>
          <table:table-cell office:value-type="string" calcext:value-type="string">
            <text:p>São João do Triunfo</text:p>
          </table:table-cell>
          <table:table-cell office:value-type="float" office:value="13596" calcext:value-type="float">
            <text:p>13596</text:p>
          </table:table-cell>
          <table:table-cell office:value-type="float" office:value="130" calcext:value-type="float">
            <text:p>130</text:p>
          </table:table-cell>
          <table:table-cell office:value-type="float" office:value="13726" calcext:value-type="float">
            <text:p>13726</text:p>
          </table:table-cell>
          <table:table-cell table:formula="of:=CONCATENATE(&quot;insert into IBGE_MUNICIPIOS (UF, COD_UF, CODIGO_MUNICIPIO, NOME_MUNICIPIO, POP_COLETADA, POP_IMPUTADA, POP_TOTAL) values ('&quot;; [.A345]; &quot;', '&quot;; [.B345]; &quot;', '&quot;; [.C345]; &quot;', '&quot;; [.D345]; &quot;',&quot;; [.E345]; &quot;, &quot;; [.F345]; &quot;, &quot;; [.G345]; &quot;);&quot;)" office:value-type="string" office:string-value="insert into IBGE_MUNICIPIOS (UF, COD_UF, CODIGO_MUNICIPIO, NOME_MUNICIPIO, POP_COLETADA, POP_IMPUTADA, POP_TOTAL) values ('PR', '41', '25100', 'São João do Triunfo',13596, 130, 13726);" calcext:value-type="string">
            <text:p>insert into IBGE_MUNICIPIOS (UF, COD_UF, CODIGO_MUNICIPIO, NOME_MUNICIPIO, POP_COLETADA, POP_IMPUTADA, POP_TOTAL) values ('PR', '41', '25100', 'São João do Triunfo',13596, 130, 13726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25209" calcext:value-type="float">
            <text:p>25209</text:p>
          </table:table-cell>
          <table:table-cell office:value-type="string" calcext:value-type="string">
            <text:p>São Jorge do Oeste</text:p>
          </table:table-cell>
          <table:table-cell office:value-type="float" office:value="9337" calcext:value-type="float">
            <text:p>9337</text:p>
          </table:table-cell>
          <table:table-cell office:value-type="float" office:value="41" calcext:value-type="float">
            <text:p>41</text:p>
          </table:table-cell>
          <table:table-cell office:value-type="float" office:value="9378" calcext:value-type="float">
            <text:p>9378</text:p>
          </table:table-cell>
          <table:table-cell table:formula="of:=CONCATENATE(&quot;insert into IBGE_MUNICIPIOS (UF, COD_UF, CODIGO_MUNICIPIO, NOME_MUNICIPIO, POP_COLETADA, POP_IMPUTADA, POP_TOTAL) values ('&quot;; [.A346]; &quot;', '&quot;; [.B346]; &quot;', '&quot;; [.C346]; &quot;', '&quot;; [.D346]; &quot;',&quot;; [.E346]; &quot;, &quot;; [.F346]; &quot;, &quot;; [.G346]; &quot;);&quot;)" office:value-type="string" office:string-value="insert into IBGE_MUNICIPIOS (UF, COD_UF, CODIGO_MUNICIPIO, NOME_MUNICIPIO, POP_COLETADA, POP_IMPUTADA, POP_TOTAL) values ('PR', '41', '25209', 'São Jorge do Oeste',9337, 41, 9378);" calcext:value-type="string">
            <text:p>insert into IBGE_MUNICIPIOS (UF, COD_UF, CODIGO_MUNICIPIO, NOME_MUNICIPIO, POP_COLETADA, POP_IMPUTADA, POP_TOTAL) values ('PR', '41', '25209', 'São Jorge do Oeste',9337, 41, 9378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25308" calcext:value-type="float">
            <text:p>25308</text:p>
          </table:table-cell>
          <table:table-cell office:value-type="string" calcext:value-type="string">
            <text:p>São Jorge do Ivaí</text:p>
          </table:table-cell>
          <table:table-cell office:value-type="float" office:value="5128" calcext:value-type="float">
            <text:p>5128</text:p>
          </table:table-cell>
          <table:table-cell office:value-type="float" office:value="40" calcext:value-type="float">
            <text:p>40</text:p>
          </table:table-cell>
          <table:table-cell office:value-type="float" office:value="5168" calcext:value-type="float">
            <text:p>5168</text:p>
          </table:table-cell>
          <table:table-cell table:formula="of:=CONCATENATE(&quot;insert into IBGE_MUNICIPIOS (UF, COD_UF, CODIGO_MUNICIPIO, NOME_MUNICIPIO, POP_COLETADA, POP_IMPUTADA, POP_TOTAL) values ('&quot;; [.A347]; &quot;', '&quot;; [.B347]; &quot;', '&quot;; [.C347]; &quot;', '&quot;; [.D347]; &quot;',&quot;; [.E347]; &quot;, &quot;; [.F347]; &quot;, &quot;; [.G347]; &quot;);&quot;)" office:value-type="string" office:string-value="insert into IBGE_MUNICIPIOS (UF, COD_UF, CODIGO_MUNICIPIO, NOME_MUNICIPIO, POP_COLETADA, POP_IMPUTADA, POP_TOTAL) values ('PR', '41', '25308', 'São Jorge do Ivaí',5128, 40, 5168);" calcext:value-type="string">
            <text:p>insert into IBGE_MUNICIPIOS (UF, COD_UF, CODIGO_MUNICIPIO, NOME_MUNICIPIO, POP_COLETADA, POP_IMPUTADA, POP_TOTAL) values ('PR', '41', '25308', 'São Jorge do Ivaí',5128, 40, 5168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25357" calcext:value-type="float">
            <text:p>25357</text:p>
          </table:table-cell>
          <table:table-cell office:value-type="string" calcext:value-type="string">
            <text:p>São Jorge do Patrocínio</text:p>
          </table:table-cell>
          <table:table-cell office:value-type="float" office:value="6452" calcext:value-type="float">
            <text:p>6452</text:p>
          </table:table-cell>
          <table:table-cell office:value-type="float" office:value="52" calcext:value-type="float">
            <text:p>52</text:p>
          </table:table-cell>
          <table:table-cell office:value-type="float" office:value="6504" calcext:value-type="float">
            <text:p>6504</text:p>
          </table:table-cell>
          <table:table-cell table:formula="of:=CONCATENATE(&quot;insert into IBGE_MUNICIPIOS (UF, COD_UF, CODIGO_MUNICIPIO, NOME_MUNICIPIO, POP_COLETADA, POP_IMPUTADA, POP_TOTAL) values ('&quot;; [.A348]; &quot;', '&quot;; [.B348]; &quot;', '&quot;; [.C348]; &quot;', '&quot;; [.D348]; &quot;',&quot;; [.E348]; &quot;, &quot;; [.F348]; &quot;, &quot;; [.G348]; &quot;);&quot;)" office:value-type="string" office:string-value="insert into IBGE_MUNICIPIOS (UF, COD_UF, CODIGO_MUNICIPIO, NOME_MUNICIPIO, POP_COLETADA, POP_IMPUTADA, POP_TOTAL) values ('PR', '41', '25357', 'São Jorge do Patrocínio',6452, 52, 6504);" calcext:value-type="string">
            <text:p>insert into IBGE_MUNICIPIOS (UF, COD_UF, CODIGO_MUNICIPIO, NOME_MUNICIPIO, POP_COLETADA, POP_IMPUTADA, POP_TOTAL) values ('PR', '41', '25357', 'São Jorge do Patrocínio',6452, 52, 6504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25407" calcext:value-type="float">
            <text:p>25407</text:p>
          </table:table-cell>
          <table:table-cell office:value-type="string" calcext:value-type="string">
            <text:p>São José da Boa Vista</text:p>
          </table:table-cell>
          <table:table-cell office:value-type="float" office:value="6030" calcext:value-type="float">
            <text:p>6030</text:p>
          </table:table-cell>
          <table:table-cell office:value-type="float" office:value="10" calcext:value-type="float">
            <text:p>10</text:p>
          </table:table-cell>
          <table:table-cell office:value-type="float" office:value="6040" calcext:value-type="float">
            <text:p>6040</text:p>
          </table:table-cell>
          <table:table-cell table:formula="of:=CONCATENATE(&quot;insert into IBGE_MUNICIPIOS (UF, COD_UF, CODIGO_MUNICIPIO, NOME_MUNICIPIO, POP_COLETADA, POP_IMPUTADA, POP_TOTAL) values ('&quot;; [.A349]; &quot;', '&quot;; [.B349]; &quot;', '&quot;; [.C349]; &quot;', '&quot;; [.D349]; &quot;',&quot;; [.E349]; &quot;, &quot;; [.F349]; &quot;, &quot;; [.G349]; &quot;);&quot;)" office:value-type="string" office:string-value="insert into IBGE_MUNICIPIOS (UF, COD_UF, CODIGO_MUNICIPIO, NOME_MUNICIPIO, POP_COLETADA, POP_IMPUTADA, POP_TOTAL) values ('PR', '41', '25407', 'São José da Boa Vista',6030, 10, 6040);" calcext:value-type="string">
            <text:p>insert into IBGE_MUNICIPIOS (UF, COD_UF, CODIGO_MUNICIPIO, NOME_MUNICIPIO, POP_COLETADA, POP_IMPUTADA, POP_TOTAL) values ('PR', '41', '25407', 'São José da Boa Vista',6030, 10, 6040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25456" calcext:value-type="float">
            <text:p>25456</text:p>
          </table:table-cell>
          <table:table-cell office:value-type="string" calcext:value-type="string">
            <text:p>São José das Palmeiras</text:p>
          </table:table-cell>
          <table:table-cell office:value-type="float" office:value="3850" calcext:value-type="float">
            <text:p>3850</text:p>
          </table:table-cell>
          <table:table-cell office:value-type="float" office:value="107" calcext:value-type="float">
            <text:p>107</text:p>
          </table:table-cell>
          <table:table-cell office:value-type="float" office:value="3957" calcext:value-type="float">
            <text:p>3957</text:p>
          </table:table-cell>
          <table:table-cell table:formula="of:=CONCATENATE(&quot;insert into IBGE_MUNICIPIOS (UF, COD_UF, CODIGO_MUNICIPIO, NOME_MUNICIPIO, POP_COLETADA, POP_IMPUTADA, POP_TOTAL) values ('&quot;; [.A350]; &quot;', '&quot;; [.B350]; &quot;', '&quot;; [.C350]; &quot;', '&quot;; [.D350]; &quot;',&quot;; [.E350]; &quot;, &quot;; [.F350]; &quot;, &quot;; [.G350]; &quot;);&quot;)" office:value-type="string" office:string-value="insert into IBGE_MUNICIPIOS (UF, COD_UF, CODIGO_MUNICIPIO, NOME_MUNICIPIO, POP_COLETADA, POP_IMPUTADA, POP_TOTAL) values ('PR', '41', '25456', 'São José das Palmeiras',3850, 107, 3957);" calcext:value-type="string">
            <text:p>insert into IBGE_MUNICIPIOS (UF, COD_UF, CODIGO_MUNICIPIO, NOME_MUNICIPIO, POP_COLETADA, POP_IMPUTADA, POP_TOTAL) values ('PR', '41', '25456', 'São José das Palmeiras',3850, 107, 3957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25506" calcext:value-type="float">
            <text:p>25506</text:p>
          </table:table-cell>
          <table:table-cell office:value-type="string" calcext:value-type="string">
            <text:p>São José dos Pinhais</text:p>
          </table:table-cell>
          <table:table-cell office:value-type="float" office:value="311170" calcext:value-type="float">
            <text:p>311170</text:p>
          </table:table-cell>
          <table:table-cell office:value-type="float" office:value="18458" calcext:value-type="float">
            <text:p>18458</text:p>
          </table:table-cell>
          <table:table-cell office:value-type="float" office:value="329628" calcext:value-type="float">
            <text:p>329628</text:p>
          </table:table-cell>
          <table:table-cell table:formula="of:=CONCATENATE(&quot;insert into IBGE_MUNICIPIOS (UF, COD_UF, CODIGO_MUNICIPIO, NOME_MUNICIPIO, POP_COLETADA, POP_IMPUTADA, POP_TOTAL) values ('&quot;; [.A351]; &quot;', '&quot;; [.B351]; &quot;', '&quot;; [.C351]; &quot;', '&quot;; [.D351]; &quot;',&quot;; [.E351]; &quot;, &quot;; [.F351]; &quot;, &quot;; [.G351]; &quot;);&quot;)" office:value-type="string" office:string-value="insert into IBGE_MUNICIPIOS (UF, COD_UF, CODIGO_MUNICIPIO, NOME_MUNICIPIO, POP_COLETADA, POP_IMPUTADA, POP_TOTAL) values ('PR', '41', '25506', 'São José dos Pinhais',311170, 18458, 329628);" calcext:value-type="string">
            <text:p>insert into IBGE_MUNICIPIOS (UF, COD_UF, CODIGO_MUNICIPIO, NOME_MUNICIPIO, POP_COLETADA, POP_IMPUTADA, POP_TOTAL) values ('PR', '41', '25506', 'São José dos Pinhais',311170, 18458, 329628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25555" calcext:value-type="float">
            <text:p>25555</text:p>
          </table:table-cell>
          <table:table-cell office:value-type="string" calcext:value-type="string">
            <text:p>São Manoel do Paraná</text:p>
          </table:table-cell>
          <table:table-cell office:value-type="float" office:value="2129" calcext:value-type="float">
            <text:p>2129</text:p>
          </table:table-cell>
          <table:table-cell office:value-type="float" office:value="9" calcext:value-type="float">
            <text:p>9</text:p>
          </table:table-cell>
          <table:table-cell office:value-type="float" office:value="2138" calcext:value-type="float">
            <text:p>2138</text:p>
          </table:table-cell>
          <table:table-cell table:formula="of:=CONCATENATE(&quot;insert into IBGE_MUNICIPIOS (UF, COD_UF, CODIGO_MUNICIPIO, NOME_MUNICIPIO, POP_COLETADA, POP_IMPUTADA, POP_TOTAL) values ('&quot;; [.A352]; &quot;', '&quot;; [.B352]; &quot;', '&quot;; [.C352]; &quot;', '&quot;; [.D352]; &quot;',&quot;; [.E352]; &quot;, &quot;; [.F352]; &quot;, &quot;; [.G352]; &quot;);&quot;)" office:value-type="string" office:string-value="insert into IBGE_MUNICIPIOS (UF, COD_UF, CODIGO_MUNICIPIO, NOME_MUNICIPIO, POP_COLETADA, POP_IMPUTADA, POP_TOTAL) values ('PR', '41', '25555', 'São Manoel do Paraná',2129, 9, 2138);" calcext:value-type="string">
            <text:p>insert into IBGE_MUNICIPIOS (UF, COD_UF, CODIGO_MUNICIPIO, NOME_MUNICIPIO, POP_COLETADA, POP_IMPUTADA, POP_TOTAL) values ('PR', '41', '25555', 'São Manoel do Paraná',2129, 9, 2138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25605" calcext:value-type="float">
            <text:p>25605</text:p>
          </table:table-cell>
          <table:table-cell office:value-type="string" calcext:value-type="string">
            <text:p>São Mateus do Sul</text:p>
          </table:table-cell>
          <table:table-cell office:value-type="float" office:value="41544" calcext:value-type="float">
            <text:p>41544</text:p>
          </table:table-cell>
          <table:table-cell office:value-type="float" office:value="822" calcext:value-type="float">
            <text:p>822</text:p>
          </table:table-cell>
          <table:table-cell office:value-type="float" office:value="42366" calcext:value-type="float">
            <text:p>42366</text:p>
          </table:table-cell>
          <table:table-cell table:formula="of:=CONCATENATE(&quot;insert into IBGE_MUNICIPIOS (UF, COD_UF, CODIGO_MUNICIPIO, NOME_MUNICIPIO, POP_COLETADA, POP_IMPUTADA, POP_TOTAL) values ('&quot;; [.A353]; &quot;', '&quot;; [.B353]; &quot;', '&quot;; [.C353]; &quot;', '&quot;; [.D353]; &quot;',&quot;; [.E353]; &quot;, &quot;; [.F353]; &quot;, &quot;; [.G353]; &quot;);&quot;)" office:value-type="string" office:string-value="insert into IBGE_MUNICIPIOS (UF, COD_UF, CODIGO_MUNICIPIO, NOME_MUNICIPIO, POP_COLETADA, POP_IMPUTADA, POP_TOTAL) values ('PR', '41', '25605', 'São Mateus do Sul',41544, 822, 42366);" calcext:value-type="string">
            <text:p>insert into IBGE_MUNICIPIOS (UF, COD_UF, CODIGO_MUNICIPIO, NOME_MUNICIPIO, POP_COLETADA, POP_IMPUTADA, POP_TOTAL) values ('PR', '41', '25605', 'São Mateus do Sul',41544, 822, 42366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25704" calcext:value-type="float">
            <text:p>25704</text:p>
          </table:table-cell>
          <table:table-cell office:value-type="string" calcext:value-type="string">
            <text:p>São Miguel do Iguaçu</text:p>
          </table:table-cell>
          <table:table-cell office:value-type="float" office:value="27847" calcext:value-type="float">
            <text:p>27847</text:p>
          </table:table-cell>
          <table:table-cell office:value-type="float" office:value="1275" calcext:value-type="float">
            <text:p>1275</text:p>
          </table:table-cell>
          <table:table-cell office:value-type="float" office:value="29122" calcext:value-type="float">
            <text:p>29122</text:p>
          </table:table-cell>
          <table:table-cell table:formula="of:=CONCATENATE(&quot;insert into IBGE_MUNICIPIOS (UF, COD_UF, CODIGO_MUNICIPIO, NOME_MUNICIPIO, POP_COLETADA, POP_IMPUTADA, POP_TOTAL) values ('&quot;; [.A354]; &quot;', '&quot;; [.B354]; &quot;', '&quot;; [.C354]; &quot;', '&quot;; [.D354]; &quot;',&quot;; [.E354]; &quot;, &quot;; [.F354]; &quot;, &quot;; [.G354]; &quot;);&quot;)" office:value-type="string" office:string-value="insert into IBGE_MUNICIPIOS (UF, COD_UF, CODIGO_MUNICIPIO, NOME_MUNICIPIO, POP_COLETADA, POP_IMPUTADA, POP_TOTAL) values ('PR', '41', '25704', 'São Miguel do Iguaçu',27847, 1275, 29122);" calcext:value-type="string">
            <text:p>insert into IBGE_MUNICIPIOS (UF, COD_UF, CODIGO_MUNICIPIO, NOME_MUNICIPIO, POP_COLETADA, POP_IMPUTADA, POP_TOTAL) values ('PR', '41', '25704', 'São Miguel do Iguaçu',27847, 1275, 29122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25753" calcext:value-type="float">
            <text:p>25753</text:p>
          </table:table-cell>
          <table:table-cell office:value-type="string" calcext:value-type="string">
            <text:p>São Pedro do Iguaçu</text:p>
          </table:table-cell>
          <table:table-cell office:value-type="float" office:value="5350" calcext:value-type="float">
            <text:p>5350</text:p>
          </table:table-cell>
          <table:table-cell office:value-type="float" office:value="434" calcext:value-type="float">
            <text:p>434</text:p>
          </table:table-cell>
          <table:table-cell office:value-type="float" office:value="5784" calcext:value-type="float">
            <text:p>5784</text:p>
          </table:table-cell>
          <table:table-cell table:formula="of:=CONCATENATE(&quot;insert into IBGE_MUNICIPIOS (UF, COD_UF, CODIGO_MUNICIPIO, NOME_MUNICIPIO, POP_COLETADA, POP_IMPUTADA, POP_TOTAL) values ('&quot;; [.A355]; &quot;', '&quot;; [.B355]; &quot;', '&quot;; [.C355]; &quot;', '&quot;; [.D355]; &quot;',&quot;; [.E355]; &quot;, &quot;; [.F355]; &quot;, &quot;; [.G355]; &quot;);&quot;)" office:value-type="string" office:string-value="insert into IBGE_MUNICIPIOS (UF, COD_UF, CODIGO_MUNICIPIO, NOME_MUNICIPIO, POP_COLETADA, POP_IMPUTADA, POP_TOTAL) values ('PR', '41', '25753', 'São Pedro do Iguaçu',5350, 434, 5784);" calcext:value-type="string">
            <text:p>insert into IBGE_MUNICIPIOS (UF, COD_UF, CODIGO_MUNICIPIO, NOME_MUNICIPIO, POP_COLETADA, POP_IMPUTADA, POP_TOTAL) values ('PR', '41', '25753', 'São Pedro do Iguaçu',5350, 434, 5784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25803" calcext:value-type="float">
            <text:p>25803</text:p>
          </table:table-cell>
          <table:table-cell office:value-type="string" calcext:value-type="string">
            <text:p>São Pedro do Ivaí</text:p>
          </table:table-cell>
          <table:table-cell office:value-type="float" office:value="8687" calcext:value-type="float">
            <text:p>8687</text:p>
          </table:table-cell>
          <table:table-cell office:value-type="float" office:value="3" calcext:value-type="float">
            <text:p>3</text:p>
          </table:table-cell>
          <table:table-cell office:value-type="float" office:value="8690" calcext:value-type="float">
            <text:p>8690</text:p>
          </table:table-cell>
          <table:table-cell table:formula="of:=CONCATENATE(&quot;insert into IBGE_MUNICIPIOS (UF, COD_UF, CODIGO_MUNICIPIO, NOME_MUNICIPIO, POP_COLETADA, POP_IMPUTADA, POP_TOTAL) values ('&quot;; [.A356]; &quot;', '&quot;; [.B356]; &quot;', '&quot;; [.C356]; &quot;', '&quot;; [.D356]; &quot;',&quot;; [.E356]; &quot;, &quot;; [.F356]; &quot;, &quot;; [.G356]; &quot;);&quot;)" office:value-type="string" office:string-value="insert into IBGE_MUNICIPIOS (UF, COD_UF, CODIGO_MUNICIPIO, NOME_MUNICIPIO, POP_COLETADA, POP_IMPUTADA, POP_TOTAL) values ('PR', '41', '25803', 'São Pedro do Ivaí',8687, 3, 8690);" calcext:value-type="string">
            <text:p>insert into IBGE_MUNICIPIOS (UF, COD_UF, CODIGO_MUNICIPIO, NOME_MUNICIPIO, POP_COLETADA, POP_IMPUTADA, POP_TOTAL) values ('PR', '41', '25803', 'São Pedro do Ivaí',8687, 3, 8690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25902" calcext:value-type="float">
            <text:p>25902</text:p>
          </table:table-cell>
          <table:table-cell office:value-type="string" calcext:value-type="string">
            <text:p>São Pedro do Paraná</text:p>
          </table:table-cell>
          <table:table-cell office:value-type="float" office:value="2656" calcext:value-type="float">
            <text:p>2656</text:p>
          </table:table-cell>
          <table:table-cell office:value-type="float" office:value="5" calcext:value-type="float">
            <text:p>5</text:p>
          </table:table-cell>
          <table:table-cell office:value-type="float" office:value="2661" calcext:value-type="float">
            <text:p>2661</text:p>
          </table:table-cell>
          <table:table-cell table:formula="of:=CONCATENATE(&quot;insert into IBGE_MUNICIPIOS (UF, COD_UF, CODIGO_MUNICIPIO, NOME_MUNICIPIO, POP_COLETADA, POP_IMPUTADA, POP_TOTAL) values ('&quot;; [.A357]; &quot;', '&quot;; [.B357]; &quot;', '&quot;; [.C357]; &quot;', '&quot;; [.D357]; &quot;',&quot;; [.E357]; &quot;, &quot;; [.F357]; &quot;, &quot;; [.G357]; &quot;);&quot;)" office:value-type="string" office:string-value="insert into IBGE_MUNICIPIOS (UF, COD_UF, CODIGO_MUNICIPIO, NOME_MUNICIPIO, POP_COLETADA, POP_IMPUTADA, POP_TOTAL) values ('PR', '41', '25902', 'São Pedro do Paraná',2656, 5, 2661);" calcext:value-type="string">
            <text:p>insert into IBGE_MUNICIPIOS (UF, COD_UF, CODIGO_MUNICIPIO, NOME_MUNICIPIO, POP_COLETADA, POP_IMPUTADA, POP_TOTAL) values ('PR', '41', '25902', 'São Pedro do Paraná',2656, 5, 2661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26009" calcext:value-type="float">
            <text:p>26009</text:p>
          </table:table-cell>
          <table:table-cell office:value-type="string" calcext:value-type="string">
            <text:p>São Sebastião da Amoreira</text:p>
          </table:table-cell>
          <table:table-cell office:value-type="float" office:value="7999" calcext:value-type="float">
            <text:p>7999</text:p>
          </table:table-cell>
          <table:table-cell office:value-type="float" office:value="64" calcext:value-type="float">
            <text:p>64</text:p>
          </table:table-cell>
          <table:table-cell office:value-type="float" office:value="8063" calcext:value-type="float">
            <text:p>8063</text:p>
          </table:table-cell>
          <table:table-cell table:formula="of:=CONCATENATE(&quot;insert into IBGE_MUNICIPIOS (UF, COD_UF, CODIGO_MUNICIPIO, NOME_MUNICIPIO, POP_COLETADA, POP_IMPUTADA, POP_TOTAL) values ('&quot;; [.A358]; &quot;', '&quot;; [.B358]; &quot;', '&quot;; [.C358]; &quot;', '&quot;; [.D358]; &quot;',&quot;; [.E358]; &quot;, &quot;; [.F358]; &quot;, &quot;; [.G358]; &quot;);&quot;)" office:value-type="string" office:string-value="insert into IBGE_MUNICIPIOS (UF, COD_UF, CODIGO_MUNICIPIO, NOME_MUNICIPIO, POP_COLETADA, POP_IMPUTADA, POP_TOTAL) values ('PR', '41', '26009', 'São Sebastião da Amoreira',7999, 64, 8063);" calcext:value-type="string">
            <text:p>insert into IBGE_MUNICIPIOS (UF, COD_UF, CODIGO_MUNICIPIO, NOME_MUNICIPIO, POP_COLETADA, POP_IMPUTADA, POP_TOTAL) values ('PR', '41', '26009', 'São Sebastião da Amoreira',7999, 64, 8063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26108" calcext:value-type="float">
            <text:p>26108</text:p>
          </table:table-cell>
          <table:table-cell office:value-type="string" calcext:value-type="string">
            <text:p>São Tomé</text:p>
          </table:table-cell>
          <table:table-cell office:value-type="float" office:value="5113" calcext:value-type="float">
            <text:p>5113</text:p>
          </table:table-cell>
          <table:table-cell office:value-type="float" office:value="119" calcext:value-type="float">
            <text:p>119</text:p>
          </table:table-cell>
          <table:table-cell office:value-type="float" office:value="5232" calcext:value-type="float">
            <text:p>5232</text:p>
          </table:table-cell>
          <table:table-cell table:formula="of:=CONCATENATE(&quot;insert into IBGE_MUNICIPIOS (UF, COD_UF, CODIGO_MUNICIPIO, NOME_MUNICIPIO, POP_COLETADA, POP_IMPUTADA, POP_TOTAL) values ('&quot;; [.A359]; &quot;', '&quot;; [.B359]; &quot;', '&quot;; [.C359]; &quot;', '&quot;; [.D359]; &quot;',&quot;; [.E359]; &quot;, &quot;; [.F359]; &quot;, &quot;; [.G359]; &quot;);&quot;)" office:value-type="string" office:string-value="insert into IBGE_MUNICIPIOS (UF, COD_UF, CODIGO_MUNICIPIO, NOME_MUNICIPIO, POP_COLETADA, POP_IMPUTADA, POP_TOTAL) values ('PR', '41', '26108', 'São Tomé',5113, 119, 5232);" calcext:value-type="string">
            <text:p>insert into IBGE_MUNICIPIOS (UF, COD_UF, CODIGO_MUNICIPIO, NOME_MUNICIPIO, POP_COLETADA, POP_IMPUTADA, POP_TOTAL) values ('PR', '41', '26108', 'São Tomé',5113, 119, 5232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26207" calcext:value-type="float">
            <text:p>26207</text:p>
          </table:table-cell>
          <table:table-cell office:value-type="string" calcext:value-type="string">
            <text:p>Sapopema</text:p>
          </table:table-cell>
          <table:table-cell office:value-type="float" office:value="6564" calcext:value-type="float">
            <text:p>6564</text:p>
          </table:table-cell>
          <table:table-cell office:value-type="float" office:value="131" calcext:value-type="float">
            <text:p>131</text:p>
          </table:table-cell>
          <table:table-cell office:value-type="float" office:value="6695" calcext:value-type="float">
            <text:p>6695</text:p>
          </table:table-cell>
          <table:table-cell table:formula="of:=CONCATENATE(&quot;insert into IBGE_MUNICIPIOS (UF, COD_UF, CODIGO_MUNICIPIO, NOME_MUNICIPIO, POP_COLETADA, POP_IMPUTADA, POP_TOTAL) values ('&quot;; [.A360]; &quot;', '&quot;; [.B360]; &quot;', '&quot;; [.C360]; &quot;', '&quot;; [.D360]; &quot;',&quot;; [.E360]; &quot;, &quot;; [.F360]; &quot;, &quot;; [.G360]; &quot;);&quot;)" office:value-type="string" office:string-value="insert into IBGE_MUNICIPIOS (UF, COD_UF, CODIGO_MUNICIPIO, NOME_MUNICIPIO, POP_COLETADA, POP_IMPUTADA, POP_TOTAL) values ('PR', '41', '26207', 'Sapopema',6564, 131, 6695);" calcext:value-type="string">
            <text:p>insert into IBGE_MUNICIPIOS (UF, COD_UF, CODIGO_MUNICIPIO, NOME_MUNICIPIO, POP_COLETADA, POP_IMPUTADA, POP_TOTAL) values ('PR', '41', '26207', 'Sapopema',6564, 131, 6695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26256" calcext:value-type="float">
            <text:p>26256</text:p>
          </table:table-cell>
          <table:table-cell office:value-type="string" calcext:value-type="string">
            <text:p>Sarandi</text:p>
          </table:table-cell>
          <table:table-cell office:value-type="float" office:value="115701" calcext:value-type="float">
            <text:p>115701</text:p>
          </table:table-cell>
          <table:table-cell office:value-type="float" office:value="2754" calcext:value-type="float">
            <text:p>2754</text:p>
          </table:table-cell>
          <table:table-cell office:value-type="float" office:value="118455" calcext:value-type="float">
            <text:p>118455</text:p>
          </table:table-cell>
          <table:table-cell table:formula="of:=CONCATENATE(&quot;insert into IBGE_MUNICIPIOS (UF, COD_UF, CODIGO_MUNICIPIO, NOME_MUNICIPIO, POP_COLETADA, POP_IMPUTADA, POP_TOTAL) values ('&quot;; [.A361]; &quot;', '&quot;; [.B361]; &quot;', '&quot;; [.C361]; &quot;', '&quot;; [.D361]; &quot;',&quot;; [.E361]; &quot;, &quot;; [.F361]; &quot;, &quot;; [.G361]; &quot;);&quot;)" office:value-type="string" office:string-value="insert into IBGE_MUNICIPIOS (UF, COD_UF, CODIGO_MUNICIPIO, NOME_MUNICIPIO, POP_COLETADA, POP_IMPUTADA, POP_TOTAL) values ('PR', '41', '26256', 'Sarandi',115701, 2754, 118455);" calcext:value-type="string">
            <text:p>insert into IBGE_MUNICIPIOS (UF, COD_UF, CODIGO_MUNICIPIO, NOME_MUNICIPIO, POP_COLETADA, POP_IMPUTADA, POP_TOTAL) values ('PR', '41', '26256', 'Sarandi',115701, 2754, 118455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26272" calcext:value-type="float">
            <text:p>26272</text:p>
          </table:table-cell>
          <table:table-cell office:value-type="string" calcext:value-type="string">
            <text:p>Saudade do Iguaçu</text:p>
          </table:table-cell>
          <table:table-cell office:value-type="float" office:value="6097" calcext:value-type="float">
            <text:p>6097</text:p>
          </table:table-cell>
          <table:table-cell office:value-type="float" office:value="11" calcext:value-type="float">
            <text:p>11</text:p>
          </table:table-cell>
          <table:table-cell office:value-type="float" office:value="6108" calcext:value-type="float">
            <text:p>6108</text:p>
          </table:table-cell>
          <table:table-cell table:formula="of:=CONCATENATE(&quot;insert into IBGE_MUNICIPIOS (UF, COD_UF, CODIGO_MUNICIPIO, NOME_MUNICIPIO, POP_COLETADA, POP_IMPUTADA, POP_TOTAL) values ('&quot;; [.A362]; &quot;', '&quot;; [.B362]; &quot;', '&quot;; [.C362]; &quot;', '&quot;; [.D362]; &quot;',&quot;; [.E362]; &quot;, &quot;; [.F362]; &quot;, &quot;; [.G362]; &quot;);&quot;)" office:value-type="string" office:string-value="insert into IBGE_MUNICIPIOS (UF, COD_UF, CODIGO_MUNICIPIO, NOME_MUNICIPIO, POP_COLETADA, POP_IMPUTADA, POP_TOTAL) values ('PR', '41', '26272', 'Saudade do Iguaçu',6097, 11, 6108);" calcext:value-type="string">
            <text:p>insert into IBGE_MUNICIPIOS (UF, COD_UF, CODIGO_MUNICIPIO, NOME_MUNICIPIO, POP_COLETADA, POP_IMPUTADA, POP_TOTAL) values ('PR', '41', '26272', 'Saudade do Iguaçu',6097, 11, 6108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26306" calcext:value-type="float">
            <text:p>26306</text:p>
          </table:table-cell>
          <table:table-cell office:value-type="string" calcext:value-type="string">
            <text:p>Sengés</text:p>
          </table:table-cell>
          <table:table-cell office:value-type="float" office:value="17175" calcext:value-type="float">
            <text:p>17175</text:p>
          </table:table-cell>
          <table:table-cell office:value-type="float" office:value="95" calcext:value-type="float">
            <text:p>95</text:p>
          </table:table-cell>
          <table:table-cell office:value-type="float" office:value="17270" calcext:value-type="float">
            <text:p>17270</text:p>
          </table:table-cell>
          <table:table-cell table:formula="of:=CONCATENATE(&quot;insert into IBGE_MUNICIPIOS (UF, COD_UF, CODIGO_MUNICIPIO, NOME_MUNICIPIO, POP_COLETADA, POP_IMPUTADA, POP_TOTAL) values ('&quot;; [.A363]; &quot;', '&quot;; [.B363]; &quot;', '&quot;; [.C363]; &quot;', '&quot;; [.D363]; &quot;',&quot;; [.E363]; &quot;, &quot;; [.F363]; &quot;, &quot;; [.G363]; &quot;);&quot;)" office:value-type="string" office:string-value="insert into IBGE_MUNICIPIOS (UF, COD_UF, CODIGO_MUNICIPIO, NOME_MUNICIPIO, POP_COLETADA, POP_IMPUTADA, POP_TOTAL) values ('PR', '41', '26306', 'Sengés',17175, 95, 17270);" calcext:value-type="string">
            <text:p>insert into IBGE_MUNICIPIOS (UF, COD_UF, CODIGO_MUNICIPIO, NOME_MUNICIPIO, POP_COLETADA, POP_IMPUTADA, POP_TOTAL) values ('PR', '41', '26306', 'Sengés',17175, 95, 17270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26355" calcext:value-type="float">
            <text:p>26355</text:p>
          </table:table-cell>
          <table:table-cell office:value-type="string" calcext:value-type="string">
            <text:p>Serranópolis do Iguaçu</text:p>
          </table:table-cell>
          <table:table-cell office:value-type="float" office:value="4829" calcext:value-type="float">
            <text:p>4829</text:p>
          </table:table-cell>
          <table:table-cell office:value-type="float" office:value="178" calcext:value-type="float">
            <text:p>178</text:p>
          </table:table-cell>
          <table:table-cell office:value-type="float" office:value="5007" calcext:value-type="float">
            <text:p>5007</text:p>
          </table:table-cell>
          <table:table-cell table:formula="of:=CONCATENATE(&quot;insert into IBGE_MUNICIPIOS (UF, COD_UF, CODIGO_MUNICIPIO, NOME_MUNICIPIO, POP_COLETADA, POP_IMPUTADA, POP_TOTAL) values ('&quot;; [.A364]; &quot;', '&quot;; [.B364]; &quot;', '&quot;; [.C364]; &quot;', '&quot;; [.D364]; &quot;',&quot;; [.E364]; &quot;, &quot;; [.F364]; &quot;, &quot;; [.G364]; &quot;);&quot;)" office:value-type="string" office:string-value="insert into IBGE_MUNICIPIOS (UF, COD_UF, CODIGO_MUNICIPIO, NOME_MUNICIPIO, POP_COLETADA, POP_IMPUTADA, POP_TOTAL) values ('PR', '41', '26355', 'Serranópolis do Iguaçu',4829, 178, 5007);" calcext:value-type="string">
            <text:p>insert into IBGE_MUNICIPIOS (UF, COD_UF, CODIGO_MUNICIPIO, NOME_MUNICIPIO, POP_COLETADA, POP_IMPUTADA, POP_TOTAL) values ('PR', '41', '26355', 'Serranópolis do Iguaçu',4829, 178, 5007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26405" calcext:value-type="float">
            <text:p>26405</text:p>
          </table:table-cell>
          <table:table-cell office:value-type="string" calcext:value-type="string">
            <text:p>Sertaneja</text:p>
          </table:table-cell>
          <table:table-cell office:value-type="float" office:value="5605" calcext:value-type="float">
            <text:p>5605</text:p>
          </table:table-cell>
          <table:table-cell office:value-type="float" office:value="11" calcext:value-type="float">
            <text:p>11</text:p>
          </table:table-cell>
          <table:table-cell office:value-type="float" office:value="5616" calcext:value-type="float">
            <text:p>5616</text:p>
          </table:table-cell>
          <table:table-cell table:formula="of:=CONCATENATE(&quot;insert into IBGE_MUNICIPIOS (UF, COD_UF, CODIGO_MUNICIPIO, NOME_MUNICIPIO, POP_COLETADA, POP_IMPUTADA, POP_TOTAL) values ('&quot;; [.A365]; &quot;', '&quot;; [.B365]; &quot;', '&quot;; [.C365]; &quot;', '&quot;; [.D365]; &quot;',&quot;; [.E365]; &quot;, &quot;; [.F365]; &quot;, &quot;; [.G365]; &quot;);&quot;)" office:value-type="string" office:string-value="insert into IBGE_MUNICIPIOS (UF, COD_UF, CODIGO_MUNICIPIO, NOME_MUNICIPIO, POP_COLETADA, POP_IMPUTADA, POP_TOTAL) values ('PR', '41', '26405', 'Sertaneja',5605, 11, 5616);" calcext:value-type="string">
            <text:p>insert into IBGE_MUNICIPIOS (UF, COD_UF, CODIGO_MUNICIPIO, NOME_MUNICIPIO, POP_COLETADA, POP_IMPUTADA, POP_TOTAL) values ('PR', '41', '26405', 'Sertaneja',5605, 11, 5616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26504" calcext:value-type="float">
            <text:p>26504</text:p>
          </table:table-cell>
          <table:table-cell office:value-type="string" calcext:value-type="string">
            <text:p>Sertanópolis</text:p>
          </table:table-cell>
          <table:table-cell office:value-type="float" office:value="15420" calcext:value-type="float">
            <text:p>15420</text:p>
          </table:table-cell>
          <table:table-cell office:value-type="float" office:value="510" calcext:value-type="float">
            <text:p>510</text:p>
          </table:table-cell>
          <table:table-cell office:value-type="float" office:value="15930" calcext:value-type="float">
            <text:p>15930</text:p>
          </table:table-cell>
          <table:table-cell table:formula="of:=CONCATENATE(&quot;insert into IBGE_MUNICIPIOS (UF, COD_UF, CODIGO_MUNICIPIO, NOME_MUNICIPIO, POP_COLETADA, POP_IMPUTADA, POP_TOTAL) values ('&quot;; [.A366]; &quot;', '&quot;; [.B366]; &quot;', '&quot;; [.C366]; &quot;', '&quot;; [.D366]; &quot;',&quot;; [.E366]; &quot;, &quot;; [.F366]; &quot;, &quot;; [.G366]; &quot;);&quot;)" office:value-type="string" office:string-value="insert into IBGE_MUNICIPIOS (UF, COD_UF, CODIGO_MUNICIPIO, NOME_MUNICIPIO, POP_COLETADA, POP_IMPUTADA, POP_TOTAL) values ('PR', '41', '26504', 'Sertanópolis',15420, 510, 15930);" calcext:value-type="string">
            <text:p>insert into IBGE_MUNICIPIOS (UF, COD_UF, CODIGO_MUNICIPIO, NOME_MUNICIPIO, POP_COLETADA, POP_IMPUTADA, POP_TOTAL) values ('PR', '41', '26504', 'Sertanópolis',15420, 510, 15930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26603" calcext:value-type="float">
            <text:p>26603</text:p>
          </table:table-cell>
          <table:table-cell office:value-type="string" calcext:value-type="string">
            <text:p>Siqueira Campos</text:p>
          </table:table-cell>
          <table:table-cell office:value-type="float" office:value="22487" calcext:value-type="float">
            <text:p>22487</text:p>
          </table:table-cell>
          <table:table-cell office:value-type="float" office:value="324" calcext:value-type="float">
            <text:p>324</text:p>
          </table:table-cell>
          <table:table-cell office:value-type="float" office:value="22811" calcext:value-type="float">
            <text:p>22811</text:p>
          </table:table-cell>
          <table:table-cell table:formula="of:=CONCATENATE(&quot;insert into IBGE_MUNICIPIOS (UF, COD_UF, CODIGO_MUNICIPIO, NOME_MUNICIPIO, POP_COLETADA, POP_IMPUTADA, POP_TOTAL) values ('&quot;; [.A367]; &quot;', '&quot;; [.B367]; &quot;', '&quot;; [.C367]; &quot;', '&quot;; [.D367]; &quot;',&quot;; [.E367]; &quot;, &quot;; [.F367]; &quot;, &quot;; [.G367]; &quot;);&quot;)" office:value-type="string" office:string-value="insert into IBGE_MUNICIPIOS (UF, COD_UF, CODIGO_MUNICIPIO, NOME_MUNICIPIO, POP_COLETADA, POP_IMPUTADA, POP_TOTAL) values ('PR', '41', '26603', 'Siqueira Campos',22487, 324, 22811);" calcext:value-type="string">
            <text:p>insert into IBGE_MUNICIPIOS (UF, COD_UF, CODIGO_MUNICIPIO, NOME_MUNICIPIO, POP_COLETADA, POP_IMPUTADA, POP_TOTAL) values ('PR', '41', '26603', 'Siqueira Campos',22487, 324, 22811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26652" calcext:value-type="float">
            <text:p>26652</text:p>
          </table:table-cell>
          <table:table-cell office:value-type="string" calcext:value-type="string">
            <text:p>Sulina</text:p>
          </table:table-cell>
          <table:table-cell office:value-type="float" office:value="3434" calcext:value-type="float">
            <text:p>3434</text:p>
          </table:table-cell>
          <table:table-cell office:value-type="float" office:value="6" calcext:value-type="float">
            <text:p>6</text:p>
          </table:table-cell>
          <table:table-cell office:value-type="float" office:value="3440" calcext:value-type="float">
            <text:p>3440</text:p>
          </table:table-cell>
          <table:table-cell table:formula="of:=CONCATENATE(&quot;insert into IBGE_MUNICIPIOS (UF, COD_UF, CODIGO_MUNICIPIO, NOME_MUNICIPIO, POP_COLETADA, POP_IMPUTADA, POP_TOTAL) values ('&quot;; [.A368]; &quot;', '&quot;; [.B368]; &quot;', '&quot;; [.C368]; &quot;', '&quot;; [.D368]; &quot;',&quot;; [.E368]; &quot;, &quot;; [.F368]; &quot;, &quot;; [.G368]; &quot;);&quot;)" office:value-type="string" office:string-value="insert into IBGE_MUNICIPIOS (UF, COD_UF, CODIGO_MUNICIPIO, NOME_MUNICIPIO, POP_COLETADA, POP_IMPUTADA, POP_TOTAL) values ('PR', '41', '26652', 'Sulina',3434, 6, 3440);" calcext:value-type="string">
            <text:p>insert into IBGE_MUNICIPIOS (UF, COD_UF, CODIGO_MUNICIPIO, NOME_MUNICIPIO, POP_COLETADA, POP_IMPUTADA, POP_TOTAL) values ('PR', '41', '26652', 'Sulina',3434, 6, 3440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26678" calcext:value-type="float">
            <text:p>26678</text:p>
          </table:table-cell>
          <table:table-cell office:value-type="string" calcext:value-type="string">
            <text:p>Tamarana</text:p>
          </table:table-cell>
          <table:table-cell office:value-type="float" office:value="10263" calcext:value-type="float">
            <text:p>10263</text:p>
          </table:table-cell>
          <table:table-cell office:value-type="float" office:value="444" calcext:value-type="float">
            <text:p>444</text:p>
          </table:table-cell>
          <table:table-cell office:value-type="float" office:value="10707" calcext:value-type="float">
            <text:p>10707</text:p>
          </table:table-cell>
          <table:table-cell table:formula="of:=CONCATENATE(&quot;insert into IBGE_MUNICIPIOS (UF, COD_UF, CODIGO_MUNICIPIO, NOME_MUNICIPIO, POP_COLETADA, POP_IMPUTADA, POP_TOTAL) values ('&quot;; [.A369]; &quot;', '&quot;; [.B369]; &quot;', '&quot;; [.C369]; &quot;', '&quot;; [.D369]; &quot;',&quot;; [.E369]; &quot;, &quot;; [.F369]; &quot;, &quot;; [.G369]; &quot;);&quot;)" office:value-type="string" office:string-value="insert into IBGE_MUNICIPIOS (UF, COD_UF, CODIGO_MUNICIPIO, NOME_MUNICIPIO, POP_COLETADA, POP_IMPUTADA, POP_TOTAL) values ('PR', '41', '26678', 'Tamarana',10263, 444, 10707);" calcext:value-type="string">
            <text:p>insert into IBGE_MUNICIPIOS (UF, COD_UF, CODIGO_MUNICIPIO, NOME_MUNICIPIO, POP_COLETADA, POP_IMPUTADA, POP_TOTAL) values ('PR', '41', '26678', 'Tamarana',10263, 444, 10707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26702" calcext:value-type="float">
            <text:p>26702</text:p>
          </table:table-cell>
          <table:table-cell office:value-type="string" calcext:value-type="string">
            <text:p>Tamboara</text:p>
          </table:table-cell>
          <table:table-cell office:value-type="float" office:value="4869" calcext:value-type="float">
            <text:p>4869</text:p>
          </table:table-cell>
          <table:table-cell office:value-type="float" office:value="11" calcext:value-type="float">
            <text:p>11</text:p>
          </table:table-cell>
          <table:table-cell office:value-type="float" office:value="4880" calcext:value-type="float">
            <text:p>4880</text:p>
          </table:table-cell>
          <table:table-cell table:formula="of:=CONCATENATE(&quot;insert into IBGE_MUNICIPIOS (UF, COD_UF, CODIGO_MUNICIPIO, NOME_MUNICIPIO, POP_COLETADA, POP_IMPUTADA, POP_TOTAL) values ('&quot;; [.A370]; &quot;', '&quot;; [.B370]; &quot;', '&quot;; [.C370]; &quot;', '&quot;; [.D370]; &quot;',&quot;; [.E370]; &quot;, &quot;; [.F370]; &quot;, &quot;; [.G370]; &quot;);&quot;)" office:value-type="string" office:string-value="insert into IBGE_MUNICIPIOS (UF, COD_UF, CODIGO_MUNICIPIO, NOME_MUNICIPIO, POP_COLETADA, POP_IMPUTADA, POP_TOTAL) values ('PR', '41', '26702', 'Tamboara',4869, 11, 4880);" calcext:value-type="string">
            <text:p>insert into IBGE_MUNICIPIOS (UF, COD_UF, CODIGO_MUNICIPIO, NOME_MUNICIPIO, POP_COLETADA, POP_IMPUTADA, POP_TOTAL) values ('PR', '41', '26702', 'Tamboara',4869, 11, 4880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26801" calcext:value-type="float">
            <text:p>26801</text:p>
          </table:table-cell>
          <table:table-cell office:value-type="string" calcext:value-type="string">
            <text:p>Tapejara</text:p>
          </table:table-cell>
          <table:table-cell office:value-type="float" office:value="15180" calcext:value-type="float">
            <text:p>15180</text:p>
          </table:table-cell>
          <table:table-cell office:value-type="float" office:value="689" calcext:value-type="float">
            <text:p>689</text:p>
          </table:table-cell>
          <table:table-cell office:value-type="float" office:value="15869" calcext:value-type="float">
            <text:p>15869</text:p>
          </table:table-cell>
          <table:table-cell table:formula="of:=CONCATENATE(&quot;insert into IBGE_MUNICIPIOS (UF, COD_UF, CODIGO_MUNICIPIO, NOME_MUNICIPIO, POP_COLETADA, POP_IMPUTADA, POP_TOTAL) values ('&quot;; [.A371]; &quot;', '&quot;; [.B371]; &quot;', '&quot;; [.C371]; &quot;', '&quot;; [.D371]; &quot;',&quot;; [.E371]; &quot;, &quot;; [.F371]; &quot;, &quot;; [.G371]; &quot;);&quot;)" office:value-type="string" office:string-value="insert into IBGE_MUNICIPIOS (UF, COD_UF, CODIGO_MUNICIPIO, NOME_MUNICIPIO, POP_COLETADA, POP_IMPUTADA, POP_TOTAL) values ('PR', '41', '26801', 'Tapejara',15180, 689, 15869);" calcext:value-type="string">
            <text:p>insert into IBGE_MUNICIPIOS (UF, COD_UF, CODIGO_MUNICIPIO, NOME_MUNICIPIO, POP_COLETADA, POP_IMPUTADA, POP_TOTAL) values ('PR', '41', '26801', 'Tapejara',15180, 689, 15869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26900" calcext:value-type="float">
            <text:p>26900</text:p>
          </table:table-cell>
          <table:table-cell office:value-type="string" calcext:value-type="string">
            <text:p>Tapira</text:p>
          </table:table-cell>
          <table:table-cell office:value-type="float" office:value="5724" calcext:value-type="float">
            <text:p>5724</text:p>
          </table:table-cell>
          <table:table-cell office:value-type="float" office:value="21" calcext:value-type="float">
            <text:p>21</text:p>
          </table:table-cell>
          <table:table-cell office:value-type="float" office:value="5745" calcext:value-type="float">
            <text:p>5745</text:p>
          </table:table-cell>
          <table:table-cell table:formula="of:=CONCATENATE(&quot;insert into IBGE_MUNICIPIOS (UF, COD_UF, CODIGO_MUNICIPIO, NOME_MUNICIPIO, POP_COLETADA, POP_IMPUTADA, POP_TOTAL) values ('&quot;; [.A372]; &quot;', '&quot;; [.B372]; &quot;', '&quot;; [.C372]; &quot;', '&quot;; [.D372]; &quot;',&quot;; [.E372]; &quot;, &quot;; [.F372]; &quot;, &quot;; [.G372]; &quot;);&quot;)" office:value-type="string" office:string-value="insert into IBGE_MUNICIPIOS (UF, COD_UF, CODIGO_MUNICIPIO, NOME_MUNICIPIO, POP_COLETADA, POP_IMPUTADA, POP_TOTAL) values ('PR', '41', '26900', 'Tapira',5724, 21, 5745);" calcext:value-type="string">
            <text:p>insert into IBGE_MUNICIPIOS (UF, COD_UF, CODIGO_MUNICIPIO, NOME_MUNICIPIO, POP_COLETADA, POP_IMPUTADA, POP_TOTAL) values ('PR', '41', '26900', 'Tapira',5724, 21, 5745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27007" calcext:value-type="float">
            <text:p>27007</text:p>
          </table:table-cell>
          <table:table-cell office:value-type="string" calcext:value-type="string">
            <text:p>Teixeira Soares</text:p>
          </table:table-cell>
          <table:table-cell office:value-type="float" office:value="9376" calcext:value-type="float">
            <text:p>9376</text:p>
          </table:table-cell>
          <table:table-cell office:value-type="float" office:value="171" calcext:value-type="float">
            <text:p>171</text:p>
          </table:table-cell>
          <table:table-cell office:value-type="float" office:value="9547" calcext:value-type="float">
            <text:p>9547</text:p>
          </table:table-cell>
          <table:table-cell table:formula="of:=CONCATENATE(&quot;insert into IBGE_MUNICIPIOS (UF, COD_UF, CODIGO_MUNICIPIO, NOME_MUNICIPIO, POP_COLETADA, POP_IMPUTADA, POP_TOTAL) values ('&quot;; [.A373]; &quot;', '&quot;; [.B373]; &quot;', '&quot;; [.C373]; &quot;', '&quot;; [.D373]; &quot;',&quot;; [.E373]; &quot;, &quot;; [.F373]; &quot;, &quot;; [.G373]; &quot;);&quot;)" office:value-type="string" office:string-value="insert into IBGE_MUNICIPIOS (UF, COD_UF, CODIGO_MUNICIPIO, NOME_MUNICIPIO, POP_COLETADA, POP_IMPUTADA, POP_TOTAL) values ('PR', '41', '27007', 'Teixeira Soares',9376, 171, 9547);" calcext:value-type="string">
            <text:p>insert into IBGE_MUNICIPIOS (UF, COD_UF, CODIGO_MUNICIPIO, NOME_MUNICIPIO, POP_COLETADA, POP_IMPUTADA, POP_TOTAL) values ('PR', '41', '27007', 'Teixeira Soares',9376, 171, 9547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27106" calcext:value-type="float">
            <text:p>27106</text:p>
          </table:table-cell>
          <table:table-cell office:value-type="string" calcext:value-type="string">
            <text:p>Telêmaco Borba</text:p>
          </table:table-cell>
          <table:table-cell office:value-type="float" office:value="72474" calcext:value-type="float">
            <text:p>72474</text:p>
          </table:table-cell>
          <table:table-cell office:value-type="float" office:value="2568" calcext:value-type="float">
            <text:p>2568</text:p>
          </table:table-cell>
          <table:table-cell office:value-type="float" office:value="75042" calcext:value-type="float">
            <text:p>75042</text:p>
          </table:table-cell>
          <table:table-cell table:formula="of:=CONCATENATE(&quot;insert into IBGE_MUNICIPIOS (UF, COD_UF, CODIGO_MUNICIPIO, NOME_MUNICIPIO, POP_COLETADA, POP_IMPUTADA, POP_TOTAL) values ('&quot;; [.A374]; &quot;', '&quot;; [.B374]; &quot;', '&quot;; [.C374]; &quot;', '&quot;; [.D374]; &quot;',&quot;; [.E374]; &quot;, &quot;; [.F374]; &quot;, &quot;; [.G374]; &quot;);&quot;)" office:value-type="string" office:string-value="insert into IBGE_MUNICIPIOS (UF, COD_UF, CODIGO_MUNICIPIO, NOME_MUNICIPIO, POP_COLETADA, POP_IMPUTADA, POP_TOTAL) values ('PR', '41', '27106', 'Telêmaco Borba',72474, 2568, 75042);" calcext:value-type="string">
            <text:p>insert into IBGE_MUNICIPIOS (UF, COD_UF, CODIGO_MUNICIPIO, NOME_MUNICIPIO, POP_COLETADA, POP_IMPUTADA, POP_TOTAL) values ('PR', '41', '27106', 'Telêmaco Borba',72474, 2568, 75042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27205" calcext:value-type="float">
            <text:p>27205</text:p>
          </table:table-cell>
          <table:table-cell office:value-type="string" calcext:value-type="string">
            <text:p>Terra Boa</text:p>
          </table:table-cell>
          <table:table-cell office:value-type="float" office:value="17355" calcext:value-type="float">
            <text:p>17355</text:p>
          </table:table-cell>
          <table:table-cell office:value-type="float" office:value="213" calcext:value-type="float">
            <text:p>213</text:p>
          </table:table-cell>
          <table:table-cell office:value-type="float" office:value="17568" calcext:value-type="float">
            <text:p>17568</text:p>
          </table:table-cell>
          <table:table-cell table:formula="of:=CONCATENATE(&quot;insert into IBGE_MUNICIPIOS (UF, COD_UF, CODIGO_MUNICIPIO, NOME_MUNICIPIO, POP_COLETADA, POP_IMPUTADA, POP_TOTAL) values ('&quot;; [.A375]; &quot;', '&quot;; [.B375]; &quot;', '&quot;; [.C375]; &quot;', '&quot;; [.D375]; &quot;',&quot;; [.E375]; &quot;, &quot;; [.F375]; &quot;, &quot;; [.G375]; &quot;);&quot;)" office:value-type="string" office:string-value="insert into IBGE_MUNICIPIOS (UF, COD_UF, CODIGO_MUNICIPIO, NOME_MUNICIPIO, POP_COLETADA, POP_IMPUTADA, POP_TOTAL) values ('PR', '41', '27205', 'Terra Boa',17355, 213, 17568);" calcext:value-type="string">
            <text:p>insert into IBGE_MUNICIPIOS (UF, COD_UF, CODIGO_MUNICIPIO, NOME_MUNICIPIO, POP_COLETADA, POP_IMPUTADA, POP_TOTAL) values ('PR', '41', '27205', 'Terra Boa',17355, 213, 17568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27304" calcext:value-type="float">
            <text:p>27304</text:p>
          </table:table-cell>
          <table:table-cell office:value-type="string" calcext:value-type="string">
            <text:p>Terra Rica</text:p>
          </table:table-cell>
          <table:table-cell office:value-type="float" office:value="14159" calcext:value-type="float">
            <text:p>14159</text:p>
          </table:table-cell>
          <table:table-cell office:value-type="float" office:value="683" calcext:value-type="float">
            <text:p>683</text:p>
          </table:table-cell>
          <table:table-cell office:value-type="float" office:value="14842" calcext:value-type="float">
            <text:p>14842</text:p>
          </table:table-cell>
          <table:table-cell table:formula="of:=CONCATENATE(&quot;insert into IBGE_MUNICIPIOS (UF, COD_UF, CODIGO_MUNICIPIO, NOME_MUNICIPIO, POP_COLETADA, POP_IMPUTADA, POP_TOTAL) values ('&quot;; [.A376]; &quot;', '&quot;; [.B376]; &quot;', '&quot;; [.C376]; &quot;', '&quot;; [.D376]; &quot;',&quot;; [.E376]; &quot;, &quot;; [.F376]; &quot;, &quot;; [.G376]; &quot;);&quot;)" office:value-type="string" office:string-value="insert into IBGE_MUNICIPIOS (UF, COD_UF, CODIGO_MUNICIPIO, NOME_MUNICIPIO, POP_COLETADA, POP_IMPUTADA, POP_TOTAL) values ('PR', '41', '27304', 'Terra Rica',14159, 683, 14842);" calcext:value-type="string">
            <text:p>insert into IBGE_MUNICIPIOS (UF, COD_UF, CODIGO_MUNICIPIO, NOME_MUNICIPIO, POP_COLETADA, POP_IMPUTADA, POP_TOTAL) values ('PR', '41', '27304', 'Terra Rica',14159, 683, 14842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27403" calcext:value-type="float">
            <text:p>27403</text:p>
          </table:table-cell>
          <table:table-cell office:value-type="string" calcext:value-type="string">
            <text:p>Terra Roxa</text:p>
          </table:table-cell>
          <table:table-cell office:value-type="float" office:value="17443" calcext:value-type="float">
            <text:p>17443</text:p>
          </table:table-cell>
          <table:table-cell office:value-type="float" office:value="676" calcext:value-type="float">
            <text:p>676</text:p>
          </table:table-cell>
          <table:table-cell office:value-type="float" office:value="18119" calcext:value-type="float">
            <text:p>18119</text:p>
          </table:table-cell>
          <table:table-cell table:formula="of:=CONCATENATE(&quot;insert into IBGE_MUNICIPIOS (UF, COD_UF, CODIGO_MUNICIPIO, NOME_MUNICIPIO, POP_COLETADA, POP_IMPUTADA, POP_TOTAL) values ('&quot;; [.A377]; &quot;', '&quot;; [.B377]; &quot;', '&quot;; [.C377]; &quot;', '&quot;; [.D377]; &quot;',&quot;; [.E377]; &quot;, &quot;; [.F377]; &quot;, &quot;; [.G377]; &quot;);&quot;)" office:value-type="string" office:string-value="insert into IBGE_MUNICIPIOS (UF, COD_UF, CODIGO_MUNICIPIO, NOME_MUNICIPIO, POP_COLETADA, POP_IMPUTADA, POP_TOTAL) values ('PR', '41', '27403', 'Terra Roxa',17443, 676, 18119);" calcext:value-type="string">
            <text:p>insert into IBGE_MUNICIPIOS (UF, COD_UF, CODIGO_MUNICIPIO, NOME_MUNICIPIO, POP_COLETADA, POP_IMPUTADA, POP_TOTAL) values ('PR', '41', '27403', 'Terra Roxa',17443, 676, 18119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27502" calcext:value-type="float">
            <text:p>27502</text:p>
          </table:table-cell>
          <table:table-cell office:value-type="string" calcext:value-type="string">
            <text:p>Tibagi</text:p>
          </table:table-cell>
          <table:table-cell office:value-type="float" office:value="17908" calcext:value-type="float">
            <text:p>17908</text:p>
          </table:table-cell>
          <table:table-cell office:value-type="float" office:value="2053" calcext:value-type="float">
            <text:p>2053</text:p>
          </table:table-cell>
          <table:table-cell office:value-type="float" office:value="19961" calcext:value-type="float">
            <text:p>19961</text:p>
          </table:table-cell>
          <table:table-cell table:formula="of:=CONCATENATE(&quot;insert into IBGE_MUNICIPIOS (UF, COD_UF, CODIGO_MUNICIPIO, NOME_MUNICIPIO, POP_COLETADA, POP_IMPUTADA, POP_TOTAL) values ('&quot;; [.A378]; &quot;', '&quot;; [.B378]; &quot;', '&quot;; [.C378]; &quot;', '&quot;; [.D378]; &quot;',&quot;; [.E378]; &quot;, &quot;; [.F378]; &quot;, &quot;; [.G378]; &quot;);&quot;)" office:value-type="string" office:string-value="insert into IBGE_MUNICIPIOS (UF, COD_UF, CODIGO_MUNICIPIO, NOME_MUNICIPIO, POP_COLETADA, POP_IMPUTADA, POP_TOTAL) values ('PR', '41', '27502', 'Tibagi',17908, 2053, 19961);" calcext:value-type="string">
            <text:p>insert into IBGE_MUNICIPIOS (UF, COD_UF, CODIGO_MUNICIPIO, NOME_MUNICIPIO, POP_COLETADA, POP_IMPUTADA, POP_TOTAL) values ('PR', '41', '27502', 'Tibagi',17908, 2053, 19961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27601" calcext:value-type="float">
            <text:p>27601</text:p>
          </table:table-cell>
          <table:table-cell office:value-type="string" calcext:value-type="string">
            <text:p>Tijucas do Sul</text:p>
          </table:table-cell>
          <table:table-cell office:value-type="float" office:value="17014" calcext:value-type="float">
            <text:p>17014</text:p>
          </table:table-cell>
          <table:table-cell office:value-type="float" office:value="607" calcext:value-type="float">
            <text:p>607</text:p>
          </table:table-cell>
          <table:table-cell office:value-type="float" office:value="17621" calcext:value-type="float">
            <text:p>17621</text:p>
          </table:table-cell>
          <table:table-cell table:formula="of:=CONCATENATE(&quot;insert into IBGE_MUNICIPIOS (UF, COD_UF, CODIGO_MUNICIPIO, NOME_MUNICIPIO, POP_COLETADA, POP_IMPUTADA, POP_TOTAL) values ('&quot;; [.A379]; &quot;', '&quot;; [.B379]; &quot;', '&quot;; [.C379]; &quot;', '&quot;; [.D379]; &quot;',&quot;; [.E379]; &quot;, &quot;; [.F379]; &quot;, &quot;; [.G379]; &quot;);&quot;)" office:value-type="string" office:string-value="insert into IBGE_MUNICIPIOS (UF, COD_UF, CODIGO_MUNICIPIO, NOME_MUNICIPIO, POP_COLETADA, POP_IMPUTADA, POP_TOTAL) values ('PR', '41', '27601', 'Tijucas do Sul',17014, 607, 17621);" calcext:value-type="string">
            <text:p>insert into IBGE_MUNICIPIOS (UF, COD_UF, CODIGO_MUNICIPIO, NOME_MUNICIPIO, POP_COLETADA, POP_IMPUTADA, POP_TOTAL) values ('PR', '41', '27601', 'Tijucas do Sul',17014, 607, 17621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27700" calcext:value-type="float">
            <text:p>27700</text:p>
          </table:table-cell>
          <table:table-cell office:value-type="string" calcext:value-type="string">
            <text:p>Toledo</text:p>
          </table:table-cell>
          <table:table-cell office:value-type="float" office:value="141077" calcext:value-type="float">
            <text:p>141077</text:p>
          </table:table-cell>
          <table:table-cell office:value-type="float" office:value="9393" calcext:value-type="float">
            <text:p>9393</text:p>
          </table:table-cell>
          <table:table-cell office:value-type="float" office:value="150470" calcext:value-type="float">
            <text:p>150470</text:p>
          </table:table-cell>
          <table:table-cell table:formula="of:=CONCATENATE(&quot;insert into IBGE_MUNICIPIOS (UF, COD_UF, CODIGO_MUNICIPIO, NOME_MUNICIPIO, POP_COLETADA, POP_IMPUTADA, POP_TOTAL) values ('&quot;; [.A380]; &quot;', '&quot;; [.B380]; &quot;', '&quot;; [.C380]; &quot;', '&quot;; [.D380]; &quot;',&quot;; [.E380]; &quot;, &quot;; [.F380]; &quot;, &quot;; [.G380]; &quot;);&quot;)" office:value-type="string" office:string-value="insert into IBGE_MUNICIPIOS (UF, COD_UF, CODIGO_MUNICIPIO, NOME_MUNICIPIO, POP_COLETADA, POP_IMPUTADA, POP_TOTAL) values ('PR', '41', '27700', 'Toledo',141077, 9393, 150470);" calcext:value-type="string">
            <text:p>insert into IBGE_MUNICIPIOS (UF, COD_UF, CODIGO_MUNICIPIO, NOME_MUNICIPIO, POP_COLETADA, POP_IMPUTADA, POP_TOTAL) values ('PR', '41', '27700', 'Toledo',141077, 9393, 150470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27809" calcext:value-type="float">
            <text:p>27809</text:p>
          </table:table-cell>
          <table:table-cell office:value-type="string" calcext:value-type="string">
            <text:p>Tomazina</text:p>
          </table:table-cell>
          <table:table-cell office:value-type="float" office:value="8366" calcext:value-type="float">
            <text:p>8366</text:p>
          </table:table-cell>
          <table:table-cell office:value-type="float" office:value="60" calcext:value-type="float">
            <text:p>60</text:p>
          </table:table-cell>
          <table:table-cell office:value-type="float" office:value="8426" calcext:value-type="float">
            <text:p>8426</text:p>
          </table:table-cell>
          <table:table-cell table:formula="of:=CONCATENATE(&quot;insert into IBGE_MUNICIPIOS (UF, COD_UF, CODIGO_MUNICIPIO, NOME_MUNICIPIO, POP_COLETADA, POP_IMPUTADA, POP_TOTAL) values ('&quot;; [.A381]; &quot;', '&quot;; [.B381]; &quot;', '&quot;; [.C381]; &quot;', '&quot;; [.D381]; &quot;',&quot;; [.E381]; &quot;, &quot;; [.F381]; &quot;, &quot;; [.G381]; &quot;);&quot;)" office:value-type="string" office:string-value="insert into IBGE_MUNICIPIOS (UF, COD_UF, CODIGO_MUNICIPIO, NOME_MUNICIPIO, POP_COLETADA, POP_IMPUTADA, POP_TOTAL) values ('PR', '41', '27809', 'Tomazina',8366, 60, 8426);" calcext:value-type="string">
            <text:p>insert into IBGE_MUNICIPIOS (UF, COD_UF, CODIGO_MUNICIPIO, NOME_MUNICIPIO, POP_COLETADA, POP_IMPUTADA, POP_TOTAL) values ('PR', '41', '27809', 'Tomazina',8366, 60, 8426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27858" calcext:value-type="float">
            <text:p>27858</text:p>
          </table:table-cell>
          <table:table-cell office:value-type="string" calcext:value-type="string">
            <text:p>Três Barras do Paraná</text:p>
          </table:table-cell>
          <table:table-cell office:value-type="float" office:value="10837" calcext:value-type="float">
            <text:p>10837</text:p>
          </table:table-cell>
          <table:table-cell office:value-type="float" office:value="298" calcext:value-type="float">
            <text:p>298</text:p>
          </table:table-cell>
          <table:table-cell office:value-type="float" office:value="11135" calcext:value-type="float">
            <text:p>11135</text:p>
          </table:table-cell>
          <table:table-cell table:formula="of:=CONCATENATE(&quot;insert into IBGE_MUNICIPIOS (UF, COD_UF, CODIGO_MUNICIPIO, NOME_MUNICIPIO, POP_COLETADA, POP_IMPUTADA, POP_TOTAL) values ('&quot;; [.A382]; &quot;', '&quot;; [.B382]; &quot;', '&quot;; [.C382]; &quot;', '&quot;; [.D382]; &quot;',&quot;; [.E382]; &quot;, &quot;; [.F382]; &quot;, &quot;; [.G382]; &quot;);&quot;)" office:value-type="string" office:string-value="insert into IBGE_MUNICIPIOS (UF, COD_UF, CODIGO_MUNICIPIO, NOME_MUNICIPIO, POP_COLETADA, POP_IMPUTADA, POP_TOTAL) values ('PR', '41', '27858', 'Três Barras do Paraná',10837, 298, 11135);" calcext:value-type="string">
            <text:p>insert into IBGE_MUNICIPIOS (UF, COD_UF, CODIGO_MUNICIPIO, NOME_MUNICIPIO, POP_COLETADA, POP_IMPUTADA, POP_TOTAL) values ('PR', '41', '27858', 'Três Barras do Paraná',10837, 298, 11135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27882" calcext:value-type="float">
            <text:p>27882</text:p>
          </table:table-cell>
          <table:table-cell office:value-type="string" calcext:value-type="string">
            <text:p>Tunas do Paraná</text:p>
          </table:table-cell>
          <table:table-cell office:value-type="float" office:value="5941" calcext:value-type="float">
            <text:p>5941</text:p>
          </table:table-cell>
          <table:table-cell office:value-type="float" office:value="278" calcext:value-type="float">
            <text:p>278</text:p>
          </table:table-cell>
          <table:table-cell office:value-type="float" office:value="6219" calcext:value-type="float">
            <text:p>6219</text:p>
          </table:table-cell>
          <table:table-cell table:formula="of:=CONCATENATE(&quot;insert into IBGE_MUNICIPIOS (UF, COD_UF, CODIGO_MUNICIPIO, NOME_MUNICIPIO, POP_COLETADA, POP_IMPUTADA, POP_TOTAL) values ('&quot;; [.A383]; &quot;', '&quot;; [.B383]; &quot;', '&quot;; [.C383]; &quot;', '&quot;; [.D383]; &quot;',&quot;; [.E383]; &quot;, &quot;; [.F383]; &quot;, &quot;; [.G383]; &quot;);&quot;)" office:value-type="string" office:string-value="insert into IBGE_MUNICIPIOS (UF, COD_UF, CODIGO_MUNICIPIO, NOME_MUNICIPIO, POP_COLETADA, POP_IMPUTADA, POP_TOTAL) values ('PR', '41', '27882', 'Tunas do Paraná',5941, 278, 6219);" calcext:value-type="string">
            <text:p>insert into IBGE_MUNICIPIOS (UF, COD_UF, CODIGO_MUNICIPIO, NOME_MUNICIPIO, POP_COLETADA, POP_IMPUTADA, POP_TOTAL) values ('PR', '41', '27882', 'Tunas do Paraná',5941, 278, 6219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27908" calcext:value-type="float">
            <text:p>27908</text:p>
          </table:table-cell>
          <table:table-cell office:value-type="string" calcext:value-type="string">
            <text:p>Tuneiras do Oeste</text:p>
          </table:table-cell>
          <table:table-cell office:value-type="float" office:value="7994" calcext:value-type="float">
            <text:p>7994</text:p>
          </table:table-cell>
          <table:table-cell office:value-type="float" office:value="73" calcext:value-type="float">
            <text:p>73</text:p>
          </table:table-cell>
          <table:table-cell office:value-type="float" office:value="8067" calcext:value-type="float">
            <text:p>8067</text:p>
          </table:table-cell>
          <table:table-cell table:formula="of:=CONCATENATE(&quot;insert into IBGE_MUNICIPIOS (UF, COD_UF, CODIGO_MUNICIPIO, NOME_MUNICIPIO, POP_COLETADA, POP_IMPUTADA, POP_TOTAL) values ('&quot;; [.A384]; &quot;', '&quot;; [.B384]; &quot;', '&quot;; [.C384]; &quot;', '&quot;; [.D384]; &quot;',&quot;; [.E384]; &quot;, &quot;; [.F384]; &quot;, &quot;; [.G384]; &quot;);&quot;)" office:value-type="string" office:string-value="insert into IBGE_MUNICIPIOS (UF, COD_UF, CODIGO_MUNICIPIO, NOME_MUNICIPIO, POP_COLETADA, POP_IMPUTADA, POP_TOTAL) values ('PR', '41', '27908', 'Tuneiras do Oeste',7994, 73, 8067);" calcext:value-type="string">
            <text:p>insert into IBGE_MUNICIPIOS (UF, COD_UF, CODIGO_MUNICIPIO, NOME_MUNICIPIO, POP_COLETADA, POP_IMPUTADA, POP_TOTAL) values ('PR', '41', '27908', 'Tuneiras do Oeste',7994, 73, 8067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27957" calcext:value-type="float">
            <text:p>27957</text:p>
          </table:table-cell>
          <table:table-cell office:value-type="string" calcext:value-type="string">
            <text:p>Tupãssi</text:p>
          </table:table-cell>
          <table:table-cell office:value-type="float" office:value="7788" calcext:value-type="float">
            <text:p>7788</text:p>
          </table:table-cell>
          <table:table-cell office:value-type="float" office:value="289" calcext:value-type="float">
            <text:p>289</text:p>
          </table:table-cell>
          <table:table-cell office:value-type="float" office:value="8077" calcext:value-type="float">
            <text:p>8077</text:p>
          </table:table-cell>
          <table:table-cell table:formula="of:=CONCATENATE(&quot;insert into IBGE_MUNICIPIOS (UF, COD_UF, CODIGO_MUNICIPIO, NOME_MUNICIPIO, POP_COLETADA, POP_IMPUTADA, POP_TOTAL) values ('&quot;; [.A385]; &quot;', '&quot;; [.B385]; &quot;', '&quot;; [.C385]; &quot;', '&quot;; [.D385]; &quot;',&quot;; [.E385]; &quot;, &quot;; [.F385]; &quot;, &quot;; [.G385]; &quot;);&quot;)" office:value-type="string" office:string-value="insert into IBGE_MUNICIPIOS (UF, COD_UF, CODIGO_MUNICIPIO, NOME_MUNICIPIO, POP_COLETADA, POP_IMPUTADA, POP_TOTAL) values ('PR', '41', '27957', 'Tupãssi',7788, 289, 8077);" calcext:value-type="string">
            <text:p>insert into IBGE_MUNICIPIOS (UF, COD_UF, CODIGO_MUNICIPIO, NOME_MUNICIPIO, POP_COLETADA, POP_IMPUTADA, POP_TOTAL) values ('PR', '41', '27957', 'Tupãssi',7788, 289, 8077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27965" calcext:value-type="float">
            <text:p>27965</text:p>
          </table:table-cell>
          <table:table-cell office:value-type="string" calcext:value-type="string">
            <text:p>Turvo</text:p>
          </table:table-cell>
          <table:table-cell office:value-type="float" office:value="14186" calcext:value-type="float">
            <text:p>14186</text:p>
          </table:table-cell>
          <table:table-cell office:value-type="float" office:value="45" calcext:value-type="float">
            <text:p>45</text:p>
          </table:table-cell>
          <table:table-cell office:value-type="float" office:value="14231" calcext:value-type="float">
            <text:p>14231</text:p>
          </table:table-cell>
          <table:table-cell table:formula="of:=CONCATENATE(&quot;insert into IBGE_MUNICIPIOS (UF, COD_UF, CODIGO_MUNICIPIO, NOME_MUNICIPIO, POP_COLETADA, POP_IMPUTADA, POP_TOTAL) values ('&quot;; [.A386]; &quot;', '&quot;; [.B386]; &quot;', '&quot;; [.C386]; &quot;', '&quot;; [.D386]; &quot;',&quot;; [.E386]; &quot;, &quot;; [.F386]; &quot;, &quot;; [.G386]; &quot;);&quot;)" office:value-type="string" office:string-value="insert into IBGE_MUNICIPIOS (UF, COD_UF, CODIGO_MUNICIPIO, NOME_MUNICIPIO, POP_COLETADA, POP_IMPUTADA, POP_TOTAL) values ('PR', '41', '27965', 'Turvo',14186, 45, 14231);" calcext:value-type="string">
            <text:p>insert into IBGE_MUNICIPIOS (UF, COD_UF, CODIGO_MUNICIPIO, NOME_MUNICIPIO, POP_COLETADA, POP_IMPUTADA, POP_TOTAL) values ('PR', '41', '27965', 'Turvo',14186, 45, 14231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28005" calcext:value-type="float">
            <text:p>28005</text:p>
          </table:table-cell>
          <table:table-cell office:value-type="string" calcext:value-type="string">
            <text:p>Ubiratã</text:p>
          </table:table-cell>
          <table:table-cell office:value-type="float" office:value="24008" calcext:value-type="float">
            <text:p>24008</text:p>
          </table:table-cell>
          <table:table-cell office:value-type="float" office:value="741" calcext:value-type="float">
            <text:p>741</text:p>
          </table:table-cell>
          <table:table-cell office:value-type="float" office:value="24749" calcext:value-type="float">
            <text:p>24749</text:p>
          </table:table-cell>
          <table:table-cell table:formula="of:=CONCATENATE(&quot;insert into IBGE_MUNICIPIOS (UF, COD_UF, CODIGO_MUNICIPIO, NOME_MUNICIPIO, POP_COLETADA, POP_IMPUTADA, POP_TOTAL) values ('&quot;; [.A387]; &quot;', '&quot;; [.B387]; &quot;', '&quot;; [.C387]; &quot;', '&quot;; [.D387]; &quot;',&quot;; [.E387]; &quot;, &quot;; [.F387]; &quot;, &quot;; [.G387]; &quot;);&quot;)" office:value-type="string" office:string-value="insert into IBGE_MUNICIPIOS (UF, COD_UF, CODIGO_MUNICIPIO, NOME_MUNICIPIO, POP_COLETADA, POP_IMPUTADA, POP_TOTAL) values ('PR', '41', '28005', 'Ubiratã',24008, 741, 24749);" calcext:value-type="string">
            <text:p>insert into IBGE_MUNICIPIOS (UF, COD_UF, CODIGO_MUNICIPIO, NOME_MUNICIPIO, POP_COLETADA, POP_IMPUTADA, POP_TOTAL) values ('PR', '41', '28005', 'Ubiratã',24008, 741, 24749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28104" calcext:value-type="float">
            <text:p>28104</text:p>
          </table:table-cell>
          <table:table-cell office:value-type="string" calcext:value-type="string">
            <text:p>Umuarama</text:p>
          </table:table-cell>
          <table:table-cell office:value-type="float" office:value="114393" calcext:value-type="float">
            <text:p>114393</text:p>
          </table:table-cell>
          <table:table-cell office:value-type="float" office:value="2702" calcext:value-type="float">
            <text:p>2702</text:p>
          </table:table-cell>
          <table:table-cell office:value-type="float" office:value="117095" calcext:value-type="float">
            <text:p>117095</text:p>
          </table:table-cell>
          <table:table-cell table:formula="of:=CONCATENATE(&quot;insert into IBGE_MUNICIPIOS (UF, COD_UF, CODIGO_MUNICIPIO, NOME_MUNICIPIO, POP_COLETADA, POP_IMPUTADA, POP_TOTAL) values ('&quot;; [.A388]; &quot;', '&quot;; [.B388]; &quot;', '&quot;; [.C388]; &quot;', '&quot;; [.D388]; &quot;',&quot;; [.E388]; &quot;, &quot;; [.F388]; &quot;, &quot;; [.G388]; &quot;);&quot;)" office:value-type="string" office:string-value="insert into IBGE_MUNICIPIOS (UF, COD_UF, CODIGO_MUNICIPIO, NOME_MUNICIPIO, POP_COLETADA, POP_IMPUTADA, POP_TOTAL) values ('PR', '41', '28104', 'Umuarama',114393, 2702, 117095);" calcext:value-type="string">
            <text:p>insert into IBGE_MUNICIPIOS (UF, COD_UF, CODIGO_MUNICIPIO, NOME_MUNICIPIO, POP_COLETADA, POP_IMPUTADA, POP_TOTAL) values ('PR', '41', '28104', 'Umuarama',114393, 2702, 117095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28203" calcext:value-type="float">
            <text:p>28203</text:p>
          </table:table-cell>
          <table:table-cell office:value-type="string" calcext:value-type="string">
            <text:p>União da Vitória</text:p>
          </table:table-cell>
          <table:table-cell office:value-type="float" office:value="52971" calcext:value-type="float">
            <text:p>52971</text:p>
          </table:table-cell>
          <table:table-cell office:value-type="float" office:value="2062" calcext:value-type="float">
            <text:p>2062</text:p>
          </table:table-cell>
          <table:table-cell office:value-type="float" office:value="55033" calcext:value-type="float">
            <text:p>55033</text:p>
          </table:table-cell>
          <table:table-cell table:formula="of:=CONCATENATE(&quot;insert into IBGE_MUNICIPIOS (UF, COD_UF, CODIGO_MUNICIPIO, NOME_MUNICIPIO, POP_COLETADA, POP_IMPUTADA, POP_TOTAL) values ('&quot;; [.A389]; &quot;', '&quot;; [.B389]; &quot;', '&quot;; [.C389]; &quot;', '&quot;; [.D389]; &quot;',&quot;; [.E389]; &quot;, &quot;; [.F389]; &quot;, &quot;; [.G389]; &quot;);&quot;)" office:value-type="string" office:string-value="insert into IBGE_MUNICIPIOS (UF, COD_UF, CODIGO_MUNICIPIO, NOME_MUNICIPIO, POP_COLETADA, POP_IMPUTADA, POP_TOTAL) values ('PR', '41', '28203', 'União da Vitória',52971, 2062, 55033);" calcext:value-type="string">
            <text:p>insert into IBGE_MUNICIPIOS (UF, COD_UF, CODIGO_MUNICIPIO, NOME_MUNICIPIO, POP_COLETADA, POP_IMPUTADA, POP_TOTAL) values ('PR', '41', '28203', 'União da Vitória',52971, 2062, 55033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28302" calcext:value-type="float">
            <text:p>28302</text:p>
          </table:table-cell>
          <table:table-cell office:value-type="string" calcext:value-type="string">
            <text:p>Uniflor</text:p>
          </table:table-cell>
          <table:table-cell office:value-type="float" office:value="2128" calcext:value-type="float">
            <text:p>2128</text:p>
          </table:table-cell>
          <table:table-cell office:value-type="float" office:value="8" calcext:value-type="float">
            <text:p>8</text:p>
          </table:table-cell>
          <table:table-cell office:value-type="float" office:value="2136" calcext:value-type="float">
            <text:p>2136</text:p>
          </table:table-cell>
          <table:table-cell table:formula="of:=CONCATENATE(&quot;insert into IBGE_MUNICIPIOS (UF, COD_UF, CODIGO_MUNICIPIO, NOME_MUNICIPIO, POP_COLETADA, POP_IMPUTADA, POP_TOTAL) values ('&quot;; [.A390]; &quot;', '&quot;; [.B390]; &quot;', '&quot;; [.C390]; &quot;', '&quot;; [.D390]; &quot;',&quot;; [.E390]; &quot;, &quot;; [.F390]; &quot;, &quot;; [.G390]; &quot;);&quot;)" office:value-type="string" office:string-value="insert into IBGE_MUNICIPIOS (UF, COD_UF, CODIGO_MUNICIPIO, NOME_MUNICIPIO, POP_COLETADA, POP_IMPUTADA, POP_TOTAL) values ('PR', '41', '28302', 'Uniflor',2128, 8, 2136);" calcext:value-type="string">
            <text:p>insert into IBGE_MUNICIPIOS (UF, COD_UF, CODIGO_MUNICIPIO, NOME_MUNICIPIO, POP_COLETADA, POP_IMPUTADA, POP_TOTAL) values ('PR', '41', '28302', 'Uniflor',2128, 8, 2136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28401" calcext:value-type="float">
            <text:p>28401</text:p>
          </table:table-cell>
          <table:table-cell office:value-type="string" calcext:value-type="string">
            <text:p>Uraí</text:p>
          </table:table-cell>
          <table:table-cell office:value-type="float" office:value="10244" calcext:value-type="float">
            <text:p>10244</text:p>
          </table:table-cell>
          <table:table-cell office:value-type="float" office:value="162" calcext:value-type="float">
            <text:p>162</text:p>
          </table:table-cell>
          <table:table-cell office:value-type="float" office:value="10406" calcext:value-type="float">
            <text:p>10406</text:p>
          </table:table-cell>
          <table:table-cell table:formula="of:=CONCATENATE(&quot;insert into IBGE_MUNICIPIOS (UF, COD_UF, CODIGO_MUNICIPIO, NOME_MUNICIPIO, POP_COLETADA, POP_IMPUTADA, POP_TOTAL) values ('&quot;; [.A391]; &quot;', '&quot;; [.B391]; &quot;', '&quot;; [.C391]; &quot;', '&quot;; [.D391]; &quot;',&quot;; [.E391]; &quot;, &quot;; [.F391]; &quot;, &quot;; [.G391]; &quot;);&quot;)" office:value-type="string" office:string-value="insert into IBGE_MUNICIPIOS (UF, COD_UF, CODIGO_MUNICIPIO, NOME_MUNICIPIO, POP_COLETADA, POP_IMPUTADA, POP_TOTAL) values ('PR', '41', '28401', 'Uraí',10244, 162, 10406);" calcext:value-type="string">
            <text:p>insert into IBGE_MUNICIPIOS (UF, COD_UF, CODIGO_MUNICIPIO, NOME_MUNICIPIO, POP_COLETADA, POP_IMPUTADA, POP_TOTAL) values ('PR', '41', '28401', 'Uraí',10244, 162, 10406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28500" calcext:value-type="float">
            <text:p>28500</text:p>
          </table:table-cell>
          <table:table-cell office:value-type="string" calcext:value-type="string">
            <text:p>Wenceslau Braz</text:p>
          </table:table-cell>
          <table:table-cell office:value-type="float" office:value="19063" calcext:value-type="float">
            <text:p>19063</text:p>
          </table:table-cell>
          <table:table-cell office:value-type="float" office:value="125" calcext:value-type="float">
            <text:p>125</text:p>
          </table:table-cell>
          <table:table-cell office:value-type="float" office:value="19188" calcext:value-type="float">
            <text:p>19188</text:p>
          </table:table-cell>
          <table:table-cell table:formula="of:=CONCATENATE(&quot;insert into IBGE_MUNICIPIOS (UF, COD_UF, CODIGO_MUNICIPIO, NOME_MUNICIPIO, POP_COLETADA, POP_IMPUTADA, POP_TOTAL) values ('&quot;; [.A392]; &quot;', '&quot;; [.B392]; &quot;', '&quot;; [.C392]; &quot;', '&quot;; [.D392]; &quot;',&quot;; [.E392]; &quot;, &quot;; [.F392]; &quot;, &quot;; [.G392]; &quot;);&quot;)" office:value-type="string" office:string-value="insert into IBGE_MUNICIPIOS (UF, COD_UF, CODIGO_MUNICIPIO, NOME_MUNICIPIO, POP_COLETADA, POP_IMPUTADA, POP_TOTAL) values ('PR', '41', '28500', 'Wenceslau Braz',19063, 125, 19188);" calcext:value-type="string">
            <text:p>insert into IBGE_MUNICIPIOS (UF, COD_UF, CODIGO_MUNICIPIO, NOME_MUNICIPIO, POP_COLETADA, POP_IMPUTADA, POP_TOTAL) values ('PR', '41', '28500', 'Wenceslau Braz',19063, 125, 19188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28534" calcext:value-type="float">
            <text:p>28534</text:p>
          </table:table-cell>
          <table:table-cell office:value-type="string" calcext:value-type="string">
            <text:p>Ventania</text:p>
          </table:table-cell>
          <table:table-cell office:value-type="float" office:value="9676" calcext:value-type="float">
            <text:p>9676</text:p>
          </table:table-cell>
          <table:table-cell office:value-type="float" office:value="5" calcext:value-type="float">
            <text:p>5</text:p>
          </table:table-cell>
          <table:table-cell office:value-type="float" office:value="9681" calcext:value-type="float">
            <text:p>9681</text:p>
          </table:table-cell>
          <table:table-cell table:formula="of:=CONCATENATE(&quot;insert into IBGE_MUNICIPIOS (UF, COD_UF, CODIGO_MUNICIPIO, NOME_MUNICIPIO, POP_COLETADA, POP_IMPUTADA, POP_TOTAL) values ('&quot;; [.A393]; &quot;', '&quot;; [.B393]; &quot;', '&quot;; [.C393]; &quot;', '&quot;; [.D393]; &quot;',&quot;; [.E393]; &quot;, &quot;; [.F393]; &quot;, &quot;; [.G393]; &quot;);&quot;)" office:value-type="string" office:string-value="insert into IBGE_MUNICIPIOS (UF, COD_UF, CODIGO_MUNICIPIO, NOME_MUNICIPIO, POP_COLETADA, POP_IMPUTADA, POP_TOTAL) values ('PR', '41', '28534', 'Ventania',9676, 5, 9681);" calcext:value-type="string">
            <text:p>insert into IBGE_MUNICIPIOS (UF, COD_UF, CODIGO_MUNICIPIO, NOME_MUNICIPIO, POP_COLETADA, POP_IMPUTADA, POP_TOTAL) values ('PR', '41', '28534', 'Ventania',9676, 5, 9681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28559" calcext:value-type="float">
            <text:p>28559</text:p>
          </table:table-cell>
          <table:table-cell office:value-type="string" calcext:value-type="string">
            <text:p>Vera Cruz do Oeste</text:p>
          </table:table-cell>
          <table:table-cell office:value-type="float" office:value="7678" calcext:value-type="float">
            <text:p>7678</text:p>
          </table:table-cell>
          <table:table-cell office:value-type="float" office:value="537" calcext:value-type="float">
            <text:p>537</text:p>
          </table:table-cell>
          <table:table-cell office:value-type="float" office:value="8215" calcext:value-type="float">
            <text:p>8215</text:p>
          </table:table-cell>
          <table:table-cell table:formula="of:=CONCATENATE(&quot;insert into IBGE_MUNICIPIOS (UF, COD_UF, CODIGO_MUNICIPIO, NOME_MUNICIPIO, POP_COLETADA, POP_IMPUTADA, POP_TOTAL) values ('&quot;; [.A394]; &quot;', '&quot;; [.B394]; &quot;', '&quot;; [.C394]; &quot;', '&quot;; [.D394]; &quot;',&quot;; [.E394]; &quot;, &quot;; [.F394]; &quot;, &quot;; [.G394]; &quot;);&quot;)" office:value-type="string" office:string-value="insert into IBGE_MUNICIPIOS (UF, COD_UF, CODIGO_MUNICIPIO, NOME_MUNICIPIO, POP_COLETADA, POP_IMPUTADA, POP_TOTAL) values ('PR', '41', '28559', 'Vera Cruz do Oeste',7678, 537, 8215);" calcext:value-type="string">
            <text:p>insert into IBGE_MUNICIPIOS (UF, COD_UF, CODIGO_MUNICIPIO, NOME_MUNICIPIO, POP_COLETADA, POP_IMPUTADA, POP_TOTAL) values ('PR', '41', '28559', 'Vera Cruz do Oeste',7678, 537, 8215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28609" calcext:value-type="float">
            <text:p>28609</text:p>
          </table:table-cell>
          <table:table-cell office:value-type="string" calcext:value-type="string">
            <text:p>Verê</text:p>
          </table:table-cell>
          <table:table-cell office:value-type="float" office:value="7878" calcext:value-type="float">
            <text:p>7878</text:p>
          </table:table-cell>
          <table:table-cell office:value-type="float" office:value="54" calcext:value-type="float">
            <text:p>54</text:p>
          </table:table-cell>
          <table:table-cell office:value-type="float" office:value="7932" calcext:value-type="float">
            <text:p>7932</text:p>
          </table:table-cell>
          <table:table-cell table:formula="of:=CONCATENATE(&quot;insert into IBGE_MUNICIPIOS (UF, COD_UF, CODIGO_MUNICIPIO, NOME_MUNICIPIO, POP_COLETADA, POP_IMPUTADA, POP_TOTAL) values ('&quot;; [.A395]; &quot;', '&quot;; [.B395]; &quot;', '&quot;; [.C395]; &quot;', '&quot;; [.D395]; &quot;',&quot;; [.E395]; &quot;, &quot;; [.F395]; &quot;, &quot;; [.G395]; &quot;);&quot;)" office:value-type="string" office:string-value="insert into IBGE_MUNICIPIOS (UF, COD_UF, CODIGO_MUNICIPIO, NOME_MUNICIPIO, POP_COLETADA, POP_IMPUTADA, POP_TOTAL) values ('PR', '41', '28609', 'Verê',7878, 54, 7932);" calcext:value-type="string">
            <text:p>insert into IBGE_MUNICIPIOS (UF, COD_UF, CODIGO_MUNICIPIO, NOME_MUNICIPIO, POP_COLETADA, POP_IMPUTADA, POP_TOTAL) values ('PR', '41', '28609', 'Verê',7878, 54, 7932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28625" calcext:value-type="float">
            <text:p>28625</text:p>
          </table:table-cell>
          <table:table-cell office:value-type="string" calcext:value-type="string">
            <text:p>Alto Paraíso</text:p>
          </table:table-cell>
          <table:table-cell office:value-type="float" office:value="3036" calcext:value-type="float">
            <text:p>3036</text:p>
          </table:table-cell>
          <table:table-cell office:value-type="float" office:value="19" calcext:value-type="float">
            <text:p>19</text:p>
          </table:table-cell>
          <table:table-cell office:value-type="float" office:value="3055" calcext:value-type="float">
            <text:p>3055</text:p>
          </table:table-cell>
          <table:table-cell table:formula="of:=CONCATENATE(&quot;insert into IBGE_MUNICIPIOS (UF, COD_UF, CODIGO_MUNICIPIO, NOME_MUNICIPIO, POP_COLETADA, POP_IMPUTADA, POP_TOTAL) values ('&quot;; [.A396]; &quot;', '&quot;; [.B396]; &quot;', '&quot;; [.C396]; &quot;', '&quot;; [.D396]; &quot;',&quot;; [.E396]; &quot;, &quot;; [.F396]; &quot;, &quot;; [.G396]; &quot;);&quot;)" office:value-type="string" office:string-value="insert into IBGE_MUNICIPIOS (UF, COD_UF, CODIGO_MUNICIPIO, NOME_MUNICIPIO, POP_COLETADA, POP_IMPUTADA, POP_TOTAL) values ('PR', '41', '28625', 'Alto Paraíso',3036, 19, 3055);" calcext:value-type="string">
            <text:p>insert into IBGE_MUNICIPIOS (UF, COD_UF, CODIGO_MUNICIPIO, NOME_MUNICIPIO, POP_COLETADA, POP_IMPUTADA, POP_TOTAL) values ('PR', '41', '28625', 'Alto Paraíso',3036, 19, 3055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28633" calcext:value-type="float">
            <text:p>28633</text:p>
          </table:table-cell>
          <table:table-cell office:value-type="string" calcext:value-type="string">
            <text:p>Doutor Ulysses</text:p>
          </table:table-cell>
          <table:table-cell office:value-type="float" office:value="5667" calcext:value-type="float">
            <text:p>5667</text:p>
          </table:table-cell>
          <table:table-cell office:value-type="float" office:value="30" calcext:value-type="float">
            <text:p>30</text:p>
          </table:table-cell>
          <table:table-cell office:value-type="float" office:value="5697" calcext:value-type="float">
            <text:p>5697</text:p>
          </table:table-cell>
          <table:table-cell table:formula="of:=CONCATENATE(&quot;insert into IBGE_MUNICIPIOS (UF, COD_UF, CODIGO_MUNICIPIO, NOME_MUNICIPIO, POP_COLETADA, POP_IMPUTADA, POP_TOTAL) values ('&quot;; [.A397]; &quot;', '&quot;; [.B397]; &quot;', '&quot;; [.C397]; &quot;', '&quot;; [.D397]; &quot;',&quot;; [.E397]; &quot;, &quot;; [.F397]; &quot;, &quot;; [.G397]; &quot;);&quot;)" office:value-type="string" office:string-value="insert into IBGE_MUNICIPIOS (UF, COD_UF, CODIGO_MUNICIPIO, NOME_MUNICIPIO, POP_COLETADA, POP_IMPUTADA, POP_TOTAL) values ('PR', '41', '28633', 'Doutor Ulysses',5667, 30, 5697);" calcext:value-type="string">
            <text:p>insert into IBGE_MUNICIPIOS (UF, COD_UF, CODIGO_MUNICIPIO, NOME_MUNICIPIO, POP_COLETADA, POP_IMPUTADA, POP_TOTAL) values ('PR', '41', '28633', 'Doutor Ulysses',5667, 30, 5697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28658" calcext:value-type="float">
            <text:p>28658</text:p>
          </table:table-cell>
          <table:table-cell office:value-type="string" calcext:value-type="string">
            <text:p>Virmond</text:p>
          </table:table-cell>
          <table:table-cell office:value-type="float" office:value="3807" calcext:value-type="float">
            <text:p>3807</text:p>
          </table:table-cell>
          <table:table-cell office:value-type="float" office:value="4" calcext:value-type="float">
            <text:p>4</text:p>
          </table:table-cell>
          <table:table-cell office:value-type="float" office:value="3811" calcext:value-type="float">
            <text:p>3811</text:p>
          </table:table-cell>
          <table:table-cell table:formula="of:=CONCATENATE(&quot;insert into IBGE_MUNICIPIOS (UF, COD_UF, CODIGO_MUNICIPIO, NOME_MUNICIPIO, POP_COLETADA, POP_IMPUTADA, POP_TOTAL) values ('&quot;; [.A398]; &quot;', '&quot;; [.B398]; &quot;', '&quot;; [.C398]; &quot;', '&quot;; [.D398]; &quot;',&quot;; [.E398]; &quot;, &quot;; [.F398]; &quot;, &quot;; [.G398]; &quot;);&quot;)" office:value-type="string" office:string-value="insert into IBGE_MUNICIPIOS (UF, COD_UF, CODIGO_MUNICIPIO, NOME_MUNICIPIO, POP_COLETADA, POP_IMPUTADA, POP_TOTAL) values ('PR', '41', '28658', 'Virmond',3807, 4, 3811);" calcext:value-type="string">
            <text:p>insert into IBGE_MUNICIPIOS (UF, COD_UF, CODIGO_MUNICIPIO, NOME_MUNICIPIO, POP_COLETADA, POP_IMPUTADA, POP_TOTAL) values ('PR', '41', '28658', 'Virmond',3807, 4, 3811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28708" calcext:value-type="float">
            <text:p>28708</text:p>
          </table:table-cell>
          <table:table-cell office:value-type="string" calcext:value-type="string">
            <text:p>Vitorino</text:p>
          </table:table-cell>
          <table:table-cell office:value-type="float" office:value="9393" calcext:value-type="float">
            <text:p>9393</text:p>
          </table:table-cell>
          <table:table-cell office:value-type="float" office:value="313" calcext:value-type="float">
            <text:p>313</text:p>
          </table:table-cell>
          <table:table-cell office:value-type="float" office:value="9706" calcext:value-type="float">
            <text:p>9706</text:p>
          </table:table-cell>
          <table:table-cell table:formula="of:=CONCATENATE(&quot;insert into IBGE_MUNICIPIOS (UF, COD_UF, CODIGO_MUNICIPIO, NOME_MUNICIPIO, POP_COLETADA, POP_IMPUTADA, POP_TOTAL) values ('&quot;; [.A399]; &quot;', '&quot;; [.B399]; &quot;', '&quot;; [.C399]; &quot;', '&quot;; [.D399]; &quot;',&quot;; [.E399]; &quot;, &quot;; [.F399]; &quot;, &quot;; [.G399]; &quot;);&quot;)" office:value-type="string" office:string-value="insert into IBGE_MUNICIPIOS (UF, COD_UF, CODIGO_MUNICIPIO, NOME_MUNICIPIO, POP_COLETADA, POP_IMPUTADA, POP_TOTAL) values ('PR', '41', '28708', 'Vitorino',9393, 313, 9706);" calcext:value-type="string">
            <text:p>insert into IBGE_MUNICIPIOS (UF, COD_UF, CODIGO_MUNICIPIO, NOME_MUNICIPIO, POP_COLETADA, POP_IMPUTADA, POP_TOTAL) values ('PR', '41', '28708', 'Vitorino',9393, 313, 9706)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28807" calcext:value-type="float">
            <text:p>28807</text:p>
          </table:table-cell>
          <table:table-cell office:value-type="string" calcext:value-type="string">
            <text:p>Xambrê</text:p>
          </table:table-cell>
          <table:table-cell office:value-type="float" office:value="5768" calcext:value-type="float">
            <text:p>5768</text:p>
          </table:table-cell>
          <table:table-cell office:value-type="float" office:value="30" calcext:value-type="float">
            <text:p>30</text:p>
          </table:table-cell>
          <table:table-cell office:value-type="float" office:value="5798" calcext:value-type="float">
            <text:p>5798</text:p>
          </table:table-cell>
          <table:table-cell table:formula="of:=CONCATENATE(&quot;insert into IBGE_MUNICIPIOS (UF, COD_UF, CODIGO_MUNICIPIO, NOME_MUNICIPIO, POP_COLETADA, POP_IMPUTADA, POP_TOTAL) values ('&quot;; [.A400]; &quot;', '&quot;; [.B400]; &quot;', '&quot;; [.C400]; &quot;', '&quot;; [.D400]; &quot;',&quot;; [.E400]; &quot;, &quot;; [.F400]; &quot;, &quot;; [.G400]; &quot;);&quot;)" office:value-type="string" office:string-value="insert into IBGE_MUNICIPIOS (UF, COD_UF, CODIGO_MUNICIPIO, NOME_MUNICIPIO, POP_COLETADA, POP_IMPUTADA, POP_TOTAL) values ('PR', '41', '28807', 'Xambrê',5768, 30, 5798);" calcext:value-type="string">
            <text:p>insert into IBGE_MUNICIPIOS (UF, COD_UF, CODIGO_MUNICIPIO, NOME_MUNICIPIO, POP_COLETADA, POP_IMPUTADA, POP_TOTAL) values ('PR', '41', '28807', 'Xambrê',5768, 30, 5798)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16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dc:date>2026-07-16T16:57:57.973273206</dc:date>
    <dc:creator>Vladimir Rech</dc:creator>
    <meta:editing-duration>PT16M1S</meta:editing-duration>
    <meta:editing-cycles>2</meta:editing-cycles>
    <meta:document-statistic meta:table-count="1" meta:cell-count="3200" meta:object-count="0"/>
  </office:meta>
</office:document-meta>
</file>